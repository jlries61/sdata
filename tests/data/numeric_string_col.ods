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umeric_string_co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$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7516" calcext:value-type="float">
            <text:p>77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11" calcext:value-type="float">
            <text:p>833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6" meta:object-count="0"/>
    <meta:generator>LibreOffice/26.2.4.2$Linux_X86_64 LibreOffice_project/620$Build-2</meta:generator>
  </office:meta>
</office:document-meta>
</file>