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itle">
      <style:text-properties officeooo:rsid="000d357a" officeooo:paragraph-rsid="000d357a"/>
    </style:style>
    <style:style style:name="P2" style:family="paragraph" style:parent-style-name="Heading_20_1">
      <style:text-properties officeooo:rsid="000d357a" officeooo:paragraph-rsid="000d357a"/>
    </style:style>
    <style:style style:name="P3" style:family="paragraph" style:parent-style-name="Text_20_body">
      <style:text-properties officeooo:paragraph-rsid="000d357a"/>
    </style:style>
    <style:style style:name="P4" style:family="paragraph" style:parent-style-name="Preformatted_20_Text">
      <style:text-properties officeooo:rsid="000ee754" officeooo:paragraph-rsid="000ee754"/>
    </style:style>
    <style:style style:name="P5" style:family="paragraph" style:parent-style-name="Text_20_body">
      <style:text-properties officeooo:rsid="000ef430" officeooo:paragraph-rsid="000ef430"/>
    </style:style>
    <style:style style:name="T1" style:family="text">
      <style:text-properties officeooo:rsid="0010723f"/>
    </style:style>
    <style:style style:name="T2" style:family="text">
      <style:text-properties officeooo:rsid="000d357a"/>
    </style:style>
    <style:style style:name="T3" style:family="text">
      <style:text-properties officeooo:rsid="000ee754"/>
    </style:style>
    <style:style style:name="T4" style:family="text">
      <style:text-properties officeooo:rsid="000ef4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red Enhancements to SData Prior to 1.0 Release</text:p>
      <text:h text:style-name="P2" text:outline-level="1">1. Input File Subsetting <text:span text:style-name="T1">and Variable Renaming</text:span></text:h>
      <text:p text:style-name="P3"><text:span text:style-name="T2">The </text:span><text:span text:style-name="Source_20_Text"><text:span text:style-name="T2">USE</text:span></text:span> <text:span text:style-name="T2">command at present brings all columns in the input dataset into the internal data table. <text:s/>This is fine as a default, but we should also be able to determine which columns are read in, especially given </text:span><text:span text:style-name="T3">plans to allow multiple input datasets to be read at one time. <text:s/>Systat BASIC allows the user to specify the desired variables within parentheses, like so:</text:span></text:p>
      <text:p text:style-name="P4">USE <text:span text:style-name="T4">VEHICLE(COMPACT, CIRCULAR, DISTCIRC, RADIUSRT, DEPVAR)</text:span></text:p>
      <text:p text:style-name="P4"/>
      <text:p text:style-name="P5">I think it also necessary to allow the user to specify variables to drop, as SAS does. <text:s/><text:span text:style-name="T1">It would also be convenient to allow incoming variables to be renamed ala SA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13:03:06.909104293</meta:creation-date>
    <dc:date>2026-04-24T20:37:05.974506234</dc:date>
    <meta:editing-duration>PT6H1M57S</meta:editing-duration>
    <meta:editing-cycles>1</meta:editing-cycles>
    <meta:document-statistic meta:table-count="0" meta:image-count="0" meta:object-count="0" meta:page-count="1" meta:paragraph-count="5" meta:word-count="116" meta:character-count="683" meta:non-whitespace-character-count="569"/>
    <meta:generator>LibreOffice/26.2.2.2$Linux_X86_64 LibreOffice_project/620$Build-2</meta:generator>
  </office:meta>
</office:document-meta>
</file>