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6.8346in"/>
    </style:style>
    <style:style style:name="co3" style:family="table-column">
      <style:table-column-properties fo:break-before="auto" style:column-width="0.8075in"/>
    </style:style>
    <style:style style:name="co4" style:family="table-column">
      <style:table-column-properties fo:break-before="auto" style:column-width="0.711in"/>
    </style:style>
    <style:style style:name="co5" style:family="table-column">
      <style:table-column-properties fo:break-before="auto" style:column-width="22.8335in"/>
    </style:style>
    <style:style style:name="co6" style:family="table-column">
      <style:table-column-properties fo:break-before="auto" style:column-width="21.377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null-year="1950"/>
      <table:table table:name="adrs"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number-columns-repeated="2" table:default-cell-style-name="Default"/>
        <table:table-column table:style-name="co6" table:default-cell-style-name="Default"/>
        <table:table-row table:style-name="ro1">
          <table:table-cell office:value-type="string" calcext:value-type="string">
            <text:p>Number</text:p>
          </table:table-cell>
          <table:table-cell office:value-type="string" calcext:value-type="string">
            <text:p>Title</text:p>
          </table:table-cell>
          <table:table-cell table:style-name="Default" office:value-type="string" calcext:value-type="string">
            <text:p>Date</text:p>
          </table:table-cell>
          <table:table-cell office:value-type="string" calcext:value-type="string">
            <text:p>Status</text:p>
          </table:table-cell>
          <table:table-cell office:value-type="string" calcext:value-type="string">
            <text:p>Context</text:p>
          </table:table-cell>
          <table:table-cell office:value-type="string" calcext:value-type="string">
            <text:p>Decision</text:p>
          </table:table-cell>
          <table:table-cell office:value-type="string" calcext:value-type="string">
            <text:p>Consequences</text:p>
          </table:table-cell>
        </table:table-row>
        <table:table-row table:style-name="ro1">
          <table:table-cell office:value-type="string" calcext:value-type="string">
            <text:p>ADR-001</text:p>
          </table:table-cell>
          <table:table-cell office:value-type="string" calcext:value-type="string">
            <text:p>Choose Ada 2012 as implementation language</text:p>
          </table:table-cell>
          <table:table-cell office:value-type="date" office:date-value="2026-02-16" calcext:value-type="date">
            <text:p>2026-02-16</text:p>
          </table:table-cell>
          <table:table-cell office:value-type="string" calcext:value-type="string">
            <text:p>Accepted</text:p>
          </table:table-cell>
          <table:table-cell office:value-type="string" calcext:value-type="string">
            <text:p>The project is a statistical data language interpreter inspired by SAS/Systat BASIC. A compiled, strongly typed language was needed that could handle performance-sensitive data processing, rich type checking at compile time, and production-quality error handling without relying on a garbage collector.</text:p>
          </table:table-cell>
          <table:table-cell office:value-type="string" calcext:value-type="string">
            <text:p>Implement sdata in Ada 2012 using the GNAT toolchain. Ada's contract-based programming, tagged types, and built-in numeric overflow semantics map cleanly onto interpreter requirements.</text:p>
          </table:table-cell>
          <table:table-cell office:value-type="string" calcext:value-type="string">
            <text:p>The codebase benefits from strong compile-time guarantees and GNAT's rich runtime checking, but the Ada ecosystem has limited mature libraries (especially for spreadsheets and statistics), requiring several components to be implemented from scratch.</text:p>
          </table:table-cell>
        </table:table-row>
        <table:table-row table:style-name="ro1">
          <table:table-cell office:value-type="string" calcext:value-type="string">
            <text:p>ADR-002</text:p>
          </table:table-cell>
          <table:table-cell office:value-type="string" calcext:value-type="string">
            <text:p>Use a hand-written recursive-descent parser</text:p>
          </table:table-cell>
          <table:table-cell office:value-type="date" office:date-value="2026-02-16" calcext:value-type="date">
            <text:p>2026-02-16</text:p>
          </table:table-cell>
          <table:table-cell office:value-type="string" calcext:value-type="string">
            <text:p>Accepted</text:p>
          </table:table-cell>
          <table:table-cell office:value-type="string" calcext:value-type="string">
            <text:p>The sdata scripting language is a BASIC dialect with case-insensitive keywords, line continuation, operator-precedence expressions, and multiple distinct statement forms. Parser generators for Ada are rare and their maturity was uncertain.</text:p>
          </table:table-cell>
          <table:table-cell office:value-type="string" calcext:value-type="string">
            <text:p>Implement a hand-written recursive-descent parser (with Pratt-style operator-precedence climbing for expressions) in SData.Parser / SData.Lexer.</text:p>
          </table:table-cell>
          <table:table-cell office:value-type="string" calcext:value-type="string">
            <text:p>Complete control over grammar evolution, error messages, and special-case handling (e.g. SELECT disambiguation). The trade-off is more manual maintenance as the grammar grows, but the codebase is self-contained and the parser boundaries are well understood.</text:p>
          </table:table-cell>
        </table:table-row>
        <table:table-row table:style-name="ro1">
          <table:table-cell office:value-type="string" calcext:value-type="string">
            <text:p>ADR-003</text:p>
          </table:table-cell>
          <table:table-cell office:value-type="string" calcext:value-type="string">
            <text:p>Use a three-tier execution model (Declarative / Immediate / Deferred)</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SData's design requires a data step model where some commands configure upcoming execution (USE, BY, SELECT), some execute immediately (RUN, SORT, NAMES), and some execute once per record when RUN is reached (LET, PRINT, IF). A simple two-tier model would conflate the configuring and non-configuring immediate commands, making the RUN boundary ambiguous.</text:p>
          </table:table-cell>
          <table:table-cell office:value-type="string" calcext:value-type="string">
            <text:p>Implement three tiers explicitly: Declarative (configure state at parse time), Immediate (execute at once, non-configuring), and Deferred (queue until RUN triggers iteration over records). The Is_Immediate predicate in SData.Interpreter encodes tier membership.</text:p>
          </table:table-cell>
          <table:table-cell office:value-type="string" calcext:value-type="string">
            <text:p>The data step boundary (RUN) is unambiguous and the execution model mirrors the SAS/BASIC inspiration. Adding a new statement requires consciously placing it in a tier, which acts as a design review gate.</text:p>
          </table:table-cell>
        </table:table-row>
        <table:table-row table:style-name="ro1">
          <table:table-cell office:value-type="string" calcext:value-type="string">
            <text:p>ADR-004</text:p>
          </table:table-cell>
          <table:table-cell office:value-type="string" calcext:value-type="string">
            <text:p>Use SQLite as the spillover backing store for large tables</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In-memory data tables are bounded by available RAM. Datasets larger than Max_Table_Rows need to spill to disk. Ada has no standard in-process persistent store; implementing a custom binary format would be substantial effort.</text:p>
          </table:table-cell>
          <table:table-cell office:value-type="string" calcext:value-type="string">
            <text:p>Use SQLite (via Ada_Sqlite3 bindings) as a process-private temporary backing store. When the table exceeds Max_Table_Rows, rows are flushed to a SQLite temp file. SORT delegates to SQLite ORDER BY; reads are batched at segment granularity.</text:p>
          </table:table-cell>
          <table:table-cell office:value-type="string" calcext:value-type="string">
            <text:p>SQLite provides a correct, well-tested implementation of on-disk storage and ORDER BY for free. The trade-off is a ~1.5x overhead vs. in-memory (after the segment-prefetch optimization) and an external C library dependency. An early implementation had 101x overhead before the segment-prefetch and transaction-batch fixes.</text:p>
          </table:table-cell>
        </table:table-row>
        <table:table-row table:style-name="ro1">
          <table:table-cell office:value-type="string" calcext:value-type="string">
            <text:p>ADR-005</text:p>
          </table:table-cell>
          <table:table-cell office:value-type="string" calcext:value-type="string">
            <text:p>Apply SQLite performance pragmas and batch INSERT transactions for spillover</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SQLite backing store treated each row INSERT as its own transaction and used default durability settings (journal + fsync). This produced 101x slowdown vs. in-memory for a 100K-row workload because the SQLite temp file is process-private and discarded on exit — durability guarantees were both unnecessary and expensive.</text:p>
          </table:table-cell>
          <table:table-cell office:value-type="string" calcext:value-type="string">
            <text:p>Set PRAGMA synchronous=OFF, PRAGMA journal_mode=OFF, and PRAGMA temp_store=MEMORY on the temp database at open time, and wrap each segment spill in a single BEGIN/COMMIT transaction rather than one transaction per row.</text:p>
          </table:table-cell>
          <table:table-cell office:value-type="string" calcext:value-type="string">
            <text:p>Spillover overhead dropped from 101x to approximately 1.5x. The pragmas are safe because the file is never shared and is deleted on process exit or clean shutdown, so loss of durability has no correctness consequence.</text:p>
          </table:table-cell>
        </table:table-row>
        <table:table-row table:style-name="ro1">
          <table:table-cell office:value-type="string" calcext:value-type="string">
            <text:p>ADR-006</text:p>
          </table:table-cell>
          <table:table-cell office:value-type="string" calcext:value-type="string">
            <text:p>Maintain an explicit Output_Column_Order vector for NAMES / SAVE ordering</text:p>
          </table:table-cell>
          <table:table-cell office:value-type="date" office:date-value="2026-02-17" calcext:value-type="date">
            <text:p>2026-02-17</text:p>
          </table:table-cell>
          <table:table-cell office:value-type="string" calcext:value-type="string">
            <text:p>Accepted</text:p>
          </table:table-cell>
          <table:table-cell office:value-type="string" calcext:value-type="string">
            <text:p>SData.Table stores columns in an Ada.Containers.Indefinite_Maps hash map, which has non-deterministic iteration order. NAMES output and SAVE output must reflect the order in which columns were explicitly set (not hash order), and that order must survive RENAME operations.</text:p>
          </table:table-cell>
          <table:table-cell office:value-type="string" calcext:value-type="string">
            <text:p>Maintain a separate Column_Order vector (for input/current table) and Output_Column_Order vector (for the step's output table) alongside the hash map. All column operations keep both structures in sync. At step commit, Output_Column_Order replaces Column_Order.</text:p>
          </table:table-cell>
          <table:table-cell office:value-type="string" calcext:value-type="string">
            <text:p>NAMES and SAVE output is deterministic and user-visible ordering is preserved. Linear scans of the order vector for RENAME and DROP are O(columns), which is negligible at typical widths but would be a bottleneck for very wide tables.</text:p>
          </table:table-cell>
        </table:table-row>
        <table:table-row table:style-name="ro1">
          <table:table-cell office:value-type="string" calcext:value-type="string">
            <text:p>ADR-007</text:p>
          </table:table-cell>
          <table:table-cell office:value-type="string" calcext:value-type="string">
            <text:p>Use file-based diff as the primary test harness</text:p>
          </table:table-cell>
          <table:table-cell office:value-type="date" office:date-value="2026-02-20" calcext:value-type="date">
            <text:p>2026-02-20</text:p>
          </table:table-cell>
          <table:table-cell office:value-type="string" calcext:value-type="string">
            <text:p>Accepted</text:p>
          </table:table-cell>
          <table:table-cell office:value-type="string" calcext:value-type="string">
            <text:p>An interpreter needs behavioral tests that verify end-to-end output for given script inputs. Ada unit-test frameworks existed but would require wiring the interpreter through an Ada API; scripted diff-based tests validate the full pipeline including the CLI and output formatting.</text:p>
          </table:table-cell>
          <table:table-cell office:value-type="string" calcext:value-type="string">
            <text:p>Implement a make check harness that runs each tests/*.cmd script through ./bin/sdata, captures stdout, and diffs it against tests/expected/&lt;name&gt;.out. Any difference is a test failure.</text:p>
          </table:table-cell>
          <table:table-cell office:value-type="string" calcext:value-type="string">
            <text:p>Tests are easy to add (two files) and resilient to refactoring (they test behavior, not internals). Interactive features and pure unit-level logic are not directly testable this way; a separate csv_unit_test executable was later added for pure-function Ada unit tests.</text:p>
          </table:table-cell>
        </table:table-row>
        <table:table-row table:style-name="ro1">
          <table:table-cell office:value-type="string" calcext:value-type="string">
            <text:p>ADR-008</text:p>
          </table:table-cell>
          <table:table-cell office:value-type="string" calcext:value-type="string">
            <text:p>Use Alire for Ada dependency management</text:p>
          </table:table-cell>
          <table:table-cell office:value-type="date" office:date-value="2026-03-05" calcext:value-type="date">
            <text:p>2026-03-05</text:p>
          </table:table-cell>
          <table:table-cell office:value-type="string" calcext:value-type="string">
            <text:p>Accepted</text:p>
          </table:table-cell>
          <table:table-cell office:value-type="string" calcext:value-type="string">
            <text:p>The project depends on Zip-Ada, XML/Ada, MathPaqs, and Ada_Sqlite3. These libraries are not part of the GNAT standard distribution. A reproducible build mechanism was needed that could locate these libraries without hardcoding paths.</text:p>
          </table:table-cell>
          <table:table-cell office:value-type="string" calcext:value-type="string">
            <text:p>Use Alire (the Ada package manager) and declare all dependencies in alire.toml. alr build fetches and compiles all dependencies before calling gprbuild. CI uses setup-alire@v3 pinned to version 2.1.0 (which uses the stable-1.4.0 index where all required libraries are present).</text:p>
          </table:table-cell>
          <table:table-cell office:value-type="string" calcext:value-type="string">
            <text:p>Reproducible builds across machines. The version pin (2.1.0) was necessary because 2.0.1 used an older community index lacking Zip-Ada. Alire adds ~60s to cold CI builds for dependency fetch.</text:p>
          </table:table-cell>
        </table:table-row>
        <table:table-row table:style-name="ro1">
          <table:table-cell office:value-type="string" calcext:value-type="string">
            <text:p>ADR-009</text:p>
          </table:table-cell>
          <table:table-cell office:value-type="string" calcext:value-type="string">
            <text:p>Parse ODS and OOXML natively using XML/Ada rather than calling ssconvert or LibreOffice for reading</text:p>
          </table:table-cell>
          <table:table-cell office:value-type="date" office:date-value="2026-03-02" calcext:value-type="date">
            <text:p>2026-03-02</text:p>
          </table:table-cell>
          <table:table-cell office:value-type="string" calcext:value-type="string">
            <text:p>Accepted</text:p>
          </table:table-cell>
          <table:table-cell office:value-type="string" calcext:value-type="string">
            <text:p>The initial design considered three options for spreadsheet I/O: LibreOffice UNO API bindings (complex), calling external tools like ssconvert/LibreOffice headless (external dependency, subprocess overhead), or direct XML parsing of the ODS/OOXML ZIP containers.</text:p>
          </table:table-cell>
          <table:table-cell office:value-type="string" calcext:value-type="string">
            <text:p>Implement native ODS and OOXML readers using Zip-Ada (to unzip the container) and XML/Ada (to parse the inner XML). For formula evaluation only, fall back to calling soffice --headless as a subprocess. Cached cell values are read directly without any external tool when LibreOffice is absent.</text:p>
          </table:table-cell>
          <table:table-cell office:value-type="string" calcext:value-type="string">
            <text:p>Reading spreadsheets has no external tool dependency. Formula evaluation requires LibreOffice, but the fallback to cached values works correctly for files saved by any spreadsheet application after a full recalculation. ssconvert was considered as a lighter fallback but not implemented.</text:p>
          </table:table-cell>
        </table:table-row>
        <table:table-row table:style-name="ro1">
          <table:table-cell office:value-type="string" calcext:value-type="string">
            <text:p>ADR-010</text:p>
          </table:table-cell>
          <table:table-cell office:value-type="string" calcext:value-type="string">
            <text:p>Use GNAT.OS_Lib.Spawn for SYSTEM command execution</text:p>
          </table:table-cell>
          <table:table-cell office:value-type="date" office:date-value="2026-03-17" calcext:value-type="date">
            <text:p>2026-03-17</text:p>
          </table:table-cell>
          <table:table-cell office:value-type="string" calcext:value-type="string">
            <text:p>Accepted</text:p>
          </table:table-cell>
          <table:table-cell office:value-type="string" calcext:value-type="string">
            <text:p>The SYSTEM command allows scripts to invoke shell commands. Using system() from C or Ada's equivalent passes the command string to a shell, which introduces quoting and injection risks. GNAT provides Spawn which takes argv directly.</text:p>
          </table:table-cell>
          <table:table-cell office:value-type="string" calcext:value-type="string">
            <text:p>Implement SYSTEM via GNAT.OS_Lib.Spawn, passing the command as a single argument to /bin/sh -c (or bash/sh on Windows). The --noshell flag disables both SYSTEM and the SHELL() function entirely.</text:p>
          </table:table-cell>
          <table:table-cell office:value-type="string" calcext:value-type="string">
            <text:p>The attack surface is limited to the user's own script — the tool does not amplify injection. On Windows, the POSIX shell detection was later refined to prefer bash/sh on PATH over cmd.exe because SHELL environment variable paths are Unix-style and unresolvable by the Windows loader.</text:p>
          </table:table-cell>
        </table:table-row>
        <table:table-row table:style-name="ro1">
          <table:table-cell office:value-type="string" calcext:value-type="string">
            <text:p>ADR-011</text:p>
          </table:table-cell>
          <table:table-cell office:value-type="string" calcext:value-type="string">
            <text:p>Use LET for permanent variables and SET for temporary variables with strict cross-assignment enforcement</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The design spec distinguishes between permanent variables (table columns, persisted across records) and temporary variables (reset to missing at each record unless HOLDed). The original implementation did not enforce which keyword could assign which type. The Stage 2 audit found this gap.</text:p>
          </table:table-cell>
          <table:table-cell office:value-type="string" calcext:value-type="string">
            <text:p>Enforce strict rules: LET may not modify individual elements of a temporary array; SET may not modify elements of a permanent or virtual array. A guard using Has_Array is checked before the modification rules to avoid misleading errors for undefined arrays.</text:p>
          </table:table-cell>
          <table:table-cell office:value-type="string" calcext:value-type="string">
            <text:p>Scripts that incorrectly mix LET/SET semantics are caught at runtime with a clear error message. The enforcement required adding the Has_Array check after an early implementation produced misleading errors for undefined arrays.</text:p>
          </table:table-cell>
        </table:table-row>
        <table:table-row table:style-name="ro1">
          <table:table-cell office:value-type="string" calcext:value-type="string">
            <text:p>ADR-012</text:p>
          </table:table-cell>
          <table:table-cell office:value-type="string" calcext:value-type="string">
            <text:p>Add GitHub Actions CI workflow with Alire integration</text:p>
          </table:table-cell>
          <table:table-cell office:value-type="date" office:date-value="2026-04-10" calcext:value-type="date">
            <text:p>2026-04-10</text:p>
          </table:table-cell>
          <table:table-cell office:value-type="string" calcext:value-type="string">
            <text:p>Accepted</text:p>
          </table:table-cell>
          <table:table-cell office:value-type="string" calcext:value-type="string">
            <text:p>The project had no automated build and test verification. Regressions could only be caught by local make check runs. The project uses Alire, which means CI must set up the Alire environment before building.</text:p>
          </table:table-cell>
          <table:table-cell office:value-type="string" calcext:value-type="string">
            <text:p>Add .github/workflows/test.yml that uses setup-alire@v3 (pinned to version 2.1.0) to install Alire, runs alr build to compile, then alr exec -- make check to run the full test suite. A Verify binaries step was later added to guard against a missing csv_unit_test binary.</text:p>
          </table:table-cell>
          <table:table-cell office:value-type="string" calcext:value-type="string">
            <text:p>Every push to main and every pull request is automatically built and tested on ubuntu-latest. Multi-platform CI (macOS, Windows) was deferred; the project targets Linux as primary platform.</text:p>
          </table:table-cell>
        </table:table-row>
        <table:table-row table:style-name="ro1">
          <table:table-cell office:value-type="string" calcext:value-type="string">
            <text:p>ADR-013</text:p>
          </table:table-cell>
          <table:table-cell office:value-type="string" calcext:value-type="string">
            <text:p>Split SData.Config into static constants and SData.Config.Runtime for mutable run state</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SData.Config package mixed compile-time constants (default values, limits) with mutable run-state (current DIGITS setting, active flags). The codebase review identified this as a global-state substrate that made the interpreter non-re-entrant.</text:p>
          </table:table-cell>
          <table:table-cell office:value-type="string" calcext:value-type="string">
            <text:p>Extract mutable interpreter state into a child package SData.Config.Runtime. Static constants remain in SData.Config. This is explicitly scoped as a single-threaded CLI concern — full re-entrancy is not a goal for the current tool.</text:p>
          </table:table-cell>
          <table:table-cell office:value-type="string" calcext:value-type="string">
            <text:p>The split clarifies which values are invariant and which change during execution. Non-re-entrancy remains but is now consciously documented. The remedy for embedding the interpreter in a multi-threaded context in the future is well-understood.</text:p>
          </table:table-cell>
        </table:table-row>
        <table:table-row table:style-name="ro1">
          <table:table-cell office:value-type="string" calcext:value-type="string">
            <text:p>ADR-014</text:p>
          </table:table-cell>
          <table:table-cell office:value-type="string" calcext:value-type="string">
            <text:p>Pre-resolve variable names to column indices before the data step loop</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evaluator performed a hash-map lookup for every variable reference on every record during RUN. With a 100K-row dataset and a LET statement, this was ~30 us/row — the dominant cost. Column indices are stable within a single data step.</text:p>
          </table:table-cell>
          <table:table-cell office:value-type="string" calcext:value-type="string">
            <text:p>Before the data step loop begins, resolve all variable references in the deferred statement list to their column indices. Per-row evaluation uses the cached indices directly rather than re-hashing each name on every record.</text:p>
          </table:table-cell>
          <table:table-cell office:value-type="string" calcext:value-type="string">
            <text:p>Per-row overhead dropped from ~30 us to ~6 us (5x reduction). In-memory 100K-row workload improved from 3.0s to 1.9s user time. Spillover performance maintained at ~1.5x in-memory.</text:p>
          </table:table-cell>
        </table:table-row>
        <table:table-row table:style-name="ro1">
          <table:table-cell office:value-type="string" calcext:value-type="string">
            <text:p>ADR-015</text:p>
          </table:table-cell>
          <table:table-cell office:value-type="string" calcext:value-type="string">
            <text:p>Implement a segment-prefetch cache for SQLite spillover reads</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original spillover read path used a one-row cached-row cache: each miss triggered an individual SELECT WHERE record_id = N query. At 100K rows with ~10K spilled, this was ~10,000 round-trips to SQLite — responsible for 101x slowdown vs. in-memory.</text:p>
          </table:table-cell>
          <table:table-cell office:value-type="string" calcext:value-type="string">
            <text:p>Replace the one-row cache with a segment-level prefetch: when a row is not in the in-memory window, fetch the entire segment (size = Max_Table_Rows) in one SQL query. Row-level access within the segment is then in-memory.</text:p>
          </table:table-cell>
          <table:table-cell office:value-type="string" calcext:value-type="string">
            <text:p>Spillover penalty dropped from 101x to ~1.5x. The remaining gap is expected overhead from the segment loads and output spills for the benchmark workload.</text:p>
          </table:table-cell>
        </table:table-row>
        <table:table-row table:style-name="ro1">
          <table:table-cell office:value-type="string" calcext:value-type="string">
            <text:p>ADR-016</text:p>
          </table:table-cell>
          <table:table-cell office:value-type="string" calcext:value-type="string">
            <text:p>Rename LIST to DISPLAY for table viewing; LIST becomes program-buffer only</text:p>
          </table:table-cell>
          <table:table-cell office:value-type="date" office:date-value="2026-04-18" calcext:value-type="date">
            <text:p>2026-04-18</text:p>
          </table:table-cell>
          <table:table-cell office:value-type="string" calcext:value-type="string">
            <text:p>Accepted</text:p>
          </table:table-cell>
          <table:table-cell office:value-type="string" calcext:value-type="string">
            <text:p>The LIST command was being used for two purposes: showing the queued program buffer (BW BASIC convention) and showing the data table contents. When Phase 5 added program-buffer LIST, the dual use became ambiguous.</text:p>
          </table:table-cell>
          <table:table-cell office:value-type="string" calcext:value-type="string">
            <text:p>Introduce DISPLAY [varlist] as the dedicated command for viewing table data. LIST is reserved exclusively for showing the numbered program buffer entries (or an empty buffer notice). Alternatives considered: SHOW (vaguer), DUMP (sounds destructive), VIEW (implies read-only browsing).</text:p>
          </table:table-cell>
          <table:table-cell office:value-type="string" calcext:value-type="string">
            <text:p>All existing tests using LIST X were updated to DISPLAY X. The semantics are now unambiguous and consistent with the BW BASIC convention for LIST.</text:p>
          </table:table-cell>
        </table:table-row>
        <table:table-row table:style-name="ro1">
          <table:table-cell office:value-type="string" calcext:value-type="string">
            <text:p>ADR-017</text:p>
          </table:table-cell>
          <table:table-cell office:value-type="string" calcext:value-type="string">
            <text:p>Extract SData.CSV as a pure satellite package for CSV string helpers</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Parse_CSV in sdata-file_io.adb grew to 553 lines, containing six algorithmic string helpers (Try_Fast_Float, Is_Numeric_Field, At_Delimiter, CSV_Field_End, CSV_Unquote, Split_Indices) alongside orchestration logic. These pure helpers had no dependencies on table or file state but were impossible to unit test in isolation while nested inside Parse_CSV.</text:p>
          </table:table-cell>
          <table:table-cell office:value-type="string" calcext:value-type="string">
            <text:p>Extract the six pure helpers into a new SData.CSV package with no dependencies on any other SData package. Add a standalone csv_unit_test executable with 33 Ada unit tests covering all six functions. Helpers with legitimate closure dependencies on Parse_CSV local state remain nested.</text:p>
          </table:table-cell>
          <table:table-cell office:value-type="string" calcext:value-type="string">
            <text:p>Parse_CSV was reduced from 553 to ~377 lines and became a clean orchestrator. The 33 compiled Ada unit tests catch type errors and contract violations invisible to the file-diff harness. SData.CSV added as a zero-dependency satellite in the acyclic package graph.</text:p>
          </table:table-cell>
        </table:table-row>
        <table:table-row table:style-name="ro1">
          <table:table-cell office:value-type="string" calcext:value-type="string">
            <text:p>ADR-018</text:p>
          </table:table-cell>
          <table:table-cell office:value-type="string" calcext:value-type="string">
            <text:p>Add a CI Verify binaries step to guard against missing executables</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After csv_unit_test was added as a second binary (v0.6.6), a future change to sdata.gpr could accidentally remove it from the for Main use clause. The test harness would then fail with a cryptic binary-not-found error rather than a named CI step failure.</text:p>
          </table:table-cell>
          <table:table-cell office:value-type="string" calcext:value-type="string">
            <text:p>Add a test -x bin/sdata &amp;&amp; test -x bin/csv_unit_test check as a named Verify binaries step in the CI workflow, placed between Build and Run test suite.</text:p>
          </table:table-cell>
          <table:table-cell office:value-type="string" calcext:value-type="string">
            <text:p>Binary-absence failures are surfaced at build time with a clear step name rather than buried in test harness output. No structural changes to the workflow.</text:p>
          </table:table-cell>
        </table:table-row>
        <table:table-row table:style-name="ro1">
          <table:table-cell office:value-type="string" calcext:value-type="string">
            <text:p>ADR-019</text:p>
          </table:table-cell>
          <table:table-cell office:value-type="string" calcext:value-type="string">
            <text:p>Drop orphaned columns immediately on DIM resize rather than deferred garbage collection</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When a permanent array is re-DIM'd to a smaller range (e.g. DIM A(1:5) followed by DIM A(1:3)), table columns for out-of-range indices (A(4) and A(5)) were left in the table with a null stub and a comment suggesting a separate garbage collection step. The orphaned columns appeared in NAMES and SAVE output.</text:p>
          </table:table-cell>
          <table:table-cell office:value-type="string" calcext:value-type="string">
            <text:p>Call Drop_Column immediately for each out-of-range index in the Dim_Array resize loop, guarded by (I &lt; Start_Idx or else I &gt; End_Idx). No deferred GC mechanism is needed. Overlapping columns retain their data.</text:p>
          </table:table-cell>
          <table:table-cell office:value-type="string" calcext:value-type="string">
            <text:p>The behavior is correct and immediate: NAMES after a shrinking DIM shows only the new range. The Drop_Column API already existed (used by the interpreter's DROP statement), so no new API was required. Tests for all three resize scenarios (shrink, expand, shift) were added.</text:p>
          </table:table-cell>
        </table:table-row>
        <table:table-row table:style-name="ro1">
          <table:table-cell office:value-type="string" calcext:value-type="string">
            <text:p>ADR-020</text:p>
          </table:table-cell>
          <table:table-cell office:value-type="string" calcext:value-type="string">
            <text:p>Raise Incomplete_Statement on SELECT at EOF to fix interactive REPL SELECT CASE parsing</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parser uses SELECT &lt;expr&gt; for two forms: a row filter (declarative) and the SELECT CASE block (deferred control flow). In the interactive REPL, when SELECT &lt;expr&gt; arrived with no following CASE before EOF, the parser committed to the filter form and subsequent CASE lines then failed. In batch mode this worked because the full file was in the buffer.</text:p>
          </table:table-cell>
          <table:table-cell office:value-type="string" calcext:value-type="string">
            <text:p>When SELECT &lt;expr&gt; is followed only by newline+EOF in the input buffer, raise Incomplete_Statement so the REPL buffers the input and waits for more. When CASE lines are typed on subsequent lines, the full block is re-parsed correctly. Batch mode is unaffected.</text:p>
          </table:table-cell>
          <table:table-cell office:value-type="string" calcext:value-type="string">
            <text:p>SELECT CASE blocks work correctly in the interactive REPL. An explicit error message was also added for Incomplete_Statement in batch mode (which indicates a genuinely truncated file).</text:p>
          </table:table-cell>
        </table:table-row>
        <table:table-row table:style-name="ro1">
          <table:table-cell office:value-type="string" calcext:value-type="string">
            <text:p>ADR-021</text:p>
          </table:table-cell>
          <table:table-cell office:value-type="string" calcext:value-type="string">
            <text:p>Use Interfaces.Integer_64 rather than Long_Integer for overflow detection</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evaluator's overflow check for integer arithmetic widened operands to Long_Integer before range-checking. On 64-bit Linux GNAT, Long_Integer is 64 bits, making the check correct. On Windows MinGW GNAT, Long_Integer is 32 bits (LLP64 model), so the widened operands overflowed before the manual check ran, producing an internal constraint-error instead of the user-friendly overflow message.</text:p>
          </table:table-cell>
          <table:table-cell office:value-type="string" calcext:value-type="string">
            <text:p>Replace Long_Integer with Interfaces.Integer_64, which is guaranteed 64 bits on every platform. Use 'use type Interfaces.Integer_64' (not 'use Interfaces') to expose only the relational operators for that type without polluting the namespace.</text:p>
          </table:table-cell>
          <table:table-cell office:value-type="string" calcext:value-type="string">
            <text:p>Integer overflow detection is correct and portable across Linux and Windows GNAT. The namespace narrowing (use type) is cleaner than the full use Interfaces that was added initially and then corrected.</text:p>
          </table:table-cell>
        </table:table-row>
        <table:table-row table:style-name="ro1">
          <table:table-cell office:value-type="string" calcext:value-type="string">
            <text:p>ADR-022</text:p>
          </table:table-cell>
          <table:table-cell office:value-type="string" calcext:value-type="string">
            <text:p>Prefer bash/sh over cmd.exe for SYSTEM and SHELL on Windows</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On Windows, the SHELL environment variable is either absent or carries a Unix-style path (e.g. /usr/bin/bash) that the Windows loader cannot resolve. The previous detection trusted SHELL then COMSPEC then suffix-matched against CMD.EXE, causing commands to be dispatched through cmd.exe. Single quotes survived because cmd.exe does not process them, breaking the system_test golden output.</text:p>
          </table:table-cell>
          <table:table-cell office:value-type="string" calcext:value-type="string">
            <text:p>Detect Windows via GNAT.OS_Lib.Directory_Separator. On Windows, look up bash then sh on PATH (covering MSYS/MinGW installations). Only fall back to COMSPEC/cmd.exe when no POSIX shell is found on PATH.</text:p>
          </table:table-cell>
          <table:table-cell office:value-type="string" calcext:value-type="string">
            <text:p>MSYS/MinGW Windows builds get POSIX semantics for SYSTEM and SHELL, making test output consistent with Linux. Users without a POSIX shell on PATH still get cmd.exe as fallback.</text:p>
          </table:table-cell>
        </table:table-row>
        <table:table-row table:style-name="ro1">
          <table:table-cell office:value-type="string" calcext:value-type="string">
            <text:p>ADR-023</text:p>
          </table:table-cell>
          <table:table-cell office:value-type="string" calcext:value-type="string">
            <text:p>Use NAMES after RUN for array resize test verification rather than SAVE-based file comparison</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When writing tests for DIM array resize behavior, two verification approaches were available: (1) SAVE the table to a file and inspect the file contents, or (2) call NAMES after the resize and diff the column list in the terminal output. The SAVE approach would require a file comparison and clean-up step; the NAMES approach works entirely through the existing file-diff harness.</text:p>
          </table:table-cell>
          <table:table-cell office:value-type="string" calcext:value-type="string">
            <text:p>Use NAMES as the verification mechanism in array resize tests. For expand and shift scenarios where NAMES reflects Output_Column_Order (only explicitly SET columns), all elements of the new range are explicitly SET to make the full column set visible in the NAMES output.</text:p>
          </table:table-cell>
          <table:table-cell office:value-type="string" calcext:value-type="string">
            <text:p>Tests are simple two-file additions (.cmd + .out) with no auxiliary cleanup or file I/O. The requirement to SET all elements to make them visible in NAMES is documented as a test design note in the commit message. Note: NAMES-based tests do not directly verify Drop_Column was called; a SAVE-based test would close that gap if needed.</text:p>
          </table:table-cell>
        </table:table-row>
        <table:table-row table:style-name="ro1">
          <table:table-cell office:value-type="string" calcext:value-type="string">
            <text:p>ADR-024</text:p>
          </table:table-cell>
          <table:table-cell office:value-type="string" calcext:value-type="string">
            <text:p>Implement a data-driven HELP dispatcher rather than a large if-elsif chain</text:p>
          </table:table-cell>
          <table:table-cell office:value-type="date" office:date-value="2026-03-04" calcext:value-type="date">
            <text:p>2026-03-04</text:p>
          </table:table-cell>
          <table:table-cell office:value-type="string" calcext:value-type="string">
            <text:p>Accepted</text:p>
          </table:table-cell>
          <table:table-cell office:value-type="string" calcext:value-type="string">
            <text:p>The HELP command covers 100+ topics (commands and functions). Implementing lookup as a linear if-elsif chain would be 300+ lines, brittle to add to, and untestable by path. A table-driven approach allows the dispatch to be data rather than code.</text:p>
          </table:table-cell>
          <table:table-cell office:value-type="string" calcext:value-type="string">
            <text:p>Implement Print_Help in SData.Help as a hash-map lookup over a Help_Table array of (Key, Handler, In_Cmd, In_Func) records. Four code paths: bare HELP (index), HELP /ALL (full reference), known topic (call handler), unknown topic (error). Aliases share a handler. Case normalization via To_Upper before lookup.</text:p>
          </table:table-cell>
          <table:table-cell office:value-type="string" calcext:value-type="string">
            <text:p>Adding a new HELP topic requires only a new record in Help_Table and a handler procedure — no control flow changes. The 8 HELP dispatcher tests cover all four code paths including case-insensitive lookup and alias dispatch.</text:p>
          </table:table-cell>
        </table:table-row>
        <table:table-row table:style-name="ro1">
          <table:table-cell office:value-type="string" calcext:value-type="string">
            <text:p>ADR-025</text:p>
          </table:table-cell>
          <table:table-cell office:value-type="string" calcext:value-type="string">
            <text:p>Install signal handlers for SIGTERM/SIGINT to clean up SQLite temp files</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SQLite backing store writes a temp file in /tmp for spilled tables. On normal exit, Finalize is called and the file is deleted. But if the process receives SIGTERM or Ctrl-C (SIGINT) during a spillover run, the temp file is orphaned.</text:p>
          </table:table-cell>
          <table:table-cell office:value-type="string" calcext:value-type="string">
            <text:p>Implement SData.Signals with two handlers: SIGTERM via pragma Attach_Handler on a protected procedure (Ada interrupts mechanism), and SIGINT via GNAT.Ctrl_C.Install_Handler at package elaboration. SData.Table calls Register_Cleanup_Path when the backing store activates and Clear_Cleanup_Path in Finalize.</text:p>
          </table:table-cell>
          <table:table-cell office:value-type="string" calcext:value-type="string">
            <text:p>Temp files are cleaned up on SIGTERM and Ctrl-C, not just on normal exit. The Ada_Sqlite3.Database finalization remains deferred (a known upstream library issue prevents calling Free in Finalize without a double-finalization crash), but the file handle is closed by the OS and the path is unlinked by the signal handler.</text:p>
          </table:table-cell>
        </table:table-row>
        <table:table-row table:style-name="ro1">
          <table:table-cell office:value-type="string" calcext:value-type="string">
            <text:p>ADR-026</text:p>
          </table:table-cell>
          <table:table-cell office:value-type="string" calcext:value-type="string">
            <text:p>Call LibreOffice subprocess for formula evaluation; fall back to cached values</text:p>
          </table:table-cell>
          <table:table-cell office:value-type="date" office:date-value="2026-03-02" calcext:value-type="date">
            <text:p>2026-03-02</text:p>
          </table:table-cell>
          <table:table-cell office:value-type="string" calcext:value-type="string">
            <text:p>Accepted</text:p>
          </table:table-cell>
          <table:table-cell office:value-type="string" calcext:value-type="string">
            <text:p>SData reads ODS and OOXML files natively. Cells with formulas store both the formula expression and the last cached result. Evaluating formulas in Ada would require implementing a two-pass loader, an OpenFormula parser, a cell-dependency resolver, and an expression evaluator for two different formula dialects — estimated at multiple focused development sessions.</text:p>
          </table:table-cell>
          <table:table-cell office:value-type="string" calcext:value-type="string">
            <text:p>For formula cells, call soffice --headless --convert-to as a subprocess to produce a fresh conversion with recalculated values, then read the converted file. When LibreOffice is absent, fall back to the cached result values stored in the file by the saving application.</text:p>
          </table:table-cell>
          <table:table-cell office:value-type="string" calcext:value-type="string">
            <text:p>The common case (files saved after a full recalculation) works correctly without LibreOffice. Volatile formulas (=TODAY(), =RAND()) may produce stale values when LibreOffice is absent. The architecture is documented so a native evaluator can be added later without structural changes.</text:p>
          </table:table-cell>
        </table:table-row>
        <table:table-row table:style-name="ro1">
          <table:table-cell office:value-type="string" calcext:value-type="string">
            <text:p>ADR-027</text:p>
          </table:table-cell>
          <table:table-cell office:value-type="string" calcext:value-type="string">
            <text:p>Adopt RPM-first packaging with a bump-version script covering all tracked locations</text:p>
          </table:table-cell>
          <table:table-cell office:value-type="date" office:date-value="2026-03-05" calcext:value-type="date">
            <text:p>2026-03-05</text:p>
          </table:table-cell>
          <table:table-cell office:value-type="string" calcext:value-type="string">
            <text:p>Accepted</text:p>
          </table:table-cell>
          <table:table-cell office:value-type="string" calcext:value-type="string">
            <text:p>sdata targets Linux as its primary platform. A packaged binary distribution is needed for installation without requiring users to build from source. Version strings appear in nine files across the repo and were frequently desynchronized (wrong day-of-week in changelog, incorrect version in secondary files).</text:p>
          </table:table-cell>
          <table:table-cell office:value-type="string" calcext:value-type="string">
            <text:p>Implement a sdata.spec file for RPM builds (primary), with debian/changelog and sdata.SlackBuild for Debian and Slackware. A scripts/bump-version.sh script updates all version strings atomically across the nine tracked locations.</text:p>
          </table:table-cell>
          <table:table-cell office:value-type="string" calcext:value-type="string">
            <text:p>Three packaging formats are maintained in parallel. The version bump script prevents the frequent desynchronization errors seen before it was added. Tags were not added for v0.6.1-v0.6.6 and were retroactively applied in v0.6.7.</text:p>
          </table:table-cell>
        </table:table-row>
        <table:table-row table:style-name="ro1">
          <table:table-cell office:value-type="string" calcext:value-type="string">
            <text:p>ADR-028</text:p>
          </table:table-cell>
          <table:table-cell office:value-type="string" calcext:value-type="string">
            <text:p>Use SELECT /ALL and bare BY for state cancellation rather than new keywords</text:p>
          </table:table-cell>
          <table:table-cell office:value-type="date" office:date-value="2026-04-10" calcext:value-type="date">
            <text:p>2026-04-10</text:p>
          </table:table-cell>
          <table:table-cell office:value-type="string" calcext:value-type="string">
            <text:p>Accepted</text:p>
          </table:table-cell>
          <table:table-cell office:value-type="string" calcext:value-type="string">
            <text:p>The SELECT declarative command (row filter) and BY grouping state both needed cancellation forms. Options for each included new keywords (SELECT OFF, CLEAR SELECT, CLEAR BY) or reusing existing syntax.</text:p>
          </table:table-cell>
          <table:table-cell office:value-type="string" calcext:value-type="string">
            <text:p>Use SELECT /ALL to cancel the active row filter (already parsed as a distinct branch), and bare BY (no arguments) to cancel BY grouping. NEW was also verified to clear both Select_Filter_Expr and Current_By_Vars.</text:p>
          </table:table-cell>
          <table:table-cell office:value-type="string" calcext:value-type="string">
            <text:p>The command set is minimal and internally consistent. SELECT /ALL and bare BY are self-documenting without adding new reserved words. The symmetry with SELECT &lt;expr&gt; / BY var1 var2 makes the intent clear.</text:p>
          </table:table-cell>
        </table:table-row>
        <table:table-row table:style-name="ro1">
          <table:table-cell office:value-type="string" calcext:value-type="string">
            <text:p>ADR-029</text:p>
          </table:table-cell>
          <table:table-cell office:value-type="string" calcext:value-type="string">
            <text:p>Implement BREAK / BREAK WHEN as deferred debug statements with a mini-REPL</text:p>
          </table:table-cell>
          <table:table-cell office:value-type="date" office:date-value="2026-04-30" calcext:value-type="date">
            <text:p>2026-04-30</text:p>
          </table:table-cell>
          <table:table-cell office:value-type="string" calcext:value-type="string">
            <text:p>Accepted</text:p>
          </table:table-cell>
          <table:table-cell office:value-type="string" calcext:value-type="string">
            <text:p>The --debug flag was defined in SData.Config but consulted nowhere in the interpreter — it was silently inert. Users had no way to inspect the PDV mid-step or pause execution at a specific record condition without adding PRINT statements.</text:p>
          </table:table-cell>
          <table:table-cell office:value-type="string" calcext:value-type="string">
            <text:p>Implement a two-part debug system: (1) passive trace via --debug emits [debug] lines to stderr for LET/SET, IF, SELECT, DELETE, BY group changes, USE, and RUN events; (2) interactive inspection via BREAK and BREAK WHEN &lt;expr&gt; deferred statements that pause execution and enter a mini-REPL. In non-interactive (piped/batch) context, BREAK continues automatically.</text:p>
          </table:table-cell>
          <table:table-cell office:value-type="string" calcext:value-type="string">
            <text:p>The --debug flag is now genuinely useful. Inspect_PDV is ~150 additional lines all confined to sdata-interpreter.adb. Three new tests cover the passive trace and non-interactive BREAK behavior; interactive REPL navigation is covered by manual testing only.</text:p>
          </table:table-cell>
        </table:table-row>
        <table:table-row table:style-name="ro1">
          <table:table-cell office:value-type="string" calcext:value-type="string">
            <text:p>ADR-030</text:p>
          </table:table-cell>
          <table:table-cell office:value-type="string" calcext:value-type="string">
            <text:p>Use relative paths in options_test for cross-platform portability</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options_test script hardcoded /tmp/ paths for output files. On native Windows GNAT builds, /tmp resolves to C:\\tmp, which typically does not exist, breaking the test. The stray output files were also landing in the project root and not being cleaned up.</text:p>
          </table:table-cell>
          <table:table-cell office:value-type="string" calcext:value-type="string">
            <text:p>Use plain relative filenames in options_test (no path prefix) so the files land in the working directory (make check runs from the project root). Add the two filenames to the clean target in the Makefile.</text:p>
          </table:table-cell>
          <table:table-cell office:value-type="string" calcext:value-type="string">
            <text:p>The test passes identically on Linux and Windows. The clean target now removes all test artifac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Robot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1" meta:cell-count="217" meta:object-count="0"/>
    <meta:generator>LibreOffice/26.2.2.2$Linux_X86_64 LibreOffice_project/620$Build-2</meta:generator>
  </office:meta>
</office:document-meta>
</file>