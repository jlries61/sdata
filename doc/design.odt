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Commands" style:family="table">
      <style:table-properties style:width="6.5in" table:align="margins" style:may-break-between-rows="true" table:border-model="collapsing"/>
    </style:style>
    <style:style style:name="Commands.A" style:family="table-column">
      <style:table-column-properties style:column-width="1.625in" style:rel-column-width="16383*"/>
    </style:style>
    <style:style style:name="Commands.C" style:family="table-column">
      <style:table-column-properties style:column-width="1.6243in" style:rel-column-width="16376*"/>
    </style:style>
    <style:style style:name="Commands.D" style:family="table-column">
      <style:table-column-properties style:column-width="1.6257in" style:rel-column-width="16393*"/>
    </style:style>
    <style:style style:name="Commands.1" style:family="table-row">
      <style:table-row-properties fo:keep-together="auto"/>
    </style:style>
    <style:style style:name="Comman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ommands.D1" style:family="table-cell">
      <style:table-cell-properties fo:background-color="transparent" fo:padding="0.0382in" fo:border="0.5pt solid #000000" style:writing-mode="page">
        <style:background-image/>
      </style:table-cell-properties>
    </style:style>
    <style:style style:name="Commands.2" style:family="table-row">
      <style:table-row-properties fo:keep-together="always"/>
    </style:style>
    <style:style style:name="Comman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mman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ommands.30" style:family="table-row">
      <style:table-row-properties style:min-row-height="0.8326in" fo:keep-together="always"/>
    </style:style>
    <style:style style:name="Commands.32" style:family="table-row">
      <style:table-row-properties style:min-row-height="0.8326in" fo:keep-together="auto"/>
    </style:style>
    <style:style style:name="Commands.37" style:family="table-row">
      <style:table-row-properties style:min-row-height="7.7146in" fo:keep-together="always"/>
    </style:style>
    <style:style style:name="Functions" style:family="table">
      <style:table-properties style:width="6.4424in" fo:margin-left="0.0632in" table:align="left" style:may-break-between-rows="true" table:border-model="collapsing"/>
    </style:style>
    <style:style style:name="Functions.A" style:family="table-column">
      <style:table-column-properties style:column-width="1.5576in"/>
    </style:style>
    <style:style style:name="Functions.B" style:family="table-column">
      <style:table-column-properties style:column-width="1.7368in"/>
    </style:style>
    <style:style style:name="Functions.C" style:family="table-column">
      <style:table-column-properties style:column-width="1.516in"/>
    </style:style>
    <style:style style:name="Functions.D" style:family="table-column">
      <style:table-column-properties style:column-width="1.6319in"/>
    </style:style>
    <style:style style:name="Functions.1" style:family="table-row">
      <style:table-row-properties fo:keep-together="auto"/>
    </style:style>
    <style:style style:name="Function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unctions.D1" style:family="table-cell">
      <style:table-cell-properties fo:background-color="transparent" fo:padding="0.0382in" fo:border="0.5pt solid #000000" style:writing-mode="page">
        <style:background-image/>
      </style:table-cell-properties>
    </style:style>
    <style:style style:name="Function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unction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unctions.6" style:family="table-row">
      <style:table-row-properties style:min-row-height="0.2444in" fo:keep-together="auto"/>
    </style:style>
    <style:style style:name="Functions.108" style:family="table-row">
      <style:table-row-properties style:min-row-height="0.2382in" fo:keep-together="auto"/>
    </style:style>
    <style:style style:name="P1" style:family="paragraph" style:parent-style-name="Text_20_body">
      <style:text-properties fo:font-weight="bold" officeooo:paragraph-rsid="00475ef2" style:font-weight-asian="bold" style:font-weight-complex="bold"/>
    </style:style>
    <style:style style:name="P2" style:family="paragraph" style:parent-style-name="Text_20_body" style:list-style-name="List_20_1">
      <style:text-properties officeooo:paragraph-rsid="00475ef2"/>
    </style:style>
    <style:style style:name="P3" style:family="paragraph" style:parent-style-name="Text_20_body" style:list-style-name="List_20_1">
      <style:text-properties officeooo:paragraph-rsid="0048cee8"/>
    </style:style>
    <style:style style:name="P4" style:family="paragraph" style:parent-style-name="Text_20_body">
      <style:text-properties fo:font-weight="bold" officeooo:paragraph-rsid="00495f4a" style:font-weight-asian="bold" style:font-weight-complex="bold"/>
    </style:style>
    <style:style style:name="P5" style:family="paragraph" style:parent-style-name="Text_20_body" style:list-style-name="List_20_1">
      <style:text-properties officeooo:paragraph-rsid="00495f4a"/>
    </style:style>
    <style:style style:name="P6" style:family="paragraph" style:parent-style-name="First_20_paragraph">
      <style:text-properties officeooo:paragraph-rsid="00495f4a"/>
    </style:style>
    <style:style style:name="P7" style:family="paragraph" style:parent-style-name="First_20_paragraph" style:list-style-name="List_20_1">
      <style:text-properties officeooo:paragraph-rsid="00495f4a"/>
    </style:style>
    <style:style style:name="P8" style:family="paragraph" style:parent-style-name="First_20_paragraph" style:list-style-name="List_20_1">
      <style:text-properties officeooo:paragraph-rsid="0049da24"/>
    </style:style>
    <style:style style:name="P9" style:family="paragraph" style:parent-style-name="First_20_paragraph">
      <style:text-properties fo:font-weight="bold" officeooo:paragraph-rsid="004ada6d" style:font-weight-asian="bold" style:font-weight-complex="bold"/>
    </style:style>
    <style:style style:name="P10" style:family="paragraph" style:parent-style-name="First_20_paragraph" style:list-style-name="List_20_1">
      <style:text-properties officeooo:paragraph-rsid="004ada6d"/>
    </style:style>
    <style:style style:name="P11" style:family="paragraph" style:parent-style-name="First_20_paragraph">
      <style:text-properties fo:font-weight="bold" officeooo:paragraph-rsid="004b9d45" style:font-weight-asian="bold" style:font-weight-complex="bold"/>
    </style:style>
    <style:style style:name="P12" style:family="paragraph" style:parent-style-name="First_20_paragraph" style:list-style-name="List_20_1">
      <style:text-properties officeooo:paragraph-rsid="004b9d45"/>
    </style:style>
    <style:style style:name="P13" style:family="paragraph" style:parent-style-name="Text_20_body">
      <style:text-properties fo:font-weight="bold" officeooo:paragraph-rsid="004cae86" style:font-weight-asian="bold" style:font-weight-complex="bold"/>
    </style:style>
    <style:style style:name="P14" style:family="paragraph" style:parent-style-name="Text_20_body" style:list-style-name="List_20_1">
      <style:text-properties officeooo:paragraph-rsid="004cae8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paragraph-properties fo:margin-top="0in" fo:margin-bottom="0in" style:contextual-spacing="false"/>
    </style:style>
    <style:style style:name="P17" style:family="paragraph" style:parent-style-name="First_20_paragraph">
      <style:text-properties fo:font-weight="bold" officeooo:paragraph-rsid="004d266e" style:font-weight-asian="bold" style:font-weight-complex="bold"/>
    </style:style>
    <style:style style:name="P18" style:family="paragraph" style:parent-style-name="First_20_paragraph" style:list-style-name="List_20_1">
      <style:text-properties officeooo:paragraph-rsid="004d266e"/>
    </style:style>
    <style:style style:name="P19" style:family="paragraph" style:parent-style-name="Text_20_body">
      <style:text-properties fo:font-weight="bold" officeooo:paragraph-rsid="004e34b8" style:font-weight-asian="bold" style:font-weight-complex="bold"/>
    </style:style>
    <style:style style:name="P20" style:family="paragraph" style:parent-style-name="Text_20_body" style:list-style-name="List_20_1">
      <style:text-properties officeooo:paragraph-rsid="004e34b8"/>
    </style:style>
    <style:style style:name="P21" style:family="paragraph" style:parent-style-name="Text_20_body" style:list-style-name="L3">
      <style:paragraph-properties fo:margin-top="0in" fo:margin-bottom="0in" style:contextual-spacing="false"/>
    </style:style>
    <style:style style:name="P22" style:family="paragraph" style:parent-style-name="Text_20_body" style:list-style-name="L4">
      <style:paragraph-properties fo:margin-top="0in" fo:margin-bottom="0in" style:contextual-spacing="false"/>
    </style:style>
    <style:style style:name="P23" style:family="paragraph" style:parent-style-name="Text_20_body" style:list-style-name="L5">
      <style:paragraph-properties fo:margin-top="0in" fo:margin-bottom="0in" style:contextual-spacing="false"/>
    </style:style>
    <style:style style:name="P24" style:family="paragraph" style:parent-style-name="First_20_paragraph">
      <style:text-properties fo:font-weight="bold" officeooo:paragraph-rsid="004f3dca" style:font-weight-asian="bold" style:font-weight-complex="bold"/>
    </style:style>
    <style:style style:name="P25" style:family="paragraph" style:parent-style-name="First_20_paragraph" style:list-style-name="List_20_1">
      <style:text-properties officeooo:paragraph-rsid="004f3dca"/>
    </style:style>
    <style:style style:name="P26" style:family="paragraph" style:parent-style-name="Text_20_body">
      <style:text-properties fo:font-weight="bold" officeooo:paragraph-rsid="0050062c" style:font-weight-asian="bold" style:font-weight-complex="bold"/>
    </style:style>
    <style:style style:name="P27" style:family="paragraph" style:parent-style-name="Text_20_body" style:list-style-name="List_20_1">
      <style:text-properties officeooo:paragraph-rsid="0050062c"/>
    </style:style>
    <style:style style:name="P28" style:family="paragraph" style:parent-style-name="Text_20_body">
      <style:text-properties fo:font-weight="bold" officeooo:paragraph-rsid="0051e25d" style:font-weight-asian="bold" style:font-weight-complex="bold"/>
    </style:style>
    <style:style style:name="P29" style:family="paragraph" style:parent-style-name="First_20_paragraph">
      <style:text-properties officeooo:paragraph-rsid="000e7de6"/>
    </style:style>
    <style:style style:name="P30" style:family="paragraph" style:parent-style-name="First_20_paragraph" style:list-style-name="List_20_1">
      <style:text-properties officeooo:paragraph-rsid="0014bd90"/>
    </style:style>
    <style:style style:name="P31" style:family="paragraph" style:parent-style-name="First_20_paragraph" style:list-style-name="List_20_1">
      <style:text-properties officeooo:paragraph-rsid="00102a61"/>
    </style:style>
    <style:style style:name="P32" style:family="paragraph" style:parent-style-name="First_20_paragraph" style:list-style-name="List_20_1">
      <style:text-properties fo:font-weight="bold" officeooo:paragraph-rsid="0014bd90" style:font-weight-asian="bold" style:font-weight-complex="bold"/>
    </style:style>
    <style:style style:name="P33" style:family="paragraph" style:parent-style-name="First_20_paragraph">
      <style:text-properties fo:font-weight="bold" officeooo:paragraph-rsid="00168262" style:font-weight-asian="bold" style:font-weight-complex="bold"/>
    </style:style>
    <style:style style:name="P34" style:family="paragraph" style:parent-style-name="First_20_paragraph" style:list-style-name="List_20_1">
      <style:text-properties officeooo:paragraph-rsid="00168262"/>
    </style:style>
    <style:style style:name="P35" style:family="paragraph" style:parent-style-name="First_20_paragraph">
      <style:text-properties officeooo:paragraph-rsid="0013572b"/>
    </style:style>
    <style:style style:name="P36" style:family="paragraph" style:parent-style-name="First_20_paragraph" style:list-style-name="List_20_1">
      <style:text-properties fo:font-weight="bold" officeooo:paragraph-rsid="0017d7fe" style:font-weight-asian="bold" style:font-weight-complex="bold"/>
    </style:style>
    <style:style style:name="P37" style:family="paragraph" style:parent-style-name="First_20_paragraph" style:list-style-name="List_20_1">
      <style:text-properties officeooo:paragraph-rsid="0017d7fe"/>
    </style:style>
    <style:style style:name="P38" style:family="paragraph" style:parent-style-name="First_20_paragraph" style:list-style-name="List_20_1">
      <style:text-properties officeooo:paragraph-rsid="0013572b"/>
    </style:style>
    <style:style style:name="P39" style:family="paragraph" style:parent-style-name="Text_20_body" style:list-style-name="L6">
      <style:paragraph-properties fo:margin-top="0in" fo:margin-bottom="0in" style:contextual-spacing="false"/>
    </style:style>
    <style:style style:name="P40" style:family="paragraph" style:parent-style-name="Text_20_body" style:list-style-name="L7">
      <style:paragraph-properties fo:margin-top="0in" fo:margin-bottom="0in" style:contextual-spacing="false"/>
    </style:style>
    <style:style style:name="P41" style:family="paragraph" style:parent-style-name="First_20_paragraph">
      <style:text-properties officeooo:paragraph-rsid="0018907e"/>
    </style:style>
    <style:style style:name="P42" style:family="paragraph" style:parent-style-name="First_20_paragraph" style:list-style-name="List_20_1">
      <style:text-properties officeooo:paragraph-rsid="0018907e"/>
    </style:style>
    <style:style style:name="P43" style:family="paragraph" style:parent-style-name="Text_20_body" style:list-style-name="List_20_1">
      <style:text-properties fo:font-weight="bold" officeooo:paragraph-rsid="00199e41" style:font-weight-asian="bold" style:font-weight-complex="bold"/>
    </style:style>
    <style:style style:name="P44" style:family="paragraph" style:parent-style-name="Text_20_body" style:list-style-name="List_20_1">
      <style:text-properties officeooo:paragraph-rsid="00199e41"/>
    </style:style>
    <style:style style:name="P45" style:family="paragraph" style:parent-style-name="Text_20_body">
      <style:text-properties fo:font-weight="bold" officeooo:paragraph-rsid="001acf07" style:font-weight-asian="bold" style:font-weight-complex="bold"/>
    </style:style>
    <style:style style:name="P46" style:family="paragraph" style:parent-style-name="Text_20_body" style:list-style-name="List_20_1">
      <style:text-properties officeooo:paragraph-rsid="001acf07"/>
    </style:style>
    <style:style style:name="P47" style:family="paragraph" style:parent-style-name="Text_20_body">
      <style:text-properties fo:font-weight="bold" officeooo:paragraph-rsid="001b55c3" style:font-weight-asian="bold" style:font-weight-complex="bold"/>
    </style:style>
    <style:style style:name="P48" style:family="paragraph" style:parent-style-name="Text_20_body" style:list-style-name="List_20_1">
      <style:text-properties officeooo:paragraph-rsid="001b55c3"/>
    </style:style>
    <style:style style:name="P49" style:family="paragraph" style:parent-style-name="First_20_paragraph" style:list-style-name="List_20_1">
      <style:text-properties fo:font-weight="bold" officeooo:paragraph-rsid="001beb88" style:font-weight-asian="bold" style:font-weight-complex="bold"/>
    </style:style>
    <style:style style:name="P50" style:family="paragraph" style:parent-style-name="First_20_paragraph" style:list-style-name="List_20_1">
      <style:text-properties officeooo:paragraph-rsid="001beb88"/>
    </style:style>
    <style:style style:name="P51" style:family="paragraph" style:parent-style-name="Text_20_body" style:list-style-name="List_20_1">
      <style:text-properties fo:font-weight="bold" officeooo:paragraph-rsid="001beb88" style:font-weight-asian="bold" style:font-weight-complex="bold"/>
    </style:style>
    <style:style style:name="P52" style:family="paragraph" style:parent-style-name="Text_20_body" style:list-style-name="List_20_1">
      <style:text-properties officeooo:paragraph-rsid="001beb88"/>
    </style:style>
    <style:style style:name="P53" style:family="paragraph" style:parent-style-name="Heading_20_4" style:list-style-name=""/>
    <style:style style:name="P54" style:family="paragraph" style:parent-style-name="First_20_paragraph" style:list-style-name="List_20_1">
      <style:text-properties fo:font-weight="bold" officeooo:paragraph-rsid="001cba46" style:font-weight-asian="bold" style:font-weight-complex="bold"/>
    </style:style>
    <style:style style:name="P55" style:family="paragraph" style:parent-style-name="First_20_paragraph" style:list-style-name="List_20_1">
      <style:text-properties officeooo:paragraph-rsid="001cba46"/>
    </style:style>
    <style:style style:name="P56" style:family="paragraph" style:parent-style-name="Text_20_body" style:list-style-name="List_20_1">
      <style:text-properties fo:font-weight="bold" officeooo:paragraph-rsid="001e9bcf" style:font-weight-asian="bold" style:font-weight-complex="bold"/>
    </style:style>
    <style:style style:name="P57" style:family="paragraph" style:parent-style-name="Text_20_body" style:list-style-name="List_20_1">
      <style:text-properties officeooo:paragraph-rsid="001e9bcf"/>
    </style:style>
    <style:style style:name="P58" style:family="paragraph" style:parent-style-name="Text_20_body" style:list-style-name="List_20_1">
      <style:text-properties fo:font-weight="bold" officeooo:paragraph-rsid="001ee322" style:font-weight-asian="bold" style:font-weight-complex="bold"/>
    </style:style>
    <style:style style:name="P59" style:family="paragraph" style:parent-style-name="Text_20_body" style:list-style-name="List_20_1">
      <style:text-properties officeooo:paragraph-rsid="001ee322"/>
    </style:style>
    <style:style style:name="P60" style:family="paragraph" style:parent-style-name="Text_20_body" style:list-style-name="List_20_1">
      <style:text-properties fo:font-weight="bold" officeooo:paragraph-rsid="001f4676" style:font-weight-asian="bold" style:font-weight-complex="bold"/>
    </style:style>
    <style:style style:name="P61" style:family="paragraph" style:parent-style-name="Text_20_body" style:list-style-name="List_20_1">
      <style:text-properties officeooo:paragraph-rsid="001f4676"/>
    </style:style>
    <style:style style:name="P62" style:family="paragraph" style:parent-style-name="Text_20_body" style:list-style-name="List_20_1">
      <style:text-properties fo:font-weight="bold" officeooo:paragraph-rsid="001f683a" style:font-weight-asian="bold" style:font-weight-complex="bold"/>
    </style:style>
    <style:style style:name="P63" style:family="paragraph" style:parent-style-name="Text_20_body" style:list-style-name="List_20_1">
      <style:text-properties officeooo:paragraph-rsid="001f683a"/>
    </style:style>
    <style:style style:name="P64" style:family="paragraph" style:parent-style-name="Text_20_body" style:list-style-name="List_20_1">
      <style:text-properties officeooo:paragraph-rsid="00203667"/>
    </style:style>
    <style:style style:name="P65" style:family="paragraph" style:parent-style-name="First_20_paragraph" style:list-style-name="List_20_1">
      <style:text-properties fo:font-weight="bold" officeooo:paragraph-rsid="00203667" style:font-weight-asian="bold" style:font-weight-complex="bold"/>
    </style:style>
    <style:style style:name="P66" style:family="paragraph" style:parent-style-name="First_20_paragraph" style:list-style-name="List_20_1">
      <style:text-properties fo:font-weight="normal" officeooo:paragraph-rsid="00203667" style:font-weight-asian="normal" style:font-weight-complex="normal"/>
    </style:style>
    <style:style style:name="P67" style:family="paragraph" style:parent-style-name="Text_20_body" style:list-style-name="List_20_1">
      <style:text-properties fo:font-weight="bold" officeooo:paragraph-rsid="00204e0c" style:font-weight-asian="bold" style:font-weight-complex="bold"/>
    </style:style>
    <style:style style:name="P68" style:family="paragraph" style:parent-style-name="Text_20_body" style:list-style-name="List_20_1">
      <style:text-properties officeooo:paragraph-rsid="00204e0c"/>
    </style:style>
    <style:style style:name="P69" style:family="paragraph" style:parent-style-name="Text_20_body" style:list-style-name="List_20_1">
      <style:text-properties fo:font-weight="bold" officeooo:paragraph-rsid="00225f50" style:font-weight-asian="bold" style:font-weight-complex="bold"/>
    </style:style>
    <style:style style:name="P70" style:family="paragraph" style:parent-style-name="Text_20_body" style:list-style-name="List_20_1">
      <style:text-properties officeooo:paragraph-rsid="00225f50"/>
    </style:style>
    <style:style style:name="P71" style:family="paragraph" style:parent-style-name="Text_20_body" style:list-style-name="List_20_1">
      <style:text-properties fo:font-weight="bold" officeooo:paragraph-rsid="0022ea47" style:font-weight-asian="bold" style:font-weight-complex="bold"/>
    </style:style>
    <style:style style:name="P72" style:family="paragraph" style:parent-style-name="Text_20_body" style:list-style-name="List_20_1">
      <style:text-properties officeooo:paragraph-rsid="0022ea47"/>
    </style:style>
    <style:style style:name="P73" style:family="paragraph" style:parent-style-name="Text_20_body" style:list-style-name="List_20_1">
      <style:text-properties fo:font-weight="bold" officeooo:paragraph-rsid="0025ef75" style:font-weight-asian="bold" style:font-weight-complex="bold"/>
    </style:style>
    <style:style style:name="P74" style:family="paragraph" style:parent-style-name="Text_20_body" style:list-style-name="List_20_1">
      <style:text-properties officeooo:paragraph-rsid="0025ef75"/>
    </style:style>
    <style:style style:name="P75" style:family="paragraph" style:parent-style-name="Text_20_body" style:list-style-name="List_20_1">
      <style:text-properties fo:font-weight="bold" officeooo:paragraph-rsid="00273c2a" style:font-weight-asian="bold" style:font-weight-complex="bold"/>
    </style:style>
    <style:style style:name="P76" style:family="paragraph" style:parent-style-name="Text_20_body" style:list-style-name="List_20_1">
      <style:text-properties officeooo:paragraph-rsid="00273c2a"/>
    </style:style>
    <style:style style:name="P77" style:family="paragraph" style:parent-style-name="Text_20_body" style:list-style-name="List_20_1">
      <style:text-properties fo:font-weight="bold" officeooo:paragraph-rsid="0027fba7" style:font-weight-asian="bold" style:font-weight-complex="bold"/>
    </style:style>
    <style:style style:name="P78" style:family="paragraph" style:parent-style-name="Text_20_body" style:list-style-name="List_20_1">
      <style:text-properties officeooo:paragraph-rsid="0027fba7"/>
    </style:style>
    <style:style style:name="P79" style:family="paragraph" style:parent-style-name="Text_20_body" style:list-style-name="List_20_1">
      <style:text-properties fo:font-weight="bold" officeooo:paragraph-rsid="0029775e" style:font-weight-asian="bold" style:font-weight-complex="bold"/>
    </style:style>
    <style:style style:name="P80" style:family="paragraph" style:parent-style-name="Text_20_body" style:list-style-name="List_20_1">
      <style:text-properties officeooo:paragraph-rsid="0029775e"/>
    </style:style>
    <style:style style:name="P81" style:family="paragraph" style:parent-style-name="Text_20_body" style:list-style-name="List_20_1"/>
    <style:style style:name="P82" style:family="paragraph" style:parent-style-name="First_20_paragraph" style:list-style-name="List_20_1">
      <style:text-properties fo:font-weight="bold" officeooo:paragraph-rsid="002ac126" style:font-weight-asian="bold" style:font-weight-complex="bold"/>
    </style:style>
    <style:style style:name="P83" style:family="paragraph" style:parent-style-name="First_20_paragraph" style:list-style-name="List_20_1">
      <style:text-properties officeooo:paragraph-rsid="002ac126"/>
    </style:style>
    <style:style style:name="P84" style:family="paragraph" style:parent-style-name="Text_20_body" style:list-style-name="List_20_1">
      <style:text-properties fo:font-weight="bold" officeooo:paragraph-rsid="002ac126" style:font-weight-asian="bold" style:font-weight-complex="bold"/>
    </style:style>
    <style:style style:name="P85" style:family="paragraph" style:parent-style-name="Text_20_body" style:list-style-name="List_20_1">
      <style:text-properties officeooo:paragraph-rsid="002ac126"/>
    </style:style>
    <style:style style:name="P86" style:family="paragraph" style:parent-style-name="First_20_paragraph" style:list-style-name="List_20_1">
      <style:text-properties fo:font-weight="bold" officeooo:paragraph-rsid="002bca97" style:font-weight-asian="bold" style:font-weight-complex="bold"/>
    </style:style>
    <style:style style:name="P87" style:family="paragraph" style:parent-style-name="First_20_paragraph" style:list-style-name="List_20_1">
      <style:text-properties officeooo:paragraph-rsid="002bca97"/>
    </style:style>
    <style:style style:name="P88" style:family="paragraph" style:parent-style-name="Text_20_body" style:list-style-name="List_20_1">
      <style:text-properties fo:font-weight="bold" officeooo:paragraph-rsid="002bca97" style:font-weight-asian="bold" style:font-weight-complex="bold"/>
    </style:style>
    <style:style style:name="P89" style:family="paragraph" style:parent-style-name="Text_20_body" style:list-style-name="List_20_1">
      <style:text-properties officeooo:paragraph-rsid="002bca97"/>
    </style:style>
    <style:style style:name="P90" style:family="paragraph" style:parent-style-name="Text_20_body" style:list-style-name="List_20_1">
      <style:text-properties fo:font-weight="bold" officeooo:paragraph-rsid="002c45bc" style:font-weight-asian="bold" style:font-weight-complex="bold"/>
    </style:style>
    <style:style style:name="P91" style:family="paragraph" style:parent-style-name="Text_20_body" style:list-style-name="List_20_1">
      <style:text-properties officeooo:paragraph-rsid="002c45bc"/>
    </style:style>
    <style:style style:name="P92" style:family="paragraph" style:parent-style-name="Text_20_body" style:list-style-name="List_20_1">
      <style:text-properties officeooo:paragraph-rsid="002d5247"/>
    </style:style>
    <style:style style:name="P93" style:family="paragraph" style:parent-style-name="Text_20_body">
      <style:text-properties fo:font-weight="bold" officeooo:paragraph-rsid="002d5247" style:font-weight-asian="bold" style:font-weight-complex="bold"/>
    </style:style>
    <style:style style:name="P94" style:family="paragraph" style:parent-style-name="Text_20_body">
      <style:text-properties fo:font-weight="bold" officeooo:paragraph-rsid="002e5346" style:font-weight-asian="bold" style:font-weight-complex="bold"/>
    </style:style>
    <style:style style:name="P95" style:family="paragraph" style:parent-style-name="Text_20_body" style:list-style-name="List_20_1">
      <style:text-properties officeooo:paragraph-rsid="002e5346"/>
    </style:style>
    <style:style style:name="P96" style:family="paragraph" style:parent-style-name="First_20_paragraph" style:list-style-name="List_20_1"/>
    <style:style style:name="P97" style:family="paragraph" style:parent-style-name="Text_20_body" style:list-style-name="List_20_1">
      <style:text-properties fo:font-weight="bold" officeooo:paragraph-rsid="00318bbb" style:font-weight-asian="bold" style:font-weight-complex="bold"/>
    </style:style>
    <style:style style:name="P98" style:family="paragraph" style:parent-style-name="Text_20_body" style:list-style-name="List_20_1">
      <style:text-properties officeooo:paragraph-rsid="00318bbb"/>
    </style:style>
    <style:style style:name="P99" style:family="paragraph" style:parent-style-name="Text_20_body" style:list-style-name="List_20_1">
      <style:text-properties fo:font-weight="bold" officeooo:paragraph-rsid="00331ad3" style:font-weight-asian="bold" style:font-weight-complex="bold"/>
    </style:style>
    <style:style style:name="P100" style:family="paragraph" style:parent-style-name="Text_20_body" style:list-style-name="List_20_1">
      <style:text-properties officeooo:paragraph-rsid="00331ad3"/>
    </style:style>
    <style:style style:name="P101" style:family="paragraph" style:parent-style-name="First_20_paragraph" style:list-style-name="List_20_1">
      <style:text-properties fo:font-weight="bold" officeooo:paragraph-rsid="00333542" style:font-weight-asian="bold" style:font-weight-complex="bold"/>
    </style:style>
    <style:style style:name="P102" style:family="paragraph" style:parent-style-name="First_20_paragraph" style:list-style-name="List_20_1">
      <style:text-properties fo:font-weight="normal" officeooo:paragraph-rsid="00333542" style:font-weight-asian="normal" style:font-weight-complex="normal"/>
    </style:style>
    <style:style style:name="P103" style:family="paragraph" style:parent-style-name="Text_20_body" style:list-style-name="List_20_1">
      <style:text-properties fo:font-weight="bold" officeooo:paragraph-rsid="00336487" style:font-weight-asian="bold" style:font-weight-complex="bold"/>
    </style:style>
    <style:style style:name="P104" style:family="paragraph" style:parent-style-name="Text_20_body" style:list-style-name="List_20_1">
      <style:text-properties officeooo:paragraph-rsid="00336487"/>
    </style:style>
    <style:style style:name="P105" style:family="paragraph" style:parent-style-name="Text_20_body">
      <style:text-properties officeooo:rsid="00336487" officeooo:paragraph-rsid="00336487"/>
    </style:style>
    <style:style style:name="P106" style:family="paragraph" style:parent-style-name="First_20_paragraph" style:list-style-name="List_20_1">
      <style:text-properties fo:font-weight="bold" officeooo:paragraph-rsid="0034db42" style:font-weight-asian="bold" style:font-weight-complex="bold"/>
    </style:style>
    <style:style style:name="P107" style:family="paragraph" style:parent-style-name="First_20_paragraph" style:list-style-name="List_20_1">
      <style:text-properties fo:font-weight="normal" officeooo:paragraph-rsid="0034db42" style:font-weight-asian="normal" style:font-weight-complex="normal"/>
    </style:style>
    <style:style style:name="P108" style:family="paragraph" style:parent-style-name="Text_20_body" style:list-style-name="List_20_1">
      <style:text-properties fo:font-weight="bold" officeooo:paragraph-rsid="00368cee" style:font-weight-asian="bold" style:font-weight-complex="bold"/>
    </style:style>
    <style:style style:name="P109" style:family="paragraph" style:parent-style-name="Text_20_body" style:list-style-name="List_20_1">
      <style:text-properties officeooo:paragraph-rsid="00368cee"/>
    </style:style>
    <style:style style:name="P110" style:family="paragraph" style:parent-style-name="Text_20_body" style:list-style-name="List_20_1">
      <style:text-properties fo:font-weight="bold" officeooo:paragraph-rsid="00384f24" style:font-weight-asian="bold" style:font-weight-complex="bold"/>
    </style:style>
    <style:style style:name="P111" style:family="paragraph" style:parent-style-name="Text_20_body" style:list-style-name="List_20_1">
      <style:text-properties officeooo:paragraph-rsid="00384f24"/>
    </style:style>
    <style:style style:name="P112" style:family="paragraph" style:parent-style-name="Text_20_body" style:list-style-name="List_20_1">
      <style:text-properties fo:font-weight="bold" officeooo:paragraph-rsid="0039457b" style:font-weight-asian="bold" style:font-weight-complex="bold"/>
    </style:style>
    <style:style style:name="P113" style:family="paragraph" style:parent-style-name="Text_20_body" style:list-style-name="List_20_1">
      <style:text-properties officeooo:paragraph-rsid="0039457b"/>
    </style:style>
    <style:style style:name="P114" style:family="paragraph" style:parent-style-name="First_20_paragraph" style:list-style-name="List_20_1">
      <style:text-properties fo:font-weight="bold" officeooo:paragraph-rsid="003b023a" style:font-weight-asian="bold" style:font-weight-complex="bold"/>
    </style:style>
    <style:style style:name="P115" style:family="paragraph" style:parent-style-name="First_20_paragraph" style:list-style-name="List_20_1">
      <style:text-properties officeooo:paragraph-rsid="003b023a"/>
    </style:style>
    <style:style style:name="P116" style:family="paragraph" style:parent-style-name="Text_20_body" style:list-style-name="List_20_1">
      <style:text-properties fo:font-weight="bold" officeooo:paragraph-rsid="003b023a" style:font-weight-asian="bold" style:font-weight-complex="bold"/>
    </style:style>
    <style:style style:name="P117" style:family="paragraph" style:parent-style-name="Text_20_body" style:list-style-name="List_20_1">
      <style:text-properties officeooo:paragraph-rsid="003b023a"/>
    </style:style>
    <style:style style:name="P118" style:family="paragraph" style:parent-style-name="Text_20_body">
      <style:text-properties fo:font-weight="bold" officeooo:paragraph-rsid="003b49d8" style:font-weight-asian="bold" style:font-weight-complex="bold"/>
    </style:style>
    <style:style style:name="P119" style:family="paragraph" style:parent-style-name="Text_20_body" style:list-style-name="List_20_1">
      <style:text-properties officeooo:paragraph-rsid="003b49d8"/>
    </style:style>
    <style:style style:name="P120" style:family="paragraph" style:parent-style-name="Text_20_body" style:list-style-name="List_20_1">
      <style:text-properties fo:font-weight="bold" officeooo:paragraph-rsid="003e02f8" style:font-weight-asian="bold" style:font-weight-complex="bold"/>
    </style:style>
    <style:style style:name="P121" style:family="paragraph" style:parent-style-name="Text_20_body" style:list-style-name="List_20_1">
      <style:text-properties officeooo:paragraph-rsid="003e02f8"/>
    </style:style>
    <style:style style:name="P122" style:family="paragraph" style:parent-style-name="Text_20_body" style:list-style-name="List_20_1">
      <style:text-properties officeooo:paragraph-rsid="003c95d9"/>
    </style:style>
    <style:style style:name="P123" style:family="paragraph" style:parent-style-name="Text_20_body" style:list-style-name="List_20_1">
      <style:text-properties fo:font-weight="bold" officeooo:paragraph-rsid="003f3d7c" style:font-weight-asian="bold" style:font-weight-complex="bold"/>
    </style:style>
    <style:style style:name="P124" style:family="paragraph" style:parent-style-name="Text_20_body" style:list-style-name="List_20_1">
      <style:text-properties officeooo:paragraph-rsid="003f3d7c"/>
    </style:style>
    <style:style style:name="P125" style:family="paragraph" style:parent-style-name="Text_20_body" style:list-style-name="List_20_1">
      <style:text-properties fo:font-weight="bold" officeooo:paragraph-rsid="00405a0f" style:font-weight-asian="bold" style:font-weight-complex="bold"/>
    </style:style>
    <style:style style:name="P126" style:family="paragraph" style:parent-style-name="Text_20_body" style:list-style-name="List_20_1">
      <style:text-properties officeooo:paragraph-rsid="00405a0f"/>
    </style:style>
    <style:style style:name="P127" style:family="paragraph" style:parent-style-name="Text_20_body" style:list-style-name="List_20_1">
      <style:text-properties officeooo:paragraph-rsid="004253ad"/>
    </style:style>
    <style:style style:name="P1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13e3" officeooo:paragraph-rsid="00dd13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13e3" officeooo:paragraph-rsid="00dd13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b429" officeooo:paragraph-rsid="0121b42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d533" officeooo:paragraph-rsid="00ded53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3596" officeooo:paragraph-rsid="00e0359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f7d7" officeooo:paragraph-rsid="00e0f7d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9c29" officeooo:paragraph-rsid="00e29c2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9c29" officeooo:paragraph-rsid="00e29c2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3e6b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2fac" officeooo:paragraph-rsid="00e42fa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c8b1" officeooo:paragraph-rsid="0108c8b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officeooo:rsid="01090b89" officeooo:paragraph-rsid="01090b89"/>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7a2e" officeooo:paragraph-rsid="00e47a2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af8b" officeooo:paragraph-rsid="00b8af8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font-weight="bold" officeooo:rsid="00e47a2e" officeooo:paragraph-rsid="00e47a2e" style:font-weight-asian="bold" style:font-weight-complex="bold"/>
    </style:style>
    <style:style style:name="P146" style:family="paragraph" style:parent-style-name="First_20_paragraph">
      <style:text-properties officeooo:paragraph-rsid="0043616e"/>
    </style:style>
    <style:style style:name="P1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e70d" officeooo:paragraph-rsid="00e4e70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e70d" officeooo:paragraph-rsid="00e4e70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05377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e70d" officeooo:paragraph-rsid="00e4e70d"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bad2" officeooo:paragraph-rsid="00e5bad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020f" officeooo:paragraph-rsid="00e7020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fa6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8d61" officeooo:paragraph-rsid="01138d6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fcaf" officeooo:paragraph-rsid="00edfcaf"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6f70" officeooo:paragraph-rsid="00f06f7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ab4" officeooo:paragraph-rsid="00f5fab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4cf5" officeooo:paragraph-rsid="00f94cf5"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dd75" officeooo:paragraph-rsid="00f9dd7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dd75" officeooo:paragraph-rsid="00fa7c3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fc7b7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7b70" officeooo:paragraph-rsid="00fc7b7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fd4b5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b513" officeooo:paragraph-rsid="00feb51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0bfcf" officeooo:paragraph-rsid="0100bfc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7e818" officeooo:paragraph-rsid="0107e81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7e818" officeooo:paragraph-rsid="0107e818" style:font-name-asian="Lucida Sans Unicode" style:font-size-asian="12pt" style:font-style-asian="normal" style:font-weight-asian="normal" style:font-name-complex="Tahoma1"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d1335" officeooo:paragraph-rsid="010d133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f0d6f" officeooo:paragraph-rsid="010f0d6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4d24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b721" officeooo:paragraph-rsid="0113b72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4d240" officeooo:paragraph-rsid="0114d24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ab4" officeooo:paragraph-rsid="011604f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b5e23" officeooo:paragraph-rsid="011b5e2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b9fb"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40a1"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c13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First_20_paragraph" style:list-style-name="List_20_1">
      <style:text-properties officeooo:paragraph-rsid="0043616e"/>
    </style:style>
    <style:style style:name="P179" style:family="paragraph" style:parent-style-name="Text_20_body">
      <style:text-properties fo:font-weight="bold" officeooo:paragraph-rsid="00a4553d" style:font-weight-asian="bold" style:font-weight-complex="bold"/>
    </style:style>
    <style:style style:name="P180" style:family="paragraph" style:parent-style-name="Text_20_body" style:list-style-name="List_20_1">
      <style:text-properties officeooo:paragraph-rsid="00a4553d"/>
    </style:style>
    <style:style style:name="P181" style:family="paragraph" style:parent-style-name="Text_20_body">
      <style:text-properties fo:font-weight="bold" officeooo:paragraph-rsid="00a559d7" style:font-weight-asian="bold" style:font-weight-complex="bold"/>
    </style:style>
    <style:style style:name="P182" style:family="paragraph" style:parent-style-name="Text_20_body" style:list-style-name="List_20_1">
      <style:text-properties officeooo:paragraph-rsid="00a559d7"/>
    </style:style>
    <style:style style:name="P183" style:family="paragraph" style:parent-style-name="Preformatted_20_Text">
      <style:text-properties officeooo:rsid="00abc17f" officeooo:paragraph-rsid="00a96ce8"/>
    </style:style>
    <style:style style:name="P184" style:family="paragraph" style:parent-style-name="Text_20_body">
      <style:text-properties fo:font-weight="bold" officeooo:paragraph-rsid="00a70df6" style:font-weight-asian="bold" style:font-weight-complex="bold"/>
    </style:style>
    <style:style style:name="P185" style:family="paragraph" style:parent-style-name="Text_20_body" style:list-style-name="List_20_1">
      <style:text-properties officeooo:paragraph-rsid="00a70df6"/>
    </style:style>
    <style:style style:name="P186" style:family="paragraph" style:parent-style-name="Text_20_body">
      <style:text-properties fo:font-weight="bold" officeooo:paragraph-rsid="00a82768" style:font-weight-asian="bold" style:font-weight-complex="bold"/>
    </style:style>
    <style:style style:name="P187" style:family="paragraph" style:parent-style-name="Text_20_body" style:list-style-name="List_20_1">
      <style:text-properties officeooo:paragraph-rsid="00a82768"/>
    </style:style>
    <style:style style:name="P188" style:family="paragraph" style:parent-style-name="Text_20_body">
      <style:text-properties fo:font-weight="bold" officeooo:rsid="00adc5e3" officeooo:paragraph-rsid="00adc5e3" style:font-weight-asian="bold" style:font-weight-complex="bold"/>
    </style:style>
    <style:style style:name="P189" style:family="paragraph" style:parent-style-name="Text_20_body" style:list-style-name="List_20_1">
      <style:text-properties officeooo:paragraph-rsid="00adc5e3"/>
    </style:style>
    <style:style style:name="P190" style:family="paragraph" style:parent-style-name="Text_20_body">
      <style:text-properties fo:font-weight="bold" officeooo:rsid="00ab57c4" officeooo:paragraph-rsid="00ab57c4" style:font-weight-asian="bold" style:font-weight-complex="bold"/>
    </style:style>
    <style:style style:name="P191" style:family="paragraph" style:parent-style-name="Text_20_body" style:list-style-name="List_20_1">
      <style:text-properties fo:font-weight="bold" officeooo:rsid="00ab57c4" officeooo:paragraph-rsid="00ac59d1" style:font-weight-asian="bold" style:font-weight-complex="bold"/>
    </style:style>
    <style:style style:name="P192" style:family="paragraph" style:parent-style-name="Text_20_body" style:list-style-name="List_20_1">
      <style:text-properties fo:font-weight="normal" officeooo:rsid="00aecffc" officeooo:paragraph-rsid="00ac11c9" style:font-weight-asian="normal" style:font-weight-complex="normal"/>
    </style:style>
    <style:style style:name="P193" style:family="paragraph" style:parent-style-name="Text_20_body" style:list-style-name="List_20_1">
      <style:text-properties fo:font-weight="bold" officeooo:paragraph-rsid="00ad5795" style:font-weight-asian="bold" style:font-weight-complex="bold"/>
    </style:style>
    <style:style style:name="P194" style:family="paragraph" style:parent-style-name="Text_20_body" style:list-style-name="List_20_1">
      <style:text-properties officeooo:paragraph-rsid="00ac59d1"/>
    </style:style>
    <style:style style:name="P195" style:family="paragraph" style:parent-style-name="Text_20_body">
      <style:text-properties officeooo:rsid="00af7a42" officeooo:paragraph-rsid="00aea3a0"/>
    </style:style>
    <style:style style:name="P196" style:family="paragraph" style:parent-style-name="First_20_paragraph">
      <style:text-properties officeooo:paragraph-rsid="00b041f0"/>
    </style:style>
    <style:style style:name="P197" style:family="paragraph" style:parent-style-name="First_20_paragraph" style:list-style-name="List_20_1">
      <style:text-properties officeooo:paragraph-rsid="00b041f0"/>
    </style:style>
    <style:style style:name="P198" style:family="paragraph" style:parent-style-name="First_20_paragraph">
      <style:text-properties officeooo:paragraph-rsid="00b2bc5a"/>
    </style:style>
    <style:style style:name="P199" style:family="paragraph" style:parent-style-name="First_20_paragraph" style:list-style-name="List_20_1">
      <style:text-properties officeooo:paragraph-rsid="00b2bc5a"/>
    </style:style>
    <style:style style:name="P200" style:family="paragraph" style:parent-style-name="First_20_paragraph">
      <style:text-properties officeooo:paragraph-rsid="00b2c1f3"/>
    </style:style>
    <style:style style:name="P201" style:family="paragraph" style:parent-style-name="First_20_paragraph" style:list-style-name="List_20_1">
      <style:text-properties officeooo:paragraph-rsid="00b2c1f3"/>
    </style:style>
    <style:style style:name="T1" style:family="text">
      <style:text-properties fo:font-weight="bold" style:font-weight-asian="bold" style:font-weight-complex="bold"/>
    </style:style>
    <style:style style:name="T2" style:family="text">
      <style:text-properties officeooo:rsid="01200116"/>
    </style:style>
    <style:style style:name="T3" style:family="text">
      <style:text-properties officeooo:rsid="00ba0306"/>
    </style:style>
    <style:style style:name="T4" style:family="text">
      <style:text-properties fo:font-weight="normal" style:font-weight-asian="normal" style:font-weight-complex="normal"/>
    </style:style>
    <style:style style:name="T5" style:family="text">
      <style:text-properties fo:font-weight="bold" officeooo:rsid="000e7de6" style:font-weight-asian="bold" style:font-weight-complex="bold"/>
    </style:style>
    <style:style style:name="T6" style:family="text">
      <style:text-properties fo:font-weight="bold" officeooo:rsid="001f683a" style:font-weight-asian="bold" style:font-weight-complex="bold"/>
    </style:style>
    <style:style style:name="T7" style:family="text">
      <style:text-properties officeooo:rsid="00221e01"/>
    </style:style>
    <style:style style:name="T8" style:family="text">
      <style:text-properties officeooo:rsid="00225f50"/>
    </style:style>
    <style:style style:name="T9" style:family="text">
      <style:text-properties fo:font-weight="normal" officeooo:rsid="0022ea47" style:font-weight-asian="normal" style:font-weight-complex="normal"/>
    </style:style>
    <style:style style:name="T10" style:family="text">
      <style:text-properties fo:font-weight="normal" officeooo:rsid="002ba0d3" style:font-weight-asian="normal" style:font-weight-complex="normal"/>
    </style:style>
    <style:style style:name="T11" style:family="text">
      <style:text-properties officeooo:rsid="00bb0f6d"/>
    </style:style>
    <style:style style:name="T12" style:family="text">
      <style:text-properties officeooo:rsid="00db2688"/>
    </style:style>
    <style:style style:name="T13" style:family="text">
      <style:text-properties officeooo:rsid="00dd13e3"/>
    </style:style>
    <style:style style:name="T14" style:family="text">
      <style:text-properties officeooo:rsid="0120f252"/>
    </style:style>
    <style:style style:name="T15" style:family="text">
      <style:text-properties officeooo:rsid="0058304b"/>
    </style:style>
    <style:style style:name="T16" style:family="text">
      <style:text-properties officeooo:rsid="00b5dc2a"/>
    </style:style>
    <style:style style:name="T17" style:family="text">
      <style:text-properties officeooo:rsid="00b70284"/>
    </style:style>
    <style:style style:name="T18" style:family="text">
      <style:text-properties officeooo:rsid="00be5910"/>
    </style:style>
    <style:style style:name="T19" style:family="text">
      <style:text-properties officeooo:rsid="00602c3b"/>
    </style:style>
    <style:style style:name="T20" style:family="text">
      <style:text-properties officeooo:rsid="00d98a51"/>
    </style:style>
    <style:style style:name="T21" style:family="text">
      <style:text-properties officeooo:rsid="0063e6bc"/>
    </style:style>
    <style:style style:name="T22" style:family="text">
      <style:text-properties officeooo:rsid="010aaf56"/>
    </style:style>
    <style:style style:name="T23" style:family="text">
      <style:text-properties officeooo:rsid="010b2d06"/>
    </style:style>
    <style:style style:name="T24" style:family="text">
      <style:text-properties officeooo:rsid="00da9c37"/>
    </style:style>
    <style:style style:name="T25" style:family="text">
      <style:text-properties officeooo:rsid="00bfdfb3"/>
    </style:style>
    <style:style style:name="T26" style:family="text">
      <style:text-properties fo:font-weight="normal" officeooo:rsid="00e4e70d" style:font-weight-asian="normal" style:font-weight-complex="normal"/>
    </style:style>
    <style:style style:name="T27" style:family="text">
      <style:text-properties officeooo:rsid="00e47a2e"/>
    </style:style>
    <style:style style:name="T28" style:family="text">
      <style:text-properties officeooo:rsid="00e4e70d"/>
    </style:style>
    <style:style style:name="T29" style:family="text">
      <style:text-properties fo:font-family="'Liberation Serif'" style:font-family-generic="roman" officeooo:rsid="01053773" style:font-family-asian="'Liberation Serif'" style:font-family-generic-asian="roman" style:font-family-complex="'Liberation Serif'" style:font-family-generic-complex="roman"/>
    </style:style>
    <style:style style:name="T30" style:family="text">
      <style:text-properties officeooo:rsid="00c5ae22"/>
    </style:style>
    <style:style style:name="T31" style:family="text">
      <style:text-properties fo:font-family="'Liberation Serif'" style:font-family-generic="roman" officeooo:rsid="01045f8f" style:font-family-asian="'Liberation Serif'" style:font-family-generic-asian="roman" style:font-family-complex="'Liberation Serif'" style:font-family-generic-complex="roman"/>
    </style:style>
    <style:style style:name="T32" style:family="text">
      <style:text-properties officeooo:rsid="00d8035d"/>
    </style:style>
    <style:style style:name="T33" style:family="text">
      <style:text-properties officeooo:rsid="00e5bad2"/>
    </style:style>
    <style:style style:name="T34" style:family="text">
      <style:text-properties officeooo:rsid="00d5cd7d"/>
    </style:style>
    <style:style style:name="T35" style:family="text">
      <style:text-properties officeooo:rsid="00d6dbf9"/>
    </style:style>
    <style:style style:name="T36" style:family="text">
      <style:text-properties officeooo:rsid="00c635ba"/>
    </style:style>
    <style:style style:name="T37" style:family="text">
      <style:text-properties fo:font-family="'Liberation Serif'" style:font-family-generic="roman" officeooo:rsid="0102f855" style:font-family-asian="'Liberation Serif'" style:font-family-generic-asian="roman" style:font-family-complex="'Liberation Serif'" style:font-family-generic-complex="roman"/>
    </style:style>
    <style:style style:name="T38" style:family="text">
      <style:text-properties officeooo:rsid="00fa7c33"/>
    </style:style>
    <style:style style:name="T39" style:family="text">
      <style:text-properties fo:font-family="'Liberation Serif'" style:font-family-generic="roman" style:font-family-asian="'Liberation Serif'" style:font-family-generic-asian="roman" style:font-family-complex="'Liberation Serif'" style:font-family-generic-complex="roman"/>
    </style:style>
    <style:style style:name="T40" style:family="text">
      <style:text-properties style:font-name-asian="Lucida Sans Unicode" style:font-name-complex="Tahoma1"/>
    </style:style>
    <style:style style:name="T41" style:family="text">
      <style:text-properties officeooo:rsid="00fd4b50"/>
    </style:style>
    <style:style style:name="T42" style:family="text">
      <style:text-properties fo:font-family="'Liberation Serif'" style:font-family-generic="roman" officeooo:rsid="0101ae7c" style:font-family-asian="'Liberation Serif'" style:font-family-generic-asian="roman" style:font-family-complex="'Liberation Serif'" style:font-family-generic-complex="roman"/>
    </style:style>
    <style:style style:name="T43" style:family="text">
      <style:text-properties officeooo:rsid="00d41f24"/>
    </style:style>
    <style:style style:name="T44" style:family="text">
      <style:text-properties officeooo:rsid="00d4f883"/>
    </style:style>
    <style:style style:name="T45" style:family="text">
      <style:text-properties officeooo:rsid="011604f8"/>
    </style:style>
    <style:style style:name="T46" style:family="text">
      <style:text-properties officeooo:rsid="013e7dca"/>
    </style:style>
    <style:style style:name="T47" style:family="text">
      <style:text-properties officeooo:rsid="00aecffc"/>
    </style:style>
    <style:style style:name="T48" style:family="text">
      <style:text-properties officeooo:rsid="00a96ce8"/>
    </style:style>
    <style:style style:name="T49" style:family="text">
      <style:text-properties officeooo:rsid="00e09925"/>
    </style:style>
    <style:style style:name="T50" style:family="text">
      <style:text-properties officeooo:rsid="014d0bde"/>
    </style:style>
    <style:style style:name="T51" style:family="text">
      <style:text-properties officeooo:rsid="00aa235a"/>
    </style:style>
    <style:style style:name="T52" style:family="text">
      <style:text-properties fo:font-weight="normal" officeooo:rsid="00adc5e3" style:font-weight-asian="normal" style:font-weight-complex="normal"/>
    </style:style>
    <style:style style:name="T53" style:family="text">
      <style:text-properties fo:font-weight="normal" officeooo:rsid="014d3c47" style:font-weight-asian="normal" style:font-weight-complex="normal"/>
    </style:style>
    <style:style style:name="T54" style:family="text">
      <style:text-properties fo:font-weight="normal" officeooo:rsid="011d06e9" style:font-weight-asian="normal" style:font-weight-complex="normal"/>
    </style:style>
    <style:style style:name="T55" style:family="text">
      <style:text-properties fo:font-weight="normal" officeooo:rsid="00aecffc" style:font-weight-asian="normal" style:font-weight-complex="normal"/>
    </style:style>
    <style:style style:name="T56" style:family="text">
      <style:text-properties fo:font-weight="normal" officeooo:rsid="00abc17f" style:font-weight-asian="normal" style:font-weight-complex="normal"/>
    </style:style>
    <style:style style:name="T57" style:family="text">
      <style:text-properties fo:font-weight="normal" officeooo:rsid="00af7a42" style:font-weight-asian="normal" style:font-weight-complex="normal"/>
    </style:style>
    <style:style style:name="T58" style:family="text">
      <style:text-properties officeooo:rsid="00abc17f"/>
    </style:style>
    <style:style style:name="T59" style:family="text">
      <style:text-properties officeooo:rsid="00a82768"/>
    </style:style>
    <style:style style:name="T60" style:family="text">
      <style:text-properties officeooo:rsid="00af7a42"/>
    </style:style>
    <style:style style:name="T61" style:family="text">
      <style:text-properties officeooo:rsid="01a9873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data-command-interpreter-specification"/>Data Command Interpreter Specification<text:bookmark-end text:name="data-command-interpreter-specification"/></text:h>
      <text:h text:style-name="Heading_20_2" text:outline-level="2"><text:bookmark-start text:name="introduction"/>1. INTRODUCTION<text:bookmark-end text:name="introduction"/></text:h>
      <text:h text:style-name="Heading_20_3" text:outline-level="3"><text:bookmark-start text:name="overview"/>1.1 Overview<text:bookmark-end text:name="overview"/></text:h>
      <text:p text:style-name="First_20_paragraph">This document specifies a command interpreter modeled on Systat BASIC that operates on a two-dimensional table residing either in memory or an external file. The interpreter shall be written in Ada and compilable with any recent version of GNU GNAT on any platform upon which it runs. The language shall be entirely case insensitive.</text:p>
      <text:p text:style-name="P1">Key Requirements:</text:p>
      <text:list xml:id="list971624128" text:style-name="List_20_1">
        <text:list-item>
          <text:p text:style-name="P2">No hard memory or dimensional constraints.</text:p>
        </text:list-item>
        <text:list-item>
          <text:p text:style-name="P2">No limits on nesting of <text:span text:style-name="Source_5f_Text">FOR</text:span> loops or other structures.</text:p>
        </text:list-item>
        <text:list-item>
          <text:p text:style-name="P2">Can run as stand-alone text-based application or embedded in a larger system.</text:p>
        </text:list-item>
        <text:list-item>
          <text:p text:style-name="P3">External libraries must be freely available and compatible with proprietary software.</text:p>
        </text:list-item>
        <text:list-item>
          <text:p text:style-name="P3">Code must be modular, readable, maintainable, and well-documented.</text:p>
        </text:list-item>
        <text:list-item>
          <text:p text:style-name="P3">No copyrighted code may be copied into the generated code base.</text:p>
        </text:list-item>
      </text:list>
      <text:h text:style-name="Heading_20_3" text:outline-level="3"><text:bookmark-start text:name="bw-basic-compatibility"/>1.2 BW BASIC Compatibility<text:bookmark-end text:name="bw-basic-compatibility"/></text:h>
      <text:p text:style-name="First_20_paragraph">Unless otherwise specified, the commands and functions listed shall be implemented as specified in the documentation for Bywater BASIC 3.20, but deviations are allowed when necessary. Bywater commands and functions not listed in this document shall not be supported.</text:p>
      <text:p text:style-name="Horizontal_20_Line"/>
      <text:h text:style-name="Heading_20_2" text:outline-level="2"><text:bookmark-start text:name="data-model"/>2. DATA MODEL<text:bookmark-end text:name="data-model"/></text:h>
      <text:h text:style-name="Heading_20_3" text:outline-level="3"><text:bookmark-start text:name="the-internal-table"/>2.1 The Internal Table<text:bookmark-end text:name="the-internal-table"/></text:h>
      <text:p text:style-name="First_20_paragraph">The interpreter operates on a two-dimensional table containing any number of rows (records) and columns (variables). The table may reside in memory if small enough, or in an external file with an in-memory cache.</text:p>
      <text:p text:style-name="P4">Memory Management:</text:p>
      <text:list xml:id="list101930559310116" text:continue-numbering="true" text:style-name="List_20_1">
        <text:list-item>
          <text:p text:style-name="P5">Maximum in-memory size: set by <text:span text:style-name="Source_5f_Text">-m</text:span> command line option or <text:span text:style-name="Source_5f_Text">OPTIONS MAXINTAB</text:span>.</text:p>
        </text:list-item>
        <text:list-item>
          <text:p text:style-name="P5">External file storage: used when table exceeds maximum in-memory size.</text:p>
        </text:list-item>
        <text:list-item>
          <text:p text:style-name="P5"><text:soft-page-break/>Cache size: equal to maximum in-memory size, but never less than the size of a single row.</text:p>
        </text:list-item>
        <text:list-item>
          <text:p text:style-name="P5">Implementation details: format and properties of external file and cache are implementation-defined.</text:p>
        </text:list-item>
      </text:list>
      <text:p text:style-name="Text_20_body"><text:span text:style-name="T1">Column Ordering:</text:span> Permanent variables (including arrays) shall appear as columns in the internal table in the order in which they were created.</text:p>
      <text:h text:style-name="Heading_20_3" text:outline-level="3"><text:bookmark-start text:name="data-types"/>2.2 Data Types<text:bookmark-end text:name="data-types"/></text:h>
      <text:p text:style-name="First_20_paragraph">Three data types shall be supported:</text:p>
      <text:h text:style-name="Heading_20_4" text:outline-level="4"><text:bookmark-start text:name="floating-point-numeric"/>Floating Point Numeric<text:bookmark-end text:name="floating-point-numeric"/></text:h>
      <text:p text:style-name="P6">Platform-dependent precision:</text:p>
      <text:list xml:id="list101930821932685" text:continue-numbering="true" text:style-name="List_20_1">
        <text:list-item>
          <text:p text:style-name="P7">128-bit architectures: IEEE 754 quadruple precision (128-bit).</text:p>
        </text:list-item>
        <text:list-item>
          <text:p text:style-name="P7">64-bit architectures: IEEE 754 double precision (64-bit).</text:p>
        </text:list-item>
        <text:list-item>
          <text:p text:style-name="P7">32-bit architectures: IEEE 754 single precision (32-bit).</text:p>
        </text:list-item>
        <text:list-item>
          <text:p text:style-name="P7">Architectures with word size &lt; 32 bits: unsupported.</text:p>
        </text:list-item>
      </text:list>
      <text:h text:style-name="Heading_20_4" text:outline-level="4"><text:bookmark-start text:name="integer"/>Integer<text:bookmark-end text:name="integer"/></text:h>
      <text:p text:style-name="First_20_paragraph">32-bit signed integer.</text:p>
      <text:h text:style-name="Heading_20_4" text:outline-level="4"><text:bookmark-start text:name="character"/>Character<text:bookmark-end text:name="character"/></text:h>
      <text:list xml:id="list101930325748944" text:continue-numbering="true" text:style-name="List_20_1">
        <text:list-item>
          <text:p text:style-name="P8">Variable-length character strings.</text:p>
        </text:list-item>
        <text:list-item>
          <text:p text:style-name="P8">Maximum length: specifiable via <text:span text:style-name="Source_5f_Text">–clen</text:span> command line argument (default: 256 characters).</text:p>
        </text:list-item>
        <text:list-item>
          <text:p text:style-name="P8">Truncation: If a string exceeds maximum length, a warning shall be issued and the string truncated from the right, keeping only the leftmost characters that fit.</text:p>
        </text:list-item>
      </text:list>
      <text:h text:style-name="Heading_20_3" text:outline-level="3"><text:bookmark-start text:name="type-conversion-and-mixed-mode-arithmetic"/>2.3 Type Conversion and Mixed Mode Arithmetic<text:bookmark-end text:name="type-conversion-and-mixed-mode-arithmetic"/></text:h>
      <text:p text:style-name="P9">Conversion Rules:</text:p>
      <text:list xml:id="list101929724845598" text:continue-numbering="true" text:style-name="List_20_1">
        <text:list-item>
          <text:p text:style-name="P10">If an operation uses both floating point and integer values, integer values shall first be converted to their floating point equivalents.</text:p>
        </text:list-item>
        <text:list-item>
          <text:p text:style-name="P10">If an integer value is written to a floating point variable, it shall be converted to its floating point equivalent.</text:p>
        </text:list-item>
        <text:list-item>
          <text:p text:style-name="P10">If a floating point value is written to an integer variable, the fractional part shall be truncated (rounded toward zero).</text:p>
        </text:list-item>
        <text:list-item>
          <text:p text:style-name="P10"><text:soft-page-break/>Arithmetic operations involving character values shall be unsupported.</text:p>
        </text:list-item>
      </text:list>
      <text:h text:style-name="Heading_20_3" text:outline-level="3"><text:bookmark-start text:name="overflow-handling"/>2.4 Overflow Handling<text:bookmark-end text:name="overflow-handling"/></text:h>
      <text:p text:style-name="First_20_paragraph"><text:span text:style-name="T1">Integer Overflow:</text:span> Operations producing values outside the range -2,147,483,648 to 2,147,483,647 shall fail with an error message.</text:p>
      <text:p text:style-name="Text_20_body"><text:span text:style-name="T1">Floating Point Overflow:</text:span> Floating point operations that would produce values exceeding the representable range shall likewise fail with an error message.</text:p>
      <text:p text:style-name="Text_20_body"><text:span text:style-name="T1">Note:</text:span> Future versions may support special missing value codes for IEEE 754 infinity and NaN values.</text:p>
      <text:h text:style-name="Heading_20_3" text:outline-level="3"><text:bookmark-start text:name="missing-values"/>2.5 Missing Values<text:bookmark-end text:name="missing-values"/></text:h>
      <text:p text:style-name="P11">Representation:</text:p>
      <text:list text:continue-numbering="true" text:style-name="List_20_1">
        <text:list-item>
          <text:p text:style-name="P12">Numeric missing value: unquoted period (<text:span text:style-name="Source_5f_Text">.</text:span>).</text:p>
        </text:list-item>
        <text:list-item>
          <text:p text:style-name="P12">Character missing value: empty string (<text:span text:style-name="Source_5f_Text">""</text:span>).</text:p>
        </text:list-item>
      </text:list>
      <text:p text:style-name="P13">Propagation Rules:</text:p>
      <text:list text:continue-numbering="true" text:style-name="List_20_1">
        <text:list-item>
          <text:p text:style-name="P14">Operations on missing values shall result in missing values.</text:p>
        </text:list-item>
        <text:list-item>
          <text:p text:style-name="P14">Null strings (<text:span text:style-name="Source_5f_Text">""</text:span>) in string operations shall be taken literally.</text:p>
        </text:list-item>
        <text:list-item>
          <text:p text:style-name="P14">If no non-missing arguments are passed to an aggregate function, a missing value shall be returned.</text:p>
        </text:list-item>
        <text:list-item>
          <text:p text:style-name="P14">Aggregate functions shal<text:span text:style-name="T2">function</text:span>l ignore missing values when making computations.</text:p>
        </text:list-item>
      </text:list>
      <text:p text:style-name="P13">Error Conditions (not missing values):</text:p>
      <text:list xml:id="list101930905659639" text:continue-numbering="true" text:style-name="List_20_1">
        <text:list-item>
          <text:p text:style-name="P14">Division by zero shall terminate the current running program with an error message.</text:p>
        </text:list-item>
        <text:list-item>
          <text:p text:style-name="P14">Attempted operations that reference non-existent array elements shall fail with an error message.</text:p>
        </text:list-item>
        <text:list-item>
          <text:p text:style-name="P14">Mathematical functions receiving invalid arguments (e.g., non-positive argument to <text:span text:style-name="Source_5f_Text">LOG</text:span>) shall fail with an error message.</text:p>
        </text:list-item>
      </text:list>
      <text:h text:style-name="Heading_20_1" text:outline-level="1">3. VARIABLES AND ARRAYS</text:h>
      <text:h text:style-name="Heading_20_3" text:outline-level="3"><text:bookmark-start text:name="variable-types"/>3.1 Variable Types<text:bookmark-end text:name="variable-types"/></text:h>
      <text:p text:style-name="First_20_paragraph">Two categories of variables are supported:</text:p>
      <text:h text:style-name="Heading_20_4" text:outline-level="4"><text:bookmark-start text:name="permanent-variables"/><text:soft-page-break/>Permanent Variables<text:bookmark-end text:name="permanent-variables"/></text:h>
      <text:list text:style-name="L1">
        <text:list-item>
          <text:p text:style-name="P15">Stored as columns in the internal table.</text:p>
        </text:list-item>
        <text:list-item>
          <text:p text:style-name="P15">Written to output datasets when <text:span text:style-name="Source_5f_Text">SAVE</text:span> command is executed.</text:p>
        </text:list-item>
        <text:list-item>
          <text:p text:style-name="P15">Unless a <text:span text:style-name="Source_5f_Text">HOLD</text:span> statement is in effect, permanent variables not appearing in the input dataset shall be reset to missing each time a new record is read (if <text:span text:style-name="Source_5f_Text">USE</text:span> statement in effect) or created (if <text:span text:style-name="Source_5f_Text">REPEAT</text:span> statement in effect).</text:p>
        </text:list-item>
        <text:list-item>
          <text:p text:style-name="P15">If <text:span text:style-name="Source_5f_Text">HOLD</text:span> statement is in effect, affected variables not in the input dataset retain their values until explicitly changed.</text:p>
        </text:list-item>
        <text:list-item>
          <text:p text:style-name="P15">If <text:span text:style-name="Source_5f_Text">KEEP</text:span> statement is executed, all permanent variables not listed in it shall be deleted at the last step of the next <text:span text:style-name="Source_5f_Text">RUN</text:span> statement.</text:p>
        </text:list-item>
      </text:list>
      <text:h text:style-name="Heading_20_4" text:outline-level="4"><text:bookmark-start text:name="temporary-variables"/>Temporary Variables<text:bookmark-end text:name="temporary-variables"/></text:h>
      <text:list text:style-name="L2">
        <text:list-item>
          <text:p text:style-name="P16">Single values (numeric or character) not saved when internal table is written to external file.</text:p>
        </text:list-item>
        <text:list-item>
          <text:p text:style-name="P16">Retained for the duration of the session until explicitly deleted (<text:span text:style-name="Source_5f_Text">DROP</text:span> statement) or implicitly deleted (<text:span text:style-name="Source_5f_Text">NEW</text:span> statement).</text:p>
        </text:list-item>
        <text:list-item>
          <text:p text:style-name="P16">Always retain their values until/unless explicitly changed.</text:p>
        </text:list-item>
        <text:list-item>
          <text:p text:style-name="P16">Maximum memory: set via command line <text:span text:style-name="Source_5f_Text">-t</text:span> option or <text:span text:style-name="Source_5f_Text">OPTIONS MAXTEMPMEM.</text:span></text:p>
        </text:list-item>
        <text:list-item>
          <text:p text:style-name="P16">If maximum would be exceeded by creating a new variable/array or increasing array size, the statement shall fail with an error message.</text:p>
        </text:list-item>
      </text:list>
      <text:h text:style-name="Heading_20_3" text:outline-level="3"><text:bookmark-start text:name="variable-names-and-syntax"/>3.2 Variable Names and Syntax<text:bookmark-end text:name="variable-names-and-syntax"/></text:h>
      <text:p text:style-name="P17">Base Variable Names:</text:p>
      <text:list text:continue-list="list101930905659639" text:style-name="List_20_1">
        <text:list-item>
          <text:p text:style-name="P18">1 to 64 characters.</text:p>
        </text:list-item>
        <text:list-item>
          <text:p text:style-name="P18">May contain: uppercase letters, numerals, underscores.</text:p>
        </text:list-item>
        <text:list-item>
          <text:p text:style-name="P18">Case insensitive.</text:p>
        </text:list-item>
      </text:list>
      <text:p text:style-name="P19">Type Indicators:</text:p>
      <text:list text:continue-numbering="true" text:style-name="List_20_1">
        <text:list-item>
          <text:p text:style-name="P20">Character variables: base name + <text:span text:style-name="Source_5f_Text">$</text:span> suffix.</text:p>
        </text:list-item>
        <text:list-item>
          <text:p text:style-name="P20">Integer variables: base name + <text:span text:style-name="Source_5f_Text">%</text:span> suffix.</text:p>
        </text:list-item>
        <text:list-item>
          <text:p text:style-name="P20">Floating point variables: base name only (no suffix).</text:p>
        </text:list-item>
      </text:list>
      <text:p text:style-name="P19">Array Elements:</text:p>
      <text:list text:continue-numbering="true" text:style-name="List_20_1">
        <text:list-item>
          <text:p text:style-name="P20">Format: <text:span text:style-name="Source_5f_Text">arrayname(</text:span><text:span text:style-name="Variable">subscript</text:span><text:span text:style-name="Source_5f_Text">).</text:span></text:p>
        </text:list-item>
        <text:list-item>
          <text:p text:style-name="P20">Example: <text:span text:style-name="Source_5f_Text">TEMP(5)</text:span>, <text:span text:style-name="Source_5f_Text">NAME$(3)</text:span></text:p>
        </text:list-item>
      </text:list>
      <text:p text:style-name="P19">Examples:</text:p>
      <text:list xml:id="list101930751418798" text:continue-numbering="true" text:style-name="List_20_1">
        <text:list-item>
          <text:p text:style-name="P20"><text:span text:style-name="Source_5f_Text">LENGTH</text:span> - Scalar numeric variable.</text:p>
        </text:list-item>
        <text:list-item>
          <text:p text:style-name="P20"><text:soft-page-break/><text:span text:style-name="Source_5f_Text">NAME$</text:span> - Scalar character variable.</text:p>
        </text:list-item>
        <text:list-item>
          <text:p text:style-name="P20"><text:span text:style-name="Source_5f_Text">COUNT%</text:span> - Scalar integer variable.</text:p>
        </text:list-item>
        <text:list-item>
          <text:p text:style-name="P20"><text:span text:style-name="Source_5f_Text">FINGER_LEN(1)</text:span> - Member of a numeric array.</text:p>
        </text:list-item>
        <text:list-item>
          <text:p text:style-name="P20"><text:span text:style-name="Source_5f_Text">ALIAS$(2)</text:span> - Member of a character array.</text:p>
        </text:list-item>
      </text:list>
      <text:h text:style-name="Heading_20_3" text:outline-level="3"><text:bookmark-start text:name="arrays"/>3.3 Arrays<text:bookmark-end text:name="arrays"/></text:h>
      <text:p text:style-name="First_20_paragraph">Three types of arrays are supported:</text:p>
      <text:h text:style-name="Heading_20_4" text:outline-level="4"><text:bookmark-start text:name="permanent-arrays"/>Permanent Arrays<text:bookmark-end text:name="permanent-arrays"/></text:h>
      <text:list text:style-name="L3">
        <text:list-item>
          <text:p text:style-name="P21">Elements are columns in the internal table</text:p>
        </text:list-item>
        <text:list-item>
          <text:p text:style-name="P21">Written to output datasets via <text:span text:style-name="Source_5f_Text">SAVE</text:span> command</text:p>
        </text:list-item>
        <text:list-item>
          <text:p text:style-name="P21">When written, one column created per element in consecutive columns</text:p>
        </text:list-item>
        <text:list-item>
          <text:p text:style-name="P21">Column names: array name + subscript in parentheses (e.g., <text:span text:style-name="Source_5f_Text">DATA(1)</text:span>, <text:span text:style-name="Source_5f_Text">DATA(2)</text:span>)</text:p>
        </text:list-item>
        <text:list-item>
          <text:p text:style-name="P21">Columns appear in numeric order of subscripts</text:p>
        </text:list-item>
      </text:list>
      <text:h text:style-name="Heading_20_4" text:outline-level="4"><text:bookmark-start text:name="temporary-arrays"/>Temporary Arrays<text:bookmark-end text:name="temporary-arrays"/></text:h>
      <text:list text:style-name="L4">
        <text:list-item>
          <text:p text:style-name="P22">Elements not written to output datasets</text:p>
        </text:list-item>
        <text:list-item>
          <text:p text:style-name="P22">Remain in memory until deleted or redefined</text:p>
        </text:list-item>
        <text:list-item>
          <text:p text:style-name="P22">Subject to temporary variable memory limits</text:p>
        </text:list-item>
      </text:list>
      <text:h text:style-name="Heading_20_4" text:outline-level="4"><text:bookmark-start text:name="virtual-arrays"/>Virtual Arrays<text:bookmark-end text:name="virtual-arrays"/></text:h>
      <text:list text:style-name="L5">
        <text:list-item>
          <text:p text:style-name="P23">Consist of one or more existing scalar variables</text:p>
        </text:list-item>
        <text:list-item>
          <text:p text:style-name="P23">Constituent variables ordered as specified in <text:span text:style-name="Source_5f_Text">ARRAY</text:span> statement</text:p>
        </text:list-item>
        <text:list-item>
          <text:p text:style-name="P23">All elements must be same type as specified by array name</text:p>
        </text:list-item>
        <text:list-item>
          <text:p text:style-name="P23">When creating a virtual array with <text:span text:style-name="Source_5f_Text">ARRAY</text:span> command, all constituent variables must already exist; otherwise statement fails with error</text:p>
        </text:list-item>
        <text:list-item>
          <text:p text:style-name="P23">May consist of permanent variables, temporary variables, or both</text:p>
        </text:list-item>
        <text:list-item>
          <text:p text:style-name="P23">Element names are aliases for constituent variable names</text:p>
        </text:list-item>
      </text:list>
      <text:p text:style-name="P24">Array Subscripting:</text:p>
      <text:list text:continue-list="list101930751418798" text:style-name="List_20_1">
        <text:list-item>
          <text:p text:style-name="P25"><text:span text:style-name="T1">Default:</text:span> 1-based (first element = subscript 1, second = subscript 2, etc.) .</text:p>
        </text:list-item>
        <text:list-item>
          <text:p text:style-name="P25"><text:span text:style-name="T1">Custom subscripts:</text:span> Supported for <text:span text:style-name="Source_5f_Text">DIM</text:span> arrays only (e.g., <text:span text:style-name="Source_5f_Text">DIM MONTH(0 </text:span><text:span text:style-name="Source_5f_Text"><text:span text:style-name="T3">TO </text:span></text:span><text:span text:style-name="Source_5f_Text">11)</text:span>, <text:span text:style-name="Source_5f_Text">DIM YEAR(2000 </text:span><text:span text:style-name="Source_5f_Text"><text:span text:style-name="T3">TO </text:span></text:span><text:span text:style-name="Source_5f_Text">2030)</text:span>).</text:p>
        </text:list-item>
        <text:list-item>
          <text:p text:style-name="P25"><text:span text:style-name="T1">Virtual arrays:</text:span> Custom subscripts not supported</text:p>
        </text:list-item>
      </text:list>
      <text:p text:style-name="P26">Multiple Element Reference:</text:p>
      <text:list xml:id="list101929958740573" text:continue-numbering="true" text:style-name="List_20_1">
        <text:list-item>
          <text:p text:style-name="P27">Comma-delimited list of subscripts: <text:span text:style-name="Source_5f_Text">ARRAY(1,3,5).</text:span></text:p>
        </text:list-item>
        <text:list-item>
          <text:p text:style-name="P27">Subscript ranges: <text:span text:style-name="Source_5f_Text">ARRAY(2:5).</text:span></text:p>
        </text:list-item>
        <text:list-item>
          <text:p text:style-name="P27"><text:soft-page-break/>Elements must already exist.</text:p>
        </text:list-item>
      </text:list>
      <text:p text:style-name="P28">Interchangeability:<text:span text:style-name="T4"> Except as specified elsewhere, arrays of the three types shall be fully interchangeable in all operations.</text:span></text:p>
      <text:p text:style-name="Text_20_body"><text:span text:style-name="T1">Error Condition:</text:span> References to non-existent array elements cause the current program to fail with an error message.</text:p>
      <text:h text:style-name="Heading_20_3" text:outline-level="3"><text:bookmark-start text:name="variable-lifecycle"/>3.4 Variable Lifecycle<text:bookmark-end text:name="variable-lifecycle"/></text:h>
      <text:h text:style-name="Heading_20_4" text:outline-level="4"><text:bookmark-start text:name="creation"/>Creation<text:bookmark-end text:name="creation"/></text:h>
      <text:p text:style-name="P29">Variables and arrays may be created by:</text:p>
      <text:list xml:id="list101931675023441" text:continue-numbering="true" text:style-name="List_20_1">
        <text:list-item>
          <text:p text:style-name="P30"><text:span text:style-name="T1">USE </text:span><text:span text:style-name="T5">command</text:span><text:span text:style-name="T1">:</text:span></text:p>
          <text:list>
            <text:list-item>
              <text:p text:style-name="P30">Columns of input dataset added as permanent variables/arrays.</text:p>
            </text:list-item>
            <text:list-item>
              <text:p text:style-name="P30">If variables/arrays with same names already exist, they are replaced.</text:p>
            </text:list-item>
            <text:list-item>
              <text:p text:style-name="P30">If names match existing virtual arrays, those virtual arrays are undefined.</text:p>
            </text:list-item>
          </text:list>
        </text:list-item>
        <text:list-item>
          <text:p text:style-name="P31"><text:span text:style-name="T1">LET command:</text:span> Creates permanent scalar variables.</text:p>
        </text:list-item>
        <text:list-item>
          <text:p text:style-name="P31"><text:span text:style-name="T1">SET command:</text:span> Creates temporary scalar variables.</text:p>
        </text:list-item>
        <text:list-item>
          <text:p text:style-name="P32">DIM command:</text:p>
          <text:list>
            <text:list-item>
              <text:p text:style-name="P30">Creates permanent or temporary arrays.</text:p>
            </text:list-item>
            <text:list-item>
              <text:p text:style-name="P30">Elements initially filled with missing values.</text:p>
            </text:list-item>
            <text:list-item>
              <text:p text:style-name="P30">May be modified by subsequent <text:span text:style-name="Source_5f_Text">LET</text:span> or <text:span text:style-name="Source_5f_Text">SET</text:span> statements.</text:p>
            </text:list-item>
            <text:list-item>
              <text:p text:style-name="P30">Appending <text:span text:style-name="Source_5f_Text">/TEMP</text:span> to <text:span text:style-name="Source_5f_Text">DIM</text:span> statement creates temporary array.</text:p>
            </text:list-item>
          </text:list>
        </text:list-item>
        <text:list-item>
          <text:p text:style-name="P31"><text:span text:style-name="T1">ARRAY command:</text:span> Creates virtual arrays from existing variables.</text:p>
        </text:list-item>
        <text:list-item>
          <text:p text:style-name="P31"><text:span text:style-name="T1">Function return values:</text:span> Some functions return arrays when referenced in <text:span text:style-name="Source_5f_Text">LET</text:span> or <text:span text:style-name="Source_5f_Text">SET</text:span> statements.</text:p>
        </text:list-item>
      </text:list>
      <text:h text:style-name="Heading_20_4" text:outline-level="4"><text:bookmark-start text:name="initialization"/>Initialization<text:bookmark-end text:name="initialization"/></text:h>
      <text:p text:style-name="P33">Permanent Variables:</text:p>
      <text:list xml:id="list101930658836619" text:continue-numbering="true" text:style-name="List_20_1">
        <text:list-item>
          <text:p text:style-name="P34">Unless <text:span text:style-name="Source_5f_Text">HOLD</text:span> statement is in effect, reset to missing each time new record is read or created.</text:p>
        </text:list-item>
        <text:list-item>
          <text:p text:style-name="P34">If <text:span text:style-name="Source_5f_Text">HOLD</text:span> statement is in effect, variables not in input dataset retain values until explicitly changed.</text:p>
        </text:list-item>
        <text:list-item>
          <text:p text:style-name="P34">Variables appearing in input dataset are set to new values as each record is read (<text:span text:style-name="Source_5f_Text">HOLD</text:span> has no <text:soft-page-break/>effect on these).</text:p>
        </text:list-item>
      </text:list>
      <text:p text:style-name="Text_20_body"><text:span text:style-name="T1">Temporary Variables:</text:span> - Always retain values until/unless explicitly changed.</text:p>
      <text:h text:style-name="Heading_20_4" text:outline-level="4"><text:bookmark-start text:name="deletion"/>Deletion<text:bookmark-end text:name="deletion"/></text:h>
      <text:p text:style-name="P35">Variables and arrays may be deleted by:</text:p>
      <text:list xml:id="list101929689326602" text:continue-numbering="true" text:style-name="List_20_1">
        <text:list-item>
          <text:p text:style-name="P36">DROP command:</text:p>
          <text:list>
            <text:list-item>
              <text:p text:style-name="P37">Explicitly deletes specified variables/arrays.</text:p>
            </text:list-item>
            <text:list-item>
              <text:p text:style-name="P37">If <text:span text:style-name="Source_5f_Text">DROP</text:span> lists a variable also in <text:span text:style-name="Source_5f_Text">KEEP</text:span> statement, variable is deleted nevertheless (modifies <text:span text:style-name="Source_5f_Text">KEEP</text:span> statement).</text:p>
            </text:list-item>
            <text:list-item>
              <text:p text:style-name="P37">Individual array elements cannot be deleted.</text:p>
            </text:list-item>
          </text:list>
        </text:list-item>
        <text:list-item>
          <text:p text:style-name="P36">KEEP statement:</text:p>
          <text:list>
            <text:list-item>
              <text:p text:style-name="P37">When executed, all permanent variables/arrays NOT listed are deleted at last step of next <text:span text:style-name="Source_5f_Text">RUN</text:span> statement.</text:p>
            </text:list-item>
            <text:list-item>
              <text:p text:style-name="P37">If virtual array mentioned in <text:span text:style-name="Source_5f_Text">KEEP</text:span>, all constituent variables are retained.</text:p>
            </text:list-item>
            <text:list-item>
              <text:p text:style-name="P37">If virtual array mentioned in <text:span text:style-name="Source_5f_Text">DROP</text:span>, all constituent variables are deleted along with virtual array definition.</text:p>
            </text:list-item>
          </text:list>
        </text:list-item>
        <text:list-item>
          <text:p text:style-name="P38"><text:span text:style-name="T1">Virtual array operations:</text:span> May be redefined or deleted without affecting constituent variables using <text:span text:style-name="Source_5f_Text">ARRAY</text:span> statement.</text:p>
        </text:list-item>
      </text:list>
      <text:h text:style-name="Heading_20_3" text:outline-level="3"><text:bookmark-start text:name="variable-modification"/>3.5 Variable Modification<text:bookmark-end text:name="variable-modification"/></text:h>
      <text:h text:style-name="Heading_20_4" text:outline-level="4"><text:bookmark-start text:name="redefinition-rules"/>Redefinition Rules<text:bookmark-end text:name="redefinition-rules"/></text:h>
      <text:list text:style-name="L6">
        <text:list-item>
          <text:p text:style-name="P39">Existing scalar variables and array elements may be redefined by <text:span text:style-name="Source_5f_Text">LET</text:span> or <text:span text:style-name="Source_5f_Text">SET</text:span> statements.</text:p>
        </text:list-item>
        <text:list-item>
          <text:p text:style-name="P39"><text:span text:style-name="T1">Permanent → Temporary:</text:span> If permanent variable/array redefined by <text:span text:style-name="Source_5f_Text">SET</text:span>, it becomes temporary.</text:p>
        </text:list-item>
        <text:list-item>
          <text:p text:style-name="P39"><text:span text:style-name="T1">Temporary → Permanent:</text:span> If temporary variable/array redefined by LET, it becomes permanent.</text:p>
        </text:list-item>
        <text:list-item>
          <text:p text:style-name="P39"><text:span text:style-name="T1">Temporary → Permanent via KEEP:</text:span> Listing temporary variable/array in <text:span text:style-name="Source_5f_Text">KEEP</text:span> statement makes it permanent.</text:p>
        </text:list-item>
        <text:list-item>
          <text:p text:style-name="P39">Existing arrays may not be redefined as scalar variables unless first deleted.</text:p>
        </text:list-item>
        <text:list-item>
          <text:p text:style-name="P39">Existing scalar variables may not be redefined as arrays unless first deleted.</text:p>
        </text:list-item>
      </text:list>
      <text:h text:style-name="Heading_20_4" text:outline-level="4"><text:bookmark-start text:name="array-modification-restrictions"/>Array Modification Restrictions<text:bookmark-end text:name="array-modification-restrictions"/></text:h>
      <text:list text:style-name="L7">
        <text:list-item>
          <text:p text:style-name="P40"><text:span text:style-name="Source_5f_Text">LET</text:span> statement may not modify individual elements of temporary array.</text:p>
        </text:list-item>
        <text:list-item>
          <text:p text:style-name="P40"><text:span text:style-name="Source_5f_Text">SET</text:span> statement may not modify individual elements of virtual or permanent array.</text:p>
        </text:list-item>
        <text:list-item>
          <text:p text:style-name="P40"><text:soft-page-break/>Virtual array may be redefined by new <text:span text:style-name="Source_5f_Text">ARRAY</text:span> statement (no effect on constituent variables).</text:p>
        </text:list-item>
        <text:list-item>
          <text:p text:style-name="P40">Virtual array may be replaced by permanent/temporary array using <text:span text:style-name="Source_5f_Text">DIM</text:span> (no effect on former constituent variables).</text:p>
        </text:list-item>
      </text:list>
      <text:h text:style-name="Heading_20_4" text:outline-level="4"><text:bookmark-start text:name="array-resizing"/>Array Resizing<text:bookmark-end text:name="array-resizing"/></text:h>
      <text:p text:style-name="P41">Arrays with numbered elements may be resized with new <text:span text:style-name="Source_5f_Text">DIM</text:span> statement:</text:p>
      <text:list xml:id="list101930375479814" text:continue-list="list101929689326602" text:style-name="List_20_1">
        <text:list-item>
          <text:p text:style-name="P42"><text:span text:style-name="T1">Contraction:</text:span> Elements outside new range are deleted.</text:p>
        </text:list-item>
        <text:list-item>
          <text:p text:style-name="P42"><text:span text:style-name="T1">Expansion:</text:span> New elements filled with missing values.</text:p>
        </text:list-item>
        <text:list-item>
          <text:p text:style-name="P42"><text:span text:style-name="T1">Mixed (expand one end, contract other):</text:span> Both above rules apply.</text:p>
        </text:list-item>
      </text:list>
      <text:h text:style-name="Heading_20_4" text:outline-level="4"><text:bookmark-start text:name="array-redefinition"/>Array Redefinition<text:bookmark-end text:name="array-redefinition"/></text:h>
      <text:p text:style-name="P41">Existing array may be redefined by <text:span text:style-name="Source_5f_Text">LET</text:span> or <text:span text:style-name="Source_5f_Text">SET</text:span> statement that would otherwise create new array. <text:s/>If array is virtual, constituent scalar variables are not modified.</text:p>
      <text:h text:style-name="Heading_20_3" text:outline-level="3"><text:bookmark-start text:name="ranges-and-literals"/>3.6 Ranges and Literals<text:bookmark-end text:name="ranges-and-literals"/></text:h>
      <text:h text:style-name="Heading_20_4" text:outline-level="4"><text:bookmark-start text:name="range-notation"/>Range Notation<text:bookmark-end text:name="range-notation"/></text:h>
      <text:p text:style-name="First_20_paragraph">Two kinds of range notation are supported:</text:p>
      <text:list text:continue-numbering="true" text:style-name="List_20_1">
        <text:list-item>
          <text:p text:style-name="P43">Dash Range (table order):</text:p>
          <text:list>
            <text:list-item>
              <text:p text:style-name="P44">Format: <text:span text:style-name="Source_5f_Text">VAR1-VAR5</text:span></text:p>
            </text:list-item>
            <text:list-item>
              <text:p text:style-name="P44">Includes: Named variables and any between them in the internal table, in table order.</text:p>
            </text:list-item>
            <text:list-item>
              <text:p text:style-name="P44">Example: <text:span text:style-name="Source_5f_Text">CRIM-LSTAT</text:span> (<text:span text:style-name="Variable">CRIM</text:span> through <text:span text:style-name="Variable">LSTAT</text:span> in current internal table).</text:p>
            </text:list-item>
          </text:list>
        </text:list-item>
        <text:list-item>
          <text:p text:style-name="P43">Colon Range (numeric order):</text:p>
          <text:list>
            <text:list-item>
              <text:p text:style-name="P44">Format: <text:span text:style-name="Source_5f_Text">VAR1:VAR10</text:span></text:p>
            </text:list-item>
            <text:list-item>
              <text:p text:style-name="P44">Includes: Variables between named ones in numeric order</text:p>
            </text:list-item>
            <text:list-item>
              <text:p text:style-name="P44">Variable names must end with one or more numerals (excluding <text:span text:style-name="Source_5f_Text">$</text:span>, <text:span text:style-name="Source_5f_Text">%</text:span>, subscript).</text:p>
            </text:list-item>
            <text:list-item>
              <text:p text:style-name="P44">Non-existent variables are created if applicable (not needed for <text:span text:style-name="Source_5f_Text">DROP</text:span> statement).</text:p>
            </text:list-item>
            <text:list-item>
              <text:p text:style-name="P44">Example: <text:span text:style-name="Variable">MONTHPAY1:MONTHPAY60</text:span> (<text:span text:style-name="Variable">MONTHPAY1</text:span> through <text:span text:style-name="Variable">MONTHPAY60</text:span> in numeric order).</text:p>
            </text:list-item>
          </text:list>
        </text:list-item>
      </text:list>
      <text:p text:style-name="P45">Array Element Ranges:</text:p>
      <text:list text:continue-numbering="true" text:style-name="List_20_1">
        <text:list-item>
          <text:p text:style-name="P46">Format: <text:span text:style-name="Variable">ARRAY(start:end)</text:span><text:span text:style-name="Source_5f_Text">.</text:span></text:p>
        </text:list-item>
        <text:list-item>
          <text:p text:style-name="P46"><text:soft-page-break/>Example: <text:span text:style-name="Variable">FINGER_LEN(2:3)</text:span> (second and third members).</text:p>
        </text:list-item>
      </text:list>
      <text:p text:style-name="P47">Usage with LET/SET:</text:p>
      <text:list xml:id="list101931448987616" text:continue-numbering="true" text:style-name="List_20_1">
        <text:list-item>
          <text:p text:style-name="P48">Ranges may be used to redefine array subsets.</text:p>
        </text:list-item>
        <text:list-item>
          <text:p text:style-name="P48">Size of array defined by expression must equal size of array subset being written.</text:p>
        </text:list-item>
      </text:list>
      <text:h text:style-name="Heading_20_4" text:outline-level="4"><text:bookmark-start text:name="literals"/>Literals<text:bookmark-end text:name="literals"/></text:h>
      <text:list xml:id="list101929874019732" text:continue-numbering="true" text:style-name="List_20_1">
        <text:list-item>
          <text:p text:style-name="P49">Numeric Literals:</text:p>
          <text:list>
            <text:list-item>
              <text:p text:style-name="P50">Base ten only (may change in future versions).</text:p>
            </text:list-item>
            <text:list-item>
              <text:p text:style-name="P50">May be integers, floating point numbers, or E notation.</text:p>
            </text:list-item>
            <text:list-item>
              <text:p text:style-name="P50">Missing numeric value: unquoted period (<text:span text:style-name="Source_5f_Text">.</text:span>).</text:p>
            </text:list-item>
          </text:list>
        </text:list-item>
        <text:list-item>
          <text:p text:style-name="P51">Character Literals:</text:p>
          <text:list>
            <text:list-item>
              <text:p text:style-name="P52">Surrounded by single or double quotes.</text:p>
            </text:list-item>
            <text:list-item>
              <text:p text:style-name="P52">Missing character value: empty string (<text:span text:style-name="Source_5f_Text">""</text:span>).</text:p>
            </text:list-item>
          </text:list>
        </text:list-item>
      </text:list>
      <text:h text:style-name="Heading_20_2" text:outline-level="2" text:is-list-header="true">4. FILE I/O</text:h>
      <text:h text:style-name="Heading_20_3" text:outline-level="3"><text:bookmark-start text:name="supported-file-formats"/>4.1 Supported File Formats<text:bookmark-end text:name="supported-file-formats"/></text:h>
      <text:p text:style-name="First_20_paragraph">Three file formats are supported for data input and output:</text:p>
      <text:h text:style-name="P53" text:outline-level="4"><text:bookmark-start text:name="csv-files"/>CSV Files<text:bookmark-end text:name="csv-files"/></text:h>
      <text:list text:continue-numbering="true" text:style-name="List_20_1">
        <text:list-item>
          <text:p text:style-name="P54">Character Sets:</text:p>
          <text:list>
            <text:list-item>
              <text:p text:style-name="P55">Supported: ASCII, UTF-8, UTF-16, plus any other character sets supported by host system.</text:p>
            </text:list-item>
            <text:list-item>
              <text:p text:style-name="P55">Portable guarantee: Only ASCII, UTF-8, and UTF-16 guaranteed portable between systems.</text:p>
            </text:list-item>
          </text:list>
        </text:list-item>
        <text:list-item>
          <text:p text:style-name="P54">Input (USE command):</text:p>
          <text:list>
            <text:list-item>
              <text:p text:style-name="P55">Character set auto-detected by default.</text:p>
            </text:list-item>
            <text:list-item>
              <text:p text:style-name="P55">Override with <text:span text:style-name="Source_5f_Text">CHARSET</text:span> option to correct wrong guesses.</text:p>
            </text:list-item>
            <text:list-item>
              <text:p text:style-name="P55">Invalid characters for detected/specified charset: operation fails with error message.</text:p>
            </text:list-item>
          </text:list>
        </text:list-item>
        <text:list-item>
          <text:p text:style-name="P54">Output (SAVE command):</text:p>
          <text:list>
            <text:list-item>
              <text:p text:style-name="P55">Character set specified by <text:span text:style-name="Source_5f_Text">CHARSET</text:span> option.</text:p>
            </text:list-item>
            <text:list-item>
              <text:p text:style-name="P55">Default: session locale, unless changed with <text:span text:style-name="Source_5f_Text">OPTIONS CHARSET.</text:span></text:p>
            </text:list-item>
            <text:list-item>
              <text:p text:style-name="P55"><text:soft-page-break/>Characters not representable in output charset: operation fails with error message.</text:p>
            </text:list-item>
          </text:list>
        </text:list-item>
        <text:list-item>
          <text:p text:style-name="P56">Delimiters:</text:p>
          <text:list>
            <text:list-item>
              <text:p text:style-name="P57">Determined by <text:span text:style-name="Source_5f_Text">DLM</text:span> flag on <text:span text:style-name="Source_5f_Text">USE</text:span> and <text:span text:style-name="Source_5f_Text">SAVE</text:span> commands.</text:p>
            </text:list-item>
            <text:list-item>
              <text:p text:style-name="P57">Default: comma, unless changed by <text:span text:style-name="Source_5f_Text">OPTIONS CSVDLM.</text:span></text:p>
            </text:list-item>
            <text:list-item>
              <text:p text:style-name="P57">May be more than one character long.</text:p>
            </text:list-item>
          </text:list>
        </text:list-item>
        <text:list-item>
          <text:p text:style-name="P58">Quote Handling:</text:p>
          <text:list>
            <text:list-item>
              <text:p text:style-name="P59">Embedded quotes: handled by doubling.</text:p>
            </text:list-item>
            <text:list-item>
              <text:p text:style-name="P59">Single quotes inside double-quoted string: taken literally.</text:p>
            </text:list-item>
            <text:list-item>
              <text:p text:style-name="P59">Double quotes inside single-quoted string: taken literally.</text:p>
            </text:list-item>
          </text:list>
        </text:list-item>
        <text:list-item>
          <text:p text:style-name="P60">Headers:</text:p>
          <text:list>
            <text:list-item>
              <text:p text:style-name="P61">Governed by <text:span text:style-name="Source_5f_Text">HEADER</text:span> option on <text:span text:style-name="Source_5f_Text">USE</text:span> and <text:span text:style-name="Source_5f_Text">SAVE</text:span> commands (values: <text:span text:style-name="Source_5f_Text">YES</text:span> or <text:span text:style-name="Source_5f_Text">NO</text:span>).</text:p>
            </text:list-item>
            <text:list-item>
              <text:p text:style-name="P61">Default: <text:span text:style-name="Source_5f_Text">YES</text:span>, unless changed by <text:span text:style-name="Source_5f_Text">OPTIONS HEADER.</text:span></text:p>
            </text:list-item>
            <text:list-item>
              <text:p text:style-name="P61">Affects spreadsheets same way as CSV.</text:p>
            </text:list-item>
          </text:list>
        </text:list-item>
        <text:list-item>
          <text:p text:style-name="P62">Line Endings:</text:p>
          <text:list>
            <text:list-item>
              <text:p text:style-name="P63">Default: standard for operating system.</text:p>
            </text:list-item>
            <text:list-item>
              <text:p text:style-name="P63">Changed via <text:span text:style-name="Source_5f_Text">OPTIONS TXTFMT</text:span>.</text:p>
            </text:list-item>
          </text:list>
        </text:list-item>
        <text:list-item>
          <text:p text:style-name="P62">Input (USE):</text:p>
          <text:list>
            <text:list-item>
              <text:p text:style-name="P63">Attempts auto-detection if <text:span text:style-name="Source_5f_Text">OPTIONS TXTFMT = AUTO</text:span> (default).</text:p>
            </text:list-item>
          </text:list>
        </text:list-item>
        <text:list-item>
          <text:p text:style-name="P63"><text:span text:style-name="T1">Output </text:span><text:span text:style-name="T6">(SAVE)</text:span><text:span text:style-name="T1">:</text:span></text:p>
          <text:list>
            <text:list-item>
              <text:p text:style-name="P63">Uses current TXTFMT setting.</text:p>
            </text:list-item>
          </text:list>
        </text:list-item>
        <text:list-item>
          <text:p text:style-name="P62">Overwrite Behavior:</text:p>
          <text:list>
            <text:list-item>
              <text:p text:style-name="P64">Governed by <text:span text:style-name="Source_5f_Text">OPTIONS SAVEOVERWRT.</text:span></text:p>
            </text:list-item>
            <text:list-item>
              <text:p text:style-name="P64">Default: overwriting permitted.</text:p>
            </text:list-item>
          </text:list>
        </text:list-item>
      </text:list>
      <text:h text:style-name="P53" text:outline-level="4"><text:bookmark-start text:name="odf-spreadsheets"/>ODF Spreadsheets<text:bookmark-end text:name="odf-spreadsheets"/></text:h>
      <text:list xml:id="list101931014492286" text:continue-numbering="true" text:style-name="List_20_1">
        <text:list-item>
          <text:p text:style-name="P65">Input <text:span text:style-name="T7">(USE)</text:span>:</text:p>
          <text:list>
            <text:list-item>
              <text:p text:style-name="P66">Multiple sheets: First sheet read unless different sheet specified in brackets after filename.</text:p>
            </text:list-item>
            <text:list-item>
              <text:p text:style-name="P65"><text:span text:style-name="T4">Example: </text:span><text:span text:style-name="Source_5f_Text"><text:span text:style-name="T4">"multibook.ods[sheet2]"</text:span></text:span><text:span text:style-name="T4"> - Empty rows and columns: Completely empty ones </text:span><text:soft-page-break/><text:span text:style-name="T4">are skipped.</text:span></text:p>
            </text:list-item>
          </text:list>
        </text:list-item>
        <text:list-item>
          <text:p text:style-name="P67">Output <text:span text:style-name="T7">(SAVE)</text:span>:</text:p>
          <text:list>
            <text:list-item>
              <text:p text:style-name="P68">If sheet not specified and workbook doesn’t exist: Created with single sheet named “Sheet1”.</text:p>
            </text:list-item>
            <text:list-item>
              <text:p text:style-name="P68">If workbook exists with single sheet: That sheet overwritten (unless overwriting disabled).</text:p>
            </text:list-item>
            <text:list-item>
              <text:p text:style-name="P68">If specific sheet specified:</text:p>
              <text:list>
                <text:list-item>
                  <text:p text:style-name="P68">Sheet exists: Overwritten (unless disabled).</text:p>
                </text:list-item>
                <text:list-item>
                  <text:p text:style-name="P68">Sheet doesn’t exist: Created.</text:p>
                </text:list-item>
              </text:list>
            </text:list-item>
          </text:list>
        </text:list-item>
        <text:list-item>
          <text:p text:style-name="P69">Formulas:</text:p>
          <text:list>
            <text:list-item>
              <text:p text:style-name="P70">Evaluated during read process.</text:p>
            </text:list-item>
            <text:list-item>
              <text:p text:style-name="P70">Computed values used.</text:p>
            </text:list-item>
            <text:list-item>
              <text:p text:style-name="P70">If formula cannot be evaluated (errors or unsupported functions):</text:p>
              <text:list>
                <text:list-item>
                  <text:p text:style-name="P70"><text:span text:style-name="T8">C</text:span>ell treated as missing value.</text:p>
                </text:list-item>
                <text:list-item>
                  <text:p text:style-name="P70">Formulas not supported for internal calculations or output.</text:p>
                </text:list-item>
              </text:list>
            </text:list-item>
          </text:list>
        </text:list-item>
        <text:list-item>
          <text:p text:style-name="P71">Merged Cells:</text:p>
          <text:list>
            <text:list-item>
              <text:p text:style-name="P72">Unsupported.</text:p>
            </text:list-item>
            <text:list-item>
              <text:p text:style-name="P72">Attempt to read spreadsheet with merged cells: fails with error message.</text:p>
            </text:list-item>
          </text:list>
        </text:list-item>
        <text:list-item>
          <text:p text:style-name="P71">Overwrite Behavior:<text:span text:style-name="T4"> </text:span><text:span text:style-name="T9">Same as </text:span><text:span text:style-name="T10">for </text:span><text:span text:style-name="T9">CSV.</text:span></text:p>
        </text:list-item>
      </text:list>
      <text:h text:style-name="P53" text:outline-level="4"><text:bookmark-start text:name="ooxml-spreadsheets"/>OOXML Spreadsheets<text:bookmark-end text:name="ooxml-spreadsheets"/></text:h>
      <text:p text:style-name="First_20_paragraph">Same behavior as ODF spreadsheets (see above).</text:p>
      <text:p text:style-name="Text_20_body"><text:span text:style-name="T1">Note:</text:span> Support for other formats likely to be added in future versions.</text:p>
      <text:h text:style-name="Heading_20_3" text:outline-level="3"><text:bookmark-start text:name="input-operations"/>4.2 Input Operations<text:bookmark-end text:name="input-operations"/></text:h>
      <text:p text:style-name="First_20_paragraph"><text:span text:style-name="T1">USE Statement:</text:span> Reads dataset into internal table, creating permanent variables from columns.</text:p>
      <text:list xml:id="list101929815851514" text:continue-numbering="true" text:style-name="List_20_1">
        <text:list-item>
          <text:p text:style-name="P73">Type Detection:</text:p>
          <text:list>
            <text:list-item>
              <text:p text:style-name="P74">First <text:span text:style-name="Source_5f_Text">NSCAN</text:span> records examined to determine column types (default <text:span text:style-name="Source_5f_Text">NSCAN</text:span> = 20).</text:p>
            </text:list-item>
            <text:list-item>
              <text:p text:style-name="P74">After type detection, non-numeric values in numeric columns: set to missing value, warning issued.</text:p>
            </text:list-item>
            <text:list-item>
              <text:p text:style-name="P74"><text:soft-page-break/>Duplicate column names: Last occurrence wins, warning issued.</text:p>
            </text:list-item>
          </text:list>
        </text:list-item>
        <text:list-item>
          <text:p text:style-name="P75">Error Conditions:</text:p>
          <text:list>
            <text:list-item>
              <text:p text:style-name="P76">Non-existent file: fails with error.</text:p>
            </text:list-item>
            <text:list-item>
              <text:p text:style-name="P76">File without read permission: fails with error.</text:p>
            </text:list-item>
          </text:list>
        </text:list-item>
      </text:list>
      <text:h text:style-name="Heading_20_3" text:outline-level="3"><text:bookmark-start text:name="output-operations"/>4.3 Output Operations<text:bookmark-end text:name="output-operations"/></text:h>
      <text:p text:style-name="First_20_paragraph"><text:span text:style-name="T1">SAVE Statement:</text:span> Writes internal table to specified dataset.</text:p>
      <text:list xml:id="list101930387203046" text:continue-numbering="true" text:style-name="List_20_1">
        <text:list-item>
          <text:p text:style-name="P77">Missing Value Representation:</text:p>
          <text:list>
            <text:list-item>
              <text:p text:style-name="P78">CSV files: Consecutive delimiters.</text:p>
            </text:list-item>
            <text:list-item>
              <text:p text:style-name="P78">Spreadsheets: Empty cell.</text:p>
            </text:list-item>
          </text:list>
        </text:list-item>
        <text:list-item>
          <text:p text:style-name="P79">Error Conditions:</text:p>
          <text:list>
            <text:list-item>
              <text:p text:style-name="P80">File without write permission: fails with error.</text:p>
            </text:list-item>
            <text:list-item>
              <text:p text:style-name="P80">Non-existent target directory: fails with error.</text:p>
            </text:list-item>
            <text:list-item>
              <text:p text:style-name="P80">Permission verification: Immediately upon statement execution, before actual write.</text:p>
            </text:list-item>
          </text:list>
        </text:list-item>
        <text:list-item>
          <text:p text:style-name="P81"><text:span text:style-name="T1">Overwrite Behavior:</text:span> Controlled by <text:span text:style-name="Source_5f_Text">OPTIONS SAVEOVERWRT</text:span> (default: permitted).</text:p>
        </text:list-item>
      </text:list>
      <text:h text:style-name="Heading_20_3" text:outline-level="3"><text:bookmark-start text:name="file-naming-conventions"/>4.4 File Naming Conventions<text:bookmark-end text:name="file-naming-conventions"/></text:h>
      <text:list xml:id="list101931482753977" text:continue-numbering="true" text:style-name="List_20_1">
        <text:list-item>
          <text:p text:style-name="P82">Format Detection by Extension:</text:p>
          <text:list>
            <text:list-item>
              <text:p text:style-name="P83"><text:span text:style-name="Source_5f_Text">.xlsx</text:span>, <text:span text:style-name="Source_5f_Text">.XLSX</text:span>: OOXML Workbook.</text:p>
            </text:list-item>
            <text:list-item>
              <text:p text:style-name="P83"><text:span text:style-name="Source_5f_Text">.ods</text:span>, <text:span text:style-name="Source_5f_Text">.ODS</text:span>: ODF Workbook.</text:p>
            </text:list-item>
            <text:list-item>
              <text:p text:style-name="P83">No extension or other extension: CSV.</text:p>
            </text:list-item>
          </text:list>
        </text:list-item>
        <text:list-item>
          <text:p text:style-name="P84">Unquoted Filenames:</text:p>
          <text:list>
            <text:list-item>
              <text:p text:style-name="P85">Converted to uppercase.</text:p>
            </text:list-item>
            <text:list-item>
              <text:p text:style-name="P85">Default extension appended if none present:</text:p>
              <text:list>
                <text:list-item>
                  <text:p text:style-name="P85">Data files (<text:span text:style-name="Source_5f_Text">USE</text:span>/<text:span text:style-name="Source_5f_Text">SAVE</text:span>): <text:span text:style-name="Source_5f_Text">.CSV</text:span></text:p>
                </text:list-item>
                <text:list-item>
                  <text:p text:style-name="P85">Console output files (<text:span text:style-name="Source_5f_Text">OUTPUT</text:span>): <text:span text:style-name="Source_5f_Text">.DAT</text:span></text:p>
                </text:list-item>
                <text:list-item>
                  <text:p text:style-name="P85">Scripts (<text:span text:style-name="Source_5f_Text">SUBMIT</text:span>): <text:span text:style-name="Source_5f_Text">.CMD</text:span></text:p>
                </text:list-item>
              </text:list>
            </text:list-item>
          </text:list>
        </text:list-item>
        <text:list-item>
          <text:p text:style-name="P81"><text:span text:style-name="T1">Explicit Format Specification:</text:span> Format may be specified explicitly with <text:span text:style-name="Source_5f_Text">FMT</text:span> option on <text:span text:style-name="Source_5f_Text">USE</text:span> and <text:span text:style-name="Source_5f_Text">SAVE</text:span> commands, overriding extension-based detection.</text:p>
        </text:list-item>
      </text:list>
      <text:h text:style-name="Heading_20_3" text:outline-level="3"><text:bookmark-start text:name="error-handling"/><text:soft-page-break/>4.5 Error Handling<text:bookmark-end text:name="error-handling"/></text:h>
      <text:list xml:id="list101930887305699" text:continue-numbering="true" text:style-name="List_20_1">
        <text:list-item>
          <text:p text:style-name="P86">Permission Errors:</text:p>
          <text:list>
            <text:list-item>
              <text:p text:style-name="P87">Attempt to read file without permission: fails with error message.</text:p>
            </text:list-item>
            <text:list-item>
              <text:p text:style-name="P87">Attempt to write file without permission: fails with error message.</text:p>
            </text:list-item>
          </text:list>
        </text:list-item>
        <text:list-item>
          <text:p text:style-name="P88">File System Errors:</text:p>
          <text:list>
            <text:list-item>
              <text:p text:style-name="P89">Non-existent input file: fails with error message.</text:p>
            </text:list-item>
            <text:list-item>
              <text:p text:style-name="P89">Non-existent target directory for output: fails with error message.</text:p>
            </text:list-item>
            <text:list-item>
              <text:p text:style-name="P89">Permission verification for <text:span text:style-name="Source_5f_Text">SAVE</text:span>/<text:span text:style-name="Source_5f_Text">OUTPUT</text:span>: performed immediately when statement executed.</text:p>
            </text:list-item>
          </text:list>
        </text:list-item>
        <text:list-item>
          <text:p text:style-name="P90">Character Set Errors:</text:p>
          <text:list>
            <text:list-item>
              <text:p text:style-name="P91">Invalid characters in detected/specified charset (<text:span text:style-name="Source_5f_Text">USE</text:span>): fails with error message.</text:p>
            </text:list-item>
            <text:list-item>
              <text:p text:style-name="P91">Characters not representable in output charset (<text:span text:style-name="Source_5f_Text">SAVE</text:span>): fails with error message.</text:p>
            </text:list-item>
          </text:list>
        </text:list-item>
        <text:list-item>
          <text:p text:style-name="P92"><text:span text:style-name="T1">Data Integrity:</text:span> For <text:span text:style-name="Source_5f_Text">SAVE</text:span> and <text:span text:style-name="Source_5f_Text">OUTPUT</text:span> statements, interpreter shall immediately verify:</text:p>
          <text:list>
            <text:list-item>
              <text:p text:style-name="P92">Target directory exists - User has permission to create target file OR overwrite existing file.</text:p>
            </text:list-item>
            <text:list-item>
              <text:p text:style-name="P92">If conditions not met: statement fails with error message.</text:p>
            </text:list-item>
          </text:list>
        </text:list-item>
      </text:list>
      <text:h text:style-name="Heading_20_2" text:outline-level="2">5. EXECUTION MODEL</text:h>
      <text:h text:style-name="Heading_20_3" text:outline-level="3"><text:bookmark-start text:name="the-data-step"/>5.1 The Data Step<text:bookmark-end text:name="the-data-step"/></text:h>
      <text:p text:style-name="First_20_paragraph">The interpreter operates in a “data step” model where statements are executed for each record (row) in the internal table.</text:p>
      <text:p text:style-name="P93">Record Iteration:</text:p>
      <text:list text:continue-numbering="true" text:style-name="List_20_1">
        <text:list-item>
          <text:p text:style-name="P92">When <text:span text:style-name="Source_5f_Text">USE</text:span> statement is in effect:</text:p>
          <text:list>
            <text:list-item>
              <text:p text:style-name="P92">Statements execute once per record read from input dataset.</text:p>
            </text:list-item>
          </text:list>
        </text:list-item>
        <text:list-item>
          <text:p text:style-name="P92">When <text:span text:style-name="Source_5f_Text">REPEAT</text:span> statement is in effect:</text:p>
          <text:list>
            <text:list-item>
              <text:p text:style-name="P92">Statements execute n times, creating records.</text:p>
            </text:list-item>
            <text:list-item>
              <text:p text:style-name="P92">Current record context maintained throughout execution.</text:p>
            </text:list-item>
          </text:list>
        </text:list-item>
      </text:list>
      <text:p text:style-name="P94">Record Processing:</text:p>
      <text:list xml:id="list101931354079135" text:continue-numbering="true" text:style-name="List_20_1">
        <text:list-item>
          <text:p text:style-name="P95">Each record read or created becomes the “current record”.</text:p>
        </text:list-item>
        <text:list-item>
          <text:p text:style-name="P95">Variable values for current record accessible to all statements.</text:p>
        </text:list-item>
        <text:list-item>
          <text:p text:style-name="P95"><text:soft-page-break/>Output record written when data step completes for that record.</text:p>
        </text:list-item>
      </text:list>
      <text:h text:style-name="Heading_20_3" text:outline-level="3"><text:bookmark-start text:name="by-group-processing"/>5.2 BY Group Processing<text:bookmark-end text:name="by-group-processing"/></text:h>
      <text:list xml:id="list101931586396892" text:continue-numbering="true" text:style-name="List_20_1">
        <text:list-item>
          <text:p text:style-name="P96"><text:span text:style-name="T1">Purpose:</text:span> <text:span text:style-name="Source_5f_Text">BY</text:span> statement divides input into blocks based on variable value combinations.</text:p>
        </text:list-item>
        <text:list-item>
          <text:p text:style-name="P97">Grouping Rules:</text:p>
          <text:list>
            <text:list-item>
              <text:p text:style-name="P98">Blocks defined by consecutive records with same combination of <text:span text:style-name="Source_5f_Text">BY</text:span> variable values.</text:p>
            </text:list-item>
            <text:list-item>
              <text:p text:style-name="P98">New block begins whenever ANY <text:span text:style-name="Source_5f_Text">BY</text:span> variable value changes.</text:p>
            </text:list-item>
            <text:list-item>
              <text:p text:style-name="P98">Blocks with same value combination but not consecutive are treated as separate blocks.</text:p>
            </text:list-item>
            <text:list-item>
              <text:p text:style-name="P98">Blocks need not be in sorted order.</text:p>
            </text:list-item>
            <text:list-item>
              <text:p text:style-name="P98">Missing values in <text:span text:style-name="Source_5f_Text">BY</text:span> variables treated as distinct values for grouping purposes.</text:p>
            </text:list-item>
          </text:list>
        </text:list-item>
        <text:list-item>
          <text:p text:style-name="P81"><text:span text:style-name="T1">Requirements:</text:span> - <text:span text:style-name="Source_5f_Text">USE</text:span> statement must be in effect; otherwise <text:span text:style-name="Source_5f_Text">BY</text:span> statement fails with error message</text:p>
        </text:list-item>
        <text:list-item>
          <text:p text:style-name="P99">Functions:</text:p>
          <text:list>
            <text:list-item>
              <text:p text:style-name="P100"><text:span text:style-name="Source_5f_Text">BOG()</text:span>: True <text:span text:style-name="T11">(1) </text:span>at beginning of <text:span text:style-name="Source_5f_Text">BY</text:span> group, false <text:span text:style-name="T11">(0) </text:span>otherwise.</text:p>
            </text:list-item>
            <text:list-item>
              <text:p text:style-name="P100"><text:span text:style-name="Source_5f_Text">EOG()</text:span>: True <text:span text:style-name="T11">(1) </text:span>at end of BY group, false <text:span text:style-name="T11">(0) </text:span>otherwise.</text:p>
            </text:list-item>
            <text:list-item>
              <text:p text:style-name="P100">If <text:span text:style-name="Source_5f_Text">BY</text:span> statement not in effect, <text:span text:style-name="Source_5f_Text">BOG()</text:span> behaves like <text:span text:style-name="Source_5f_Text">BOF()</text:span>, <text:span text:style-name="Source_5f_Text">EOG()</text:span> behaves like <text:span text:style-name="Source_5f_Text">EOF()</text:span>.</text:p>
            </text:list-item>
          </text:list>
        </text:list-item>
      </text:list>
      <text:h text:style-name="Heading_20_3" text:outline-level="3"><text:bookmark-start text:name="control-flow"/>5.3 Control Flow<text:bookmark-end text:name="control-flow"/></text:h>
      <text:h text:style-name="Heading_20_4" text:outline-level="4"><text:bookmark-start text:name="nesting"/>Nesting<text:bookmark-end text:name="nesting"/></text:h>
      <text:list xml:id="list101929668953090" text:continue-numbering="true" text:style-name="List_20_1">
        <text:list-item>
          <text:p text:style-name="P101">Looping Blocks:</text:p>
          <text:list>
            <text:list-item>
              <text:p text:style-name="P102"><text:span text:style-name="Source_5f_Text">FOR</text:span>/<text:span text:style-name="Source_5f_Text">NEXT</text:span>, <text:span text:style-name="Source_5f_Text">REPEAT</text:span>/<text:span text:style-name="Source_5f_Text">UNTIL</text:span>, <text:span text:style-name="Source_5f_Text">WHILE</text:span>/<text:span text:style-name="Source_5f_Text">WEND</text:span> may be nested inside each other.</text:p>
            </text:list-item>
            <text:list-item>
              <text:p text:style-name="P102">Limited only by available stack space.</text:p>
            </text:list-item>
            <text:list-item>
              <text:p text:style-name="P102">Running program fails with error message if it runs out of memory (user responsibility to prevent).</text:p>
            </text:list-item>
          </text:list>
        </text:list-item>
        <text:list-item>
          <text:p text:style-name="P103">Conditional Blocks:</text:p>
          <text:list>
            <text:list-item>
              <text:p text:style-name="P104"><text:span text:style-name="Source_5f_Text">IF</text:span>/<text:span text:style-name="Source_5f_Text">THEN</text:span>/<text:span text:style-name="Source_5f_Text">ELSE</text:span> blocks may also be nested.</text:p>
            </text:list-item>
            <text:list-item>
              <text:p text:style-name="P104">Same stack space limitations apply.</text:p>
            </text:list-item>
          </text:list>
        </text:list-item>
      </text:list>
      <text:p text:style-name="P105">Looking blocks may also be nested inside of conditional blocks and vice versa.</text:p>
      <text:h text:style-name="Heading_20_4" text:outline-level="4"><text:bookmark-start text:name="control-structures"/><text:soft-page-break/>Control Structures<text:bookmark-end text:name="control-structures"/></text:h>
      <text:list xml:id="list101931038461152" text:continue-numbering="true" text:style-name="List_20_1">
        <text:list-item>
          <text:p text:style-name="P106">IF/THEN/ELSE:</text:p>
          <text:list>
            <text:list-item>
              <text:p text:style-name="P107">Standard conditional execution.</text:p>
            </text:list-item>
            <text:list-item>
              <text:p text:style-name="P107">May be nested.</text:p>
            </text:list-item>
            <text:list-item>
              <text:p text:style-name="P107"><text:span text:style-name="Source_5f_Text">ELSEIF</text:span> supported for multi-way branching.</text:p>
            </text:list-item>
          </text:list>
        </text:list-item>
        <text:list-item>
          <text:p text:style-name="P108">FOR/NEXT:</text:p>
          <text:list>
            <text:list-item>
              <text:p text:style-name="P109">Counter-controlled iteration.</text:p>
            </text:list-item>
            <text:list-item>
              <text:p text:style-name="P109">As specified in BW BASIC documentation.</text:p>
            </text:list-item>
          </text:list>
        </text:list-item>
        <text:list-item>
          <text:p text:style-name="P108">WHILE/WEND:</text:p>
          <text:list>
            <text:list-item>
              <text:p text:style-name="P109">Condition-controlled iteration.</text:p>
            </text:list-item>
            <text:list-item>
              <text:p text:style-name="P109">Loop continues while condition is true.</text:p>
            </text:list-item>
          </text:list>
        </text:list-item>
        <text:list-item>
          <text:p text:style-name="P110">REPEAT/UNTIL:</text:p>
          <text:list>
            <text:list-item>
              <text:p text:style-name="P111">Condition-controlled iteration.</text:p>
            </text:list-item>
            <text:list-item>
              <text:p text:style-name="P111">Loop continues until condition becomes true.</text:p>
            </text:list-item>
            <text:list-item>
              <text:p text:style-name="P111"><text:span text:style-name="T1">Note:</text:span> Also used as <text:span text:style-name="Source_5f_Text">REPEAT</text:span> command (different purpose).</text:p>
            </text:list-item>
          </text:list>
        </text:list-item>
        <text:list-item>
          <text:p text:style-name="P112">SELECT/CASE:</text:p>
          <text:list>
            <text:list-item>
              <text:p text:style-name="P113">Multi-way branching.</text:p>
            </text:list-item>
            <text:list-item>
              <text:p text:style-name="P113">Case-based selection.</text:p>
            </text:list-item>
          </text:list>
        </text:list-item>
      </text:list>
      <text:h text:style-name="Heading_20_3" text:outline-level="3"><text:bookmark-start text:name="declarative-vs-non-declarative-statements"/>5.4 Declarative vs Non-Declarative Statements<text:bookmark-end text:name="declarative-vs-non-declarative-statements"/></text:h>
      <text:list xml:id="list101930652270930" text:continue-numbering="true" text:style-name="List_20_1">
        <text:list-item>
          <text:p text:style-name="P114">Declarative Statements:</text:p>
          <text:list>
            <text:list-item>
              <text:p text:style-name="P115">May not appear in <text:span text:style-name="Source_5f_Text">FOR</text:span>, <text:span text:style-name="Source_5f_Text">WHILE</text:span>, or <text:span text:style-name="Source_5f_Text">REPEAT</text:span>/<text:span text:style-name="Source_5f_Text">UNTIL</text:span> blocks.</text:p>
            </text:list-item>
            <text:list-item>
              <text:p text:style-name="P115">Examples: <text:span text:style-name="Source_5f_Text">USE</text:span>, <text:span text:style-name="Source_5f_Text">SAVE</text:span>, <text:span text:style-name="Source_5f_Text">KEEP</text:span>, <text:span text:style-name="Source_5f_Text">DROP</text:span>, <text:span text:style-name="Source_5f_Text">BY</text:span>, <text:span text:style-name="Source_5f_Text">DIM</text:span>, <text:span text:style-name="Source_5f_Text">ARRAY</text:span>, <text:span text:style-name="Source_5f_Text">DIGITS</text:span>, <text:span text:style-name="Source_5f_Text">OPTIONS</text:span>.</text:p>
            </text:list-item>
            <text:list-item>
              <text:p text:style-name="P115">Command reference table indicates which commands are declarative.</text:p>
            </text:list-item>
          </text:list>
        </text:list-item>
        <text:list-item>
          <text:p text:style-name="P116">Non-Declarative Statements:</text:p>
          <text:list>
            <text:list-item>
              <text:p text:style-name="P117">May appear anywhere, including inside loops.</text:p>
            </text:list-item>
            <text:list-item>
              <text:p text:style-name="P117">Examples: <text:span text:style-name="Source_5f_Text">LET</text:span>, <text:span text:style-name="Source_5f_Text">SET</text:span>, <text:span text:style-name="Source_5f_Text">PRINT</text:span>, <text:span text:style-name="Source_5f_Text">IF</text:span>, <text:span text:style-name="Source_5f_Text">DELETE</text:span> (record).</text:p>
            </text:list-item>
          </text:list>
        </text:list-item>
        <text:list-item>
          <text:p text:style-name="P81"><text:span text:style-name="T1">Line Continuation:</text:span> Statement ending with comma shall be continued to next line.</text:p>
        </text:list-item>
      </text:list>
      <text:h text:style-name="Heading_20_3" text:outline-level="3"><text:bookmark-start text:name="use-and-repeat-compatibility"/><text:soft-page-break/>5.5 USE and REPEAT Compatibility<text:bookmark-end text:name="use-and-repeat-compatibility"/></text:h>
      <text:p text:style-name="First_20_paragraph">A <text:span text:style-name="Source_5f_Text">USE</text:span> statement and a <text:span text:style-name="Source_5f_Text">REPEAT</text:span> statement cannot both be in effect at the same time, and no more than one of either can be in effect at the same time.</text:p>
      <text:p text:style-name="P118">Mutual Cancellation:</text:p>
      <text:list xml:id="list101929857302414" text:continue-numbering="true" text:style-name="List_20_1">
        <text:list-item>
          <text:p text:style-name="P119"><text:span text:style-name="Source_5f_Text">USE</text:span> statement cancels any <text:span text:style-name="Source_5f_Text">REPEAT</text:span> or <text:span text:style-name="Source_5f_Text">USE</text:span> statement currently in effect.</text:p>
        </text:list-item>
        <text:list-item>
          <text:p text:style-name="P119"><text:span text:style-name="Source_5f_Text">REPEAT</text:span> statement cancels any <text:span text:style-name="Source_5f_Text">USE</text:span> or <text:span text:style-name="Source_5f_Text">REPEAT</text:span> statement currently in effect.</text:p>
          <text:list>
            <text:list-item>
              <text:p text:style-name="P119">Either cancels any non-declarative statements currently in effect.</text:p>
            </text:list-item>
          </text:list>
        </text:list-item>
      </text:list>
      <text:p text:style-name="Text_20_body"><text:span text:style-name="T1">Note:</text:span> This refers to the <text:span text:style-name="Source_5f_Text">REPEAT</text:span> command (specify number of records), not <text:span text:style-name="Source_5f_Text">REPEAT</text:span>/<text:span text:style-name="Source_5f_Text">UNTIL</text:span> loop.</text:p>
      <text:h text:style-name="Heading_20_3" text:outline-level="3"><text:bookmark-start text:name="script-execution"/>5.6 Script Execution<text:bookmark-end text:name="script-execution"/></text:h>
      <text:p text:style-name="First_20_paragraph"><text:span text:style-name="T1">SUBMIT Statement:</text:span> Reads and executes commands from specified file.</text:p>
      <text:list xml:id="list101930668849503" text:continue-numbering="true" text:style-name="List_20_1">
        <text:list-item>
          <text:p text:style-name="P120">Restrictions:</text:p>
          <text:list>
            <text:list-item>
              <text:p text:style-name="P121">If <text:span text:style-name="Source_5f_Text">SUBMIT</text:span> appears inside <text:span text:style-name="Source_5f_Text">IF</text:span>, <text:span text:style-name="Source_5f_Text">FOR</text:span>, <text:span text:style-name="Source_5f_Text">WHILE</text:span>, or <text:span text:style-name="Source_5f_Text">REPEAT</text:span>/<text:span text:style-name="Source_5f_Text">UNTIL</text:span> block, submitted file may not contain declarative statements.</text:p>
            </text:list-item>
            <text:list-item>
              <text:p text:style-name="P121">File may contain one or more <text:span text:style-name="Source_5f_Text">SUBMIT</text:span> statements.</text:p>
            </text:list-item>
          </text:list>
        </text:list-item>
        <text:list-item>
          <text:p text:style-name="P120">Recursion Prevention:</text:p>
          <text:list>
            <text:list-item>
              <text:p text:style-name="P121"><text:span text:style-name="Source_5f_Text">SUBMIT</text:span> statement that attempts to submit a file already in the current execution chain fails with error message.</text:p>
            </text:list-item>
            <text:list-item>
              <text:p text:style-name="P121">This prevents both: - Direct recursion (A → A) - Indirect recursion (A → B → A).</text:p>
            </text:list-item>
          </text:list>
        </text:list-item>
        <text:list-item>
          <text:p text:style-name="P122"><text:span text:style-name="T1">Execution Chain:</text:span> Sequence of files currently being executed via nested <text:span text:style-name="Source_5f_Text">SUBMIT</text:span> statements.</text:p>
        </text:list-item>
      </text:list>
      <text:h text:style-name="Heading_20_2" text:outline-level="2">6. INPUT/OUTPUT</text:h>
      <text:h text:style-name="Heading_20_3" text:outline-level="3"><text:bookmark-start text:name="console-output"/>6.1 Console Output<text:bookmark-end text:name="console-output"/></text:h>
      <text:p text:style-name="Text_20_body">By default, console output is written to standard output. If an <text:span text:style-name="Source_5f_Text">OUTPUT</text:span> file is <text:s text:c="9"/></text:p>
      <text:p text:style-name="Text_20_body"><text:s/>specified, output is written to <text:span text:style-name="Strong_20_Emphasis">both</text:span> the file and standard output, unless the <text:span text:style-name="Source_5f_Text">-q</text:span> flag </text:p>
      <text:p text:style-name="Text_20_body"><text:s/>or <text:span text:style-name="Source_5f_Text">ECHO OFF</text:span> is in effect.</text:p>
      <text:list xml:id="list101931605157309" text:continue-numbering="true" text:style-name="List_20_1">
        <text:list-item>
          <text:p text:style-name="P123">Character Sets:</text:p>
          <text:list>
            <text:list-item>
              <text:p text:style-name="P124">Default: System locale.</text:p>
            </text:list-item>
            <text:list-item>
              <text:p text:style-name="P124">Override:</text:p>
              <text:list>
                <text:list-item>
                  <text:p text:style-name="P124"><text:soft-page-break/><text:span text:style-name="Source_5f_Text">CHARSET</text:span> option on <text:span text:style-name="Source_5f_Text">OUTPUT</text:span> command, or <text:span text:style-name="Source_5f_Text">OPTIONS CHARSET</text:span>.</text:p>
                </text:list-item>
                <text:list-item>
                  <text:p text:style-name="P124"><text:span text:style-name="Source_5f_Text">OPTIONS CHARSET</text:span> sets default for subsequent <text:span text:style-name="Source_5f_Text">OUTPUT</text:span> files but doesn’t affect currently open file.</text:p>
                </text:list-item>
              </text:list>
            </text:list-item>
          </text:list>
        </text:list-item>
        <text:list-item>
          <text:p text:style-name="P123">Line Endings:</text:p>
          <text:list>
            <text:list-item>
              <text:p text:style-name="P124">Default: Standard for platform.</text:p>
            </text:list-item>
            <text:list-item>
              <text:p text:style-name="P124">Override: <text:span text:style-name="Source_5f_Text">FMT</text:span> option on OUTPUT command, or <text:span text:style-name="Source_5f_Text">OPTIONS TXTFMT.</text:span></text:p>
            </text:list-item>
            <text:list-item>
              <text:p text:style-name="P124"><text:span text:style-name="Source_5f_Text">OPTIONS TXTFMT</text:span> sets default for subsequent <text:span text:style-name="Source_5f_Text">OUTPUT</text:span> files but doesn’t affect currently open file.</text:p>
            </text:list-item>
          </text:list>
        </text:list-item>
        <text:list-item>
          <text:p text:style-name="P123">Output Control:</text:p>
          <text:list>
            <text:list-item>
              <text:p text:style-name="P124"><text:span text:style-name="Source_5f_Text">ECHO</text:span> command:</text:p>
              <text:list>
                <text:list-item>
                  <text:p text:style-name="P124">Enables or disables writing console output to standard output.</text:p>
                </text:list-item>
                <text:list-item>
                  <text:p text:style-name="P124">Enabled by default.</text:p>
                </text:list-item>
              </text:list>
            </text:list-item>
          </text:list>
        </text:list-item>
      </text:list>
      <text:h text:style-name="Heading_20_3" text:outline-level="3"><text:bookmark-start text:name="the-print-command"/>6.2 The PRINT Command<text:bookmark-end text:name="the-print-command"/></text:h>
      <text:list xml:id="list101930437477410" text:continue-numbering="true" text:style-name="List_20_1">
        <text:list-item>
          <text:p text:style-name="P96"><text:span text:style-name="T1">Purpose:</text:span> Output values to console.</text:p>
        </text:list-item>
        <text:list-item>
          <text:p text:style-name="P125">Syntax:</text:p>
          <text:list>
            <text:list-item>
              <text:p text:style-name="P126"><text:span text:style-name="Source_5f_Text">PRINT [&lt;value&gt;...]</text:span>: Print specified values separated by spaces.</text:p>
            </text:list-item>
            <text:list-item>
              <text:p text:style-name="P126"><text:span text:style-name="Source_5f_Text">PRINT</text:span> (no arguments): Print values of all currently defined permanent variables with their names for current record.</text:p>
            </text:list-item>
          </text:list>
        </text:list-item>
        <text:list-item>
          <text:p text:style-name="P81"><text:span text:style-name="T1">Number Formatting:</text:span> Floating point values printed with precision specified by most recently issued <text:span text:style-name="Source_5f_Text">DIGITS</text:span> statement.</text:p>
        </text:list-item>
      </text:list>
      <text:h text:style-name="Heading_20_3" text:outline-level="3"><text:bookmark-start text:name="interactive-mode"/>6.3 Interactive Mode<text:bookmark-end text:name="interactive-mode"/></text:h>
      <text:p text:style-name="Text_20_body">In interactive mode, declarative commands such as <text:span text:style-name="Source_5f_Text">USE</text:span>, <text:span text:style-name="Source_5f_Text">NAMES</text:span>, <text:span text:style-name="Source_5f_Text">OUTPUT</text:span>, <text:span text:style-name="Source_5f_Text">DIGITS</text:span>, and <text:span text:style-name="Source_5f_Text">ECHO</text:span> execute immediately upon entry to provide real-time feedback:</text:p>
      <text:list xml:id="list101931497124360" text:continue-numbering="true" text:style-name="List_20_1">
        <text:list-item>
          <text:p text:style-name="P81"><text:span text:style-name="T1">Prompt:</text:span> “<text:span text:style-name="Source_5f_Text">&gt;”</text:span> shall be used as the prompt.</text:p>
        </text:list-item>
        <text:list-item>
          <text:p text:style-name="P81"><text:span text:style-name="T1">Statement Echo:</text:span> Statements shall be echoed to screen, even if console output is disabled.</text:p>
        </text:list-item>
        <text:list-item>
          <text:p text:style-name="P81"><text:span text:style-name="T1">Terminal Handling:</text:span> Any applicable terminal settings shall be handled appropriately.</text:p>
        </text:list-item>
        <text:list-item>
          <text:p text:style-name="P81"><text:span text:style-name="T1">Paging:</text:span> If output text would otherwise scroll off the screen, display a page at a time using: - Pager specified at command line, OR - Sensible default for the operating system</text:p>
        </text:list-item>
        <text:list-item>
          <text:p text:style-name="P127"><text:span text:style-name="T1">Console Control:</text:span> Interactive mode provides REPL (Read-Eval-Print-Loop) environment for <text:soft-page-break/>command entry and immediate execution.</text:p>
        </text:list-item>
      </text:list>
      <text:h text:style-name="Heading_20_2" text:outline-level="2">7. LANGUAGE REFERENCE</text:h>
      <text:h text:style-name="Heading_20_3" text:outline-level="3"><text:bookmark-start text:name="commands"/>7.1 Commands<text:bookmark-end text:name="commands"/></text:h>
      <text:p text:style-name="First_20_paragraph">Commands control the flow of execution, manage data, and configure the interpreter. The table below lists all supported commands alphabetically. <text:s/><text:span text:style-name="T12">It should be noted that while all declarative commands are to be immediately executed, not all commands to be immediately executed are declarative. <text:s/>Statements that are not to be immediately executed </text:span><text:span text:style-name="T13">(“deferred execution statements”) </text:span><text:span text:style-name="T12">become part of the program to be executed when the next RUN statement is executed.</text:span></text:p>
      <table:table table:name="Commands" table:style-name="Commands" table:template-name="Default Style">
        <table:table-column table:style-name="Commands.A" table:number-columns-repeated="2"/>
        <table:table-column table:style-name="Commands.C"/>
        <table:table-column table:style-name="Commands.D"/>
        <table:table-row table:style-name="Commands.1">
          <table:table-cell table:style-name="Commands.A1" office:value-type="string">
            <text:p text:style-name="P128">Command</text:p>
          </table:table-cell>
          <table:table-cell table:style-name="Commands.A1" office:value-type="string">
            <text:p text:style-name="P128">Syntax</text:p>
          </table:table-cell>
          <table:table-cell table:style-name="Commands.A1" office:value-type="string">
            <text:p text:style-name="P129">Type</text:p>
          </table:table-cell>
          <table:table-cell table:style-name="Commands.D1" office:value-type="string">
            <text:p text:style-name="P128">Description</text:p>
          </table:table-cell>
        </table:table-row>
        <text:soft-page-break/>
        <table:table-row table:style-name="Commands.2">
          <table:table-cell table:style-name="Commands.A2" office:value-type="string">
            <text:p text:style-name="P130"><text:span text:style-name="Source_5f_Text">ARRAY</text:span></text:p>
          </table:table-cell>
          <table:table-cell table:style-name="Commands.A2" office:value-type="string">
            <text:p text:style-name="P130"><text:span text:style-name="Source_5f_Text">ARRAY </text:span>&lt;<text:span text:style-name="Variable">array name</text:span>&gt; [&lt;&gt;...]</text:p>
          </table:table-cell>
          <table:table-cell table:style-name="Commands.A2" office:value-type="string">
            <text:p text:style-name="P131">Declarative</text:p>
          </table:table-cell>
          <table:table-cell table:style-name="Commands.D2" office:value-type="string">
            <text:p text:style-name="P130">Create a virtual array consisting of the variables specified (comma delimited list). <text:s/>Specifying the array name without the list undefines any virtual arrays by that name (but not any actual arrays). <text:s/>Issuing the command only lists the virtual arrays currently defined. <text:s/>Virtual arrays may be referenced in exactly the same ways as actual arrays created by the <text:span text:style-name="Source_5f_Text">DIM</text:span> command. <text:s/>If an actual array with the name specified already exists then the command shall fail with an error message. <text:s/>If a virtual array with the name specified exists then the new definition shall replace the old one. <text:s/>All variables constituting the new array must exist and must be of the same type.</text:p>
          </table:table-cell>
        </table:table-row>
        <text:soft-page-break/>
        <table:table-row table:style-name="Commands.2">
          <table:table-cell table:style-name="Commands.A2" office:value-type="string">
            <text:p text:style-name="P130"><text:span text:style-name="Source_5f_Text">BY</text:span></text:p>
          </table:table-cell>
          <table:table-cell table:style-name="Commands.A2" office:value-type="string">
            <text:p text:style-name="P130"><text:span text:style-name="Source_5f_Text">BY</text:span> [&lt;<text:span text:style-name="Source_5f_Text">varname</text:span>&gt;...]</text:p>
          </table:table-cell>
          <table:table-cell table:style-name="Commands.A2" office:value-type="string">
            <text:p text:style-name="P131">Declarative</text:p>
          </table:table-cell>
          <table:table-cell table:style-name="Commands.D2" office:value-type="string">
            <text:p text:style-name="P130">Divide the input into blocks defined by the combination of variable values. An empty <text:span text:style-name="Source_5f_Text">BY</text:span> statement cancels any <text:span text:style-name="Source_5f_Text">BY</text:span> statement currently in effect. A new <text:span text:style-name="Source_5f_Text">BY</text:span> statement overrides any <text:span text:style-name="Source_5f_Text">BY</text:span> statement currently in effect. Blocks are defined by consecutive records with the same combination of <text:span text:style-name="Source_5f_Text">BY</text:span> variable values. A new block begins whenever any <text:span text:style-name="Source_5f_Text">BY</text:span><text:span text:style-name="Source_20_Text"> </text:span>variable value changes, even if a previous block had the same combination of values. The blocks need not be in sorted order. Missing values in the named variables shall be treated as distinct values for grouping purposes. If no <text:span text:style-name="Source_5f_Text">USE</text:span> statement is in effect then a <text:span text:style-name="Source_5f_Text">BY</text:span> statement shall fail with an error message.</text:p>
          </table:table-cell>
        </table:table-row>
        <table:table-row table:style-name="Commands.2">
          <table:table-cell table:style-name="Commands.A2" office:value-type="string">
            <text:p text:style-name="P130"><text:span text:style-name="Source_5f_Text">DELETE</text:span></text:p>
          </table:table-cell>
          <table:table-cell table:style-name="Commands.A2" office:value-type="string">
            <text:p text:style-name="P130"><text:span text:style-name="Source_5f_Text">DELETE</text:span> &lt;<text:span text:style-name="Variable">line</text:span>&gt; [<text:span text:style-name="Source_5f_Text">-</text:span> &lt;<text:span text:style-name="Variable">line</text:span>&gt;]</text:p>
          </table:table-cell>
          <table:table-cell table:style-name="Commands.A2" office:value-type="string">
            <text:p text:style-name="P131">Immediate Execition</text:p>
          </table:table-cell>
          <table:table-cell table:style-name="Commands.D2" office:value-type="string">
            <text:p text:style-name="P130">As specified in the BW BASIC documentation.</text:p>
          </table:table-cell>
        </table:table-row>
        <table:table-row table:style-name="Commands.2">
          <table:table-cell table:style-name="Commands.A2" office:value-type="string">
            <text:p text:style-name="P130"><text:span text:style-name="Source_5f_Text">DELETE</text:span></text:p>
          </table:table-cell>
          <table:table-cell table:style-name="Commands.A2" office:value-type="string">
            <text:p text:style-name="P130"><text:span text:style-name="Source_5f_Text">DELETE</text:span></text:p>
          </table:table-cell>
          <table:table-cell table:style-name="Commands.A2" office:value-type="string">
            <text:p text:style-name="P131">Deferred Execution</text:p>
          </table:table-cell>
          <table:table-cell table:style-name="Commands.D2" office:value-type="string">
            <text:p text:style-name="P130">Delete the current record and start processing the next record.</text:p>
          </table:table-cell>
        </table:table-row>
        <text:soft-page-break/>
        <table:table-row table:style-name="Commands.2">
          <table:table-cell table:style-name="Commands.A2" office:value-type="string">
            <text:p text:style-name="P130"><text:span text:style-name="Source_5f_Text">DIGITS</text:span></text:p>
          </table:table-cell>
          <table:table-cell table:style-name="Commands.A2" office:value-type="string">
            <text:p text:style-name="P130"><text:span text:style-name="Source_5f_Text">DIGITS(</text:span><text:span text:style-name="Variable">n</text:span><text:span text:style-name="Source_5f_Text">)</text:span></text:p>
          </table:table-cell>
          <table:table-cell table:style-name="Commands.A2" office:value-type="string">
            <text:p text:style-name="P131">Declarative</text:p>
          </table:table-cell>
          <table:table-cell table:style-name="Commands.D2" office:value-type="string">
            <text:p text:style-name="P130">As specified in the BW BASIC documentation.</text:p>
            <text:p text:style-name="P130">This sets the maximum number of decimal places to display (default = 3).</text:p>
          </table:table-cell>
        </table:table-row>
        <table:table-row table:style-name="Commands.1">
          <table:table-cell table:style-name="Commands.A2" office:value-type="string">
            <text:p text:style-name="P130"><text:span text:style-name="Source_5f_Text">DIM</text:span></text:p>
          </table:table-cell>
          <table:table-cell table:style-name="Commands.A2" office:value-type="string">
            <text:p text:style-name="P130"><text:span text:style-name="Source_5f_Text">DIM</text:span> &lt;<text:span text:style-name="Variable">arrayname</text:span>&gt; <text:span text:style-name="Source_5f_Text">(</text:span><text:span text:style-name="Source_5f_Text"><text:span text:style-name="T14">[</text:span></text:span>&lt;<text:span text:style-name="Variable">lower</text:span>&gt; <text:span text:style-name="Source_5f_Text">TO </text:span><text:span text:style-name="Source_5f_Text"><text:span text:style-name="T14">]</text:span></text:span><text:span text:style-name="Source_5f_Text"> </text:span>&lt;<text:span text:style-name="Variable">upper</text:span><text:span text:style-name="Source_5f_Text">&gt;</text:span><text:span text:style-name="Source_5f_Text"><text:span text:style-name="T15">)</text:span></text:span> [<text:span text:style-name="Source_5f_Text">/TEMP</text:span>]</text:p>
          </table:table-cell>
          <table:table-cell table:style-name="Commands.A2" office:value-type="string">
            <text:p text:style-name="P131">Declarative</text:p>
          </table:table-cell>
          <table:table-cell table:style-name="Commands.D2" office:value-type="string">
            <text:p text:style-name="P130">As specified in the BW BASIC documentation, except that <text:span text:style-name="Variable">&lt;filenum&gt;</text:span> is not supported. <text:s text:c="2"/>The array is saved to the <text:s/>output dataset as a set of subscripted variables. <text:s text:c="2"/>Appending <text:span text:style-name="Source_5f_Text">/TEMP</text:span><text:span text:style-name="Source_20_Text"> </text:span>to a <text:span text:style-name="Source_5f_Text">DIM</text:span> statement shall create a temporary array which not be written to output datasets . <text:s/>A <text:span text:style-name="Source_5f_Text">DIM</text:span><text:span text:style-name="Source_20_Text"> </text:span>statement that references an existing variable or array shall fail with an error message.</text:p>
          </table:table-cell>
        </table:table-row>
        <table:table-row table:style-name="Commands.1">
          <table:table-cell table:style-name="Commands.A2" office:value-type="string">
            <text:p text:style-name="P130"><text:span text:style-name="Source_5f_Text">DROP</text:span></text:p>
          </table:table-cell>
          <table:table-cell table:style-name="Commands.A2" office:value-type="string">
            <text:p text:style-name="P130"><text:span text:style-name="Source_5f_Text">DROP</text:span> &lt;&gt;...</text:p>
          </table:table-cell>
          <table:table-cell table:style-name="Commands.A2" office:value-type="string">
            <text:p text:style-name="P131">Declarative</text:p>
          </table:table-cell>
          <table:table-cell table:style-name="Commands.D2" office:value-type="string">
            <text:p text:style-name="P130">Prevent one or more permanent variables from being retained after the next <text:span text:style-name="Source_5f_Text">RUN</text:span> statement is executed. <text:s/>The affected variables may not be referenced after they given in a <text:span text:style-name="Source_5f_Text">DROP</text:span> statement, but may be redefined with a <text:span text:style-name="Source_5f_Text">LET</text:span> or <text:span text:style-name="Source_5f_Text">SET</text:span> statement. <text:s/>Individual array elements cannot be deleted. <text:s/>Once given, a <text:span text:style-name="Source_5f_Text">DROP</text:span> statement may only <text:soft-page-break/>be canceled by deleting it.</text:p>
          </table:table-cell>
        </table:table-row>
        <table:table-row table:style-name="Commands.2">
          <table:table-cell table:style-name="Commands.A2" office:value-type="string">
            <text:p text:style-name="P130"><text:span text:style-name="Source_5f_Text">ECHO</text:span></text:p>
          </table:table-cell>
          <table:table-cell table:style-name="Commands.A2" office:value-type="string">
            <text:p text:style-name="P130"><text:span text:style-name="Source_5f_Text">ECHO</text:span> &lt;<text:span text:style-name="Source_5f_Text">ON</text:span> | <text:span text:style-name="Source_5f_Text">OFF</text:span>&gt;</text:p>
          </table:table-cell>
          <table:table-cell table:style-name="Commands.A2" office:value-type="string">
            <text:p text:style-name="P131">Declarative</text:p>
          </table:table-cell>
          <table:table-cell table:style-name="Commands.D2" office:value-type="string">
            <text:p text:style-name="P130">Enable or disable the writing of console output to standard output. <text:s/>Enabled by default.</text:p>
          </table:table-cell>
        </table:table-row>
        <table:table-row table:style-name="Commands.2">
          <table:table-cell table:style-name="Commands.A2" office:value-type="string">
            <text:p text:style-name="P130"><text:span text:style-name="Source_5f_Text">FOR</text:span>/<text:span text:style-name="Source_5f_Text">NEXT</text:span></text:p>
          </table:table-cell>
          <table:table-cell table:style-name="Commands.A2" office:value-type="string">
            <text:p text:style-name="P130"/>
          </table:table-cell>
          <table:table-cell table:style-name="Commands.A2" office:value-type="string">
            <text:p text:style-name="P132">Deferred execution</text:p>
          </table:table-cell>
          <table:table-cell table:style-name="Commands.D2" office:value-type="string">
            <text:p text:style-name="P130">As specified in the BW BASIC documentation.</text:p>
          </table:table-cell>
        </table:table-row>
        <text:soft-page-break/>
        <table:table-row table:style-name="Commands.2">
          <table:table-cell table:style-name="Commands.A2" office:value-type="string">
            <text:p text:style-name="P133"><text:span text:style-name="Source_5f_Text">FPATH</text:span></text:p>
          </table:table-cell>
          <table:table-cell table:style-name="Commands.A2" office:value-type="string">
            <text:p text:style-name="P133"><text:span text:style-name="Source_5f_Text">FPATH</text:span> [&lt;<text:span text:style-name="Variable">path</text:span>&gt;] <text:span text:style-name="Source_5f_Text">/</text:span><text:span text:style-name="Source_20_Text"> </text:span>[<text:span text:style-name="Source_5f_Text">OUTPUT</text:span> | <text:span text:style-name="Source_5f_Text">SAVE</text:span> | <text:span text:style-name="Source_5f_Text">SUBMIT</text:span> | <text:span text:style-name="Source_5f_Text">USE</text:span>]</text:p>
          </table:table-cell>
          <table:table-cell table:style-name="Commands.A2" office:value-type="string">
            <text:p text:style-name="P131">Declarative</text:p>
          </table:table-cell>
          <table:table-cell table:style-name="Commands.D2" office:value-type="string">
            <text:p text:style-name="P130">Set the default directory for input/output commands. <text:s/><text:span text:style-name="Source_5f_Text">FPATH</text:span> without argument or flags resets all default directories to the current working directory. <text:s/><text:span text:style-name="Variable">&lt;path&gt;</text:span> is the relative or absolute path to the new default directory. <text:s/>If quoted, then it shall be taken literally. Otherwise, it will be taken as an expression signifying the path name to be used. <text:s/>The flags specify the command for which the default directory is to be set or unset. <text:s/>If <text:span text:style-name="Variable">&lt;path&gt;</text:span> is not specified, then the existing relevant default directories shall be reset to the current working directory. <text:s/>Multiple commands may be specified with a comma-delimited list. <text:s/>If no flag is specified, then the default directory is set or unset for all commands.</text:p>
          </table:table-cell>
        </table:table-row>
        <text:soft-page-break/>
        <table:table-row table:style-name="Commands.2">
          <table:table-cell table:style-name="Commands.A2" office:value-type="string">
            <text:p text:style-name="P130"><text:span text:style-name="Source_5f_Text">HELP</text:span></text:p>
          </table:table-cell>
          <table:table-cell table:style-name="Commands.A2" office:value-type="string">
            <text:p text:style-name="P130"><text:span text:style-name="Source_5f_Text">HELP</text:span> [<text:span text:style-name="Variable">command </text:span><text:span text:style-name="Variable"><text:span text:style-name="T16">| </text:span></text:span><text:span text:style-name="Source_5f_Text"><text:span text:style-name="T16">/ALL</text:span></text:span>]</text:p>
          </table:table-cell>
          <table:table-cell table:style-name="Commands.A2" office:value-type="string">
            <text:p text:style-name="P134">Immediate Execution</text:p>
          </table:table-cell>
          <table:table-cell table:style-name="Commands.D2" office:value-type="string">
            <text:p text:style-name="P130">Display online help for the given command. <text:s/>If no command is given, then list the supported commands together with instructions on how to get help for individual commands <text:span text:style-name="T17">and functions</text:span>. <text:s/><text:span text:style-name="Source_5f_Text"><text:span text:style-name="T17">HELP /ALL</text:span></text:span><text:span text:style-name="T17"> prints </text:span><text:span text:style-name="Source_5f_Text"><text:span text:style-name="T17">HELP</text:span></text:span><text:span text:style-name="T17"> for all commands and functions.</text:span> <text:s/></text:p>
          </table:table-cell>
        </table:table-row>
        <table:table-row table:style-name="Commands.2">
          <table:table-cell table:style-name="Commands.A2" office:value-type="string">
            <text:p text:style-name="P130"><text:span text:style-name="Source_5f_Text">HOLD</text:span></text:p>
          </table:table-cell>
          <table:table-cell table:style-name="Commands.A2" office:value-type="string">
            <text:p text:style-name="P133"><text:span text:style-name="Source_5f_Text">HOLD </text:span>[&lt;<text:span text:style-name="Variable">varname</text:span>&gt; ... ]</text:p>
          </table:table-cell>
          <table:table-cell table:style-name="Commands.A2" office:value-type="string">
            <text:p text:style-name="P134">Declarative</text:p>
          </table:table-cell>
          <table:table-cell table:style-name="Commands.D2" office:value-type="string">
            <text:p text:style-name="P130">By default, permanent variables are initialized to missing immediately before a new record is read in. <text:s/>This command disables this behavior for the variables named; or for all permanent variables if none are listed. <text:s/>A new <text:span text:style-name="Source_5f_Text">HOLD</text:span> statement cancels any previously issued.</text:p>
          </table:table-cell>
        </table:table-row>
        <table:table-row table:style-name="Commands.2">
          <table:table-cell table:style-name="Commands.A2" office:value-type="string">
            <text:p text:style-name="P130"><text:span text:style-name="Source_5f_Text">IF</text:span>/<text:span text:style-name="Source_5f_Text">THEN</text:span>/<text:span text:style-name="Source_5f_Text">ELSE</text:span>/<text:span text:style-name="Source_5f_Text">ELSEIF</text:span>/<text:span text:style-name="Source_5f_Text">END IF</text:span></text:p>
          </table:table-cell>
          <table:table-cell table:style-name="Commands.A2" office:value-type="string">
            <text:p text:style-name="P130"/>
          </table:table-cell>
          <table:table-cell table:style-name="Commands.A2" office:value-type="string">
            <text:p text:style-name="P134">Deferred Execution</text:p>
          </table:table-cell>
          <table:table-cell table:style-name="Commands.D2" office:value-type="string">
            <text:p text:style-name="P130">As specified in the BW BASIC documentation.</text:p>
          </table:table-cell>
        </table:table-row>
        <text:soft-page-break/>
        <table:table-row table:style-name="Commands.2">
          <table:table-cell table:style-name="Commands.A2" office:value-type="string">
            <text:p text:style-name="P130"><text:span text:style-name="Source_5f_Text">KEEP</text:span></text:p>
          </table:table-cell>
          <table:table-cell table:style-name="Commands.A2" office:value-type="string">
            <text:p text:style-name="P130"><text:span text:style-name="Source_5f_Text">KEEP</text:span> [&lt;<text:span text:style-name="Variable">varname</text:span>&gt;...]</text:p>
          </table:table-cell>
          <table:table-cell table:style-name="Commands.A2" office:value-type="string">
            <text:p text:style-name="P134">Declarative</text:p>
          </table:table-cell>
          <table:table-cell table:style-name="Commands.D2" office:value-type="string">
            <text:p text:style-name="P130">Specifies which variables will be retained after the next <text:span text:style-name="Source_5f_Text">RUN</text:span> statement is executed. <text:s/>If no variables are specified, then any <text:span text:style-name="Source_5f_Text">KEEP</text:span> statement currently in effect will be canceled and all permanent variables not already deleted shall be retained. <text:s/>Individual array elements may not appear in a <text:span text:style-name="Source_5f_Text">KEEP</text:span> statement. <text:s/>A <text:span text:style-name="Source_5f_Text">KEEP</text:span> statement that lists variables that either do not exist or have been deleted with a <text:span text:style-name="Source_5f_Text">DROP</text:span> statement shall fail with an error message.</text:p>
          </table:table-cell>
        </table:table-row>
        <table:table-row table:style-name="Commands.2">
          <table:table-cell table:style-name="Commands.A2" office:value-type="string">
            <text:p text:style-name="P133"><text:span text:style-name="Source_5f_Text">LET</text:span></text:p>
          </table:table-cell>
          <table:table-cell table:style-name="Commands.A2" office:value-type="string">
            <text:p text:style-name="P130"/>
          </table:table-cell>
          <table:table-cell table:style-name="Commands.A2" office:value-type="string">
            <text:p text:style-name="P134">Deferred Execution</text:p>
          </table:table-cell>
          <table:table-cell table:style-name="Commands.D2" office:value-type="string">
            <text:p text:style-name="P130">As specified in the BW BASIC documentation.</text:p>
            <text:p text:style-name="P130">Defines permanent variables (those in the internal table) only. <text:s/>A <text:span text:style-name="Source_5f_Text">LET</text:span> statement that writes to a temporary variable shall make that variable permanent.</text:p>
          </table:table-cell>
        </table:table-row>
        <table:table-row table:style-name="Commands.2">
          <table:table-cell table:style-name="Commands.A2" office:value-type="string">
            <text:p text:style-name="P133"><text:span text:style-name="Source_5f_Text">LIST</text:span></text:p>
          </table:table-cell>
          <table:table-cell table:style-name="Commands.A2" office:value-type="string">
            <text:p text:style-name="P130"/>
          </table:table-cell>
          <table:table-cell table:style-name="Commands.A2" office:value-type="string">
            <text:p text:style-name="P134">Immediate Execution</text:p>
          </table:table-cell>
          <table:table-cell table:style-name="Commands.D2" office:value-type="string">
            <text:p text:style-name="P130">As specified in the BW BASIC documentation.</text:p>
          </table:table-cell>
        </table:table-row>
        <text:soft-page-break/>
        <table:table-row table:style-name="Commands.2">
          <table:table-cell table:style-name="Commands.A2" office:value-type="string">
            <text:p text:style-name="P130"><text:span text:style-name="Source_5f_Text">NAMES</text:span></text:p>
          </table:table-cell>
          <table:table-cell table:style-name="Commands.A2" office:value-type="string">
            <text:p text:style-name="P130"><text:span text:style-name="Source_5f_Text">NAMES</text:span></text:p>
          </table:table-cell>
          <table:table-cell table:style-name="Commands.A2" office:value-type="string">
            <text:p text:style-name="P134">Immediate Execution</text:p>
          </table:table-cell>
          <table:table-cell table:style-name="Commands.D2" office:value-type="string">
            <text:p text:style-name="P130">Display the names of the currently defined variables, listing permanent and temporary variables separately.</text:p>
          </table:table-cell>
        </table:table-row>
        <table:table-row table:style-name="Commands.2">
          <table:table-cell table:style-name="Commands.A2" office:value-type="string">
            <text:p text:style-name="P130"><text:span text:style-name="Source_5f_Text">NEW</text:span></text:p>
          </table:table-cell>
          <table:table-cell table:style-name="Commands.A2" office:value-type="string">
            <text:p text:style-name="P130"/>
          </table:table-cell>
          <table:table-cell table:style-name="Commands.A2" office:value-type="string">
            <text:p text:style-name="P134">Immediate Execution</text:p>
          </table:table-cell>
          <table:table-cell table:style-name="Commands.D2" office:value-type="string">
            <text:p text:style-name="P130">As specified in the BW BASIC documentation. <text:s/>In addition, any declarative statements in effect, except for <text:span text:style-name="Source_5f_Text">OUTPUT</text:span>, are canceled.</text:p>
          </table:table-cell>
        </table:table-row>
        <text:soft-page-break/>
        <table:table-row table:style-name="Commands.2">
          <table:table-cell table:style-name="Commands.A2" office:value-type="string">
            <text:p text:style-name="P130"><text:span text:style-name="Source_5f_Text">OUTPUT</text:span></text:p>
          </table:table-cell>
          <table:table-cell table:style-name="Commands.A2" office:value-type="string">
            <text:p text:style-name="P130"><text:span text:style-name="Source_5f_Text">OUTPUT</text:span> [<text:span text:style-name="Variable">filename</text:span>] [<text:span text:style-name="Source_20_Text">/ [</text:span><text:span text:style-name="Source_5f_Text">CHARSET =</text:span> &lt;<text:span text:style-name="Source_5f_Text">AUTO</text:span><text:span text:style-name="Source_20_Text"> </text:span>| <text:span text:style-name="Source_5f_Text">UTF-8</text:span> |<text:span text:style-name="Source_5f_Text"> UTF-16</text:span> |<text:span text:style-name="Source_20_Text"> </text:span><text:span text:style-name="Source_5f_Text">ASCII</text:span><text:span text:style-name="Source_20_Text">&gt;</text:span>] | [<text:span text:style-name="Source_5f_Text">FMT =</text:span> &lt;<text:span text:style-name="Source_5f_Text">AUTO</text:span> | <text:span text:style-name="Source_5f_Text">LF</text:span> | <text:span text:style-name="Source_5f_Text">CRLF</text:span> | <text:span text:style-name="Source_5f_Text">CR</text:span>&gt;] ...]</text:p>
          </table:table-cell>
          <table:table-cell table:style-name="Commands.A2" office:value-type="string">
            <text:p text:style-name="P130">Yes</text:p>
          </table:table-cell>
          <table:table-cell table:style-name="Commands.D2" office:value-type="string">
            <text:p text:style-name="P130"><text:span text:style-name="T18">Redirect console output to a file, or cancel an existing redirection</text:span>. <text:s/>File names shall be interpreted in the same manner as by the <text:span text:style-name="Source_5f_Text">USE</text:span> command, except that the file format shall be text, regardless of the extension; and the default extension shall be “.DAT”. <text:s/>If no file name is specified, then any <text:span text:style-name="Source_5f_Text">OUTPUT</text:span> statement in effect shall be canceled and console output shall be written to standard output only. <text:s/>The <text:span text:style-name="Source_5f_Text">CHARSET</text:span> option shall specify the character set to be used to write the console output (<text:span text:style-name="Source_5f_Text">AUTO</text:span><text:span text:style-name="Source_20_Text"> </text:span>specifies the default character set for the session locale and is the default unless changed by <text:span text:style-name="Source_5f_Text">OPTIONS CHARSET</text:span>). The <text:span text:style-name="Source_5f_Text">FMT</text:span> option shall determine the text line ending (<text:span text:style-name="Source_5f_Text">AUTO</text:span> shall specify the system default and is the default).</text:p>
          </table:table-cell>
        </table:table-row>
        <text:soft-page-break/>
        <table:table-row table:style-name="Commands.2">
          <table:table-cell table:style-name="Commands.A2" office:value-type="string">
            <text:p text:style-name="P130"><text:span text:style-name="Source_5f_Text">PRINT</text:span></text:p>
          </table:table-cell>
          <table:table-cell table:style-name="Commands.A2" office:value-type="string">
            <text:p text:style-name="P130"><text:span text:style-name="Source_5f_Text">PRINT</text:span> [&lt;<text:span text:style-name="Variable">value</text:span>&gt;...]</text:p>
          </table:table-cell>
          <table:table-cell table:style-name="Commands.A2" office:value-type="string">
            <text:p text:style-name="P134">Deferred Execution</text:p>
          </table:table-cell>
          <table:table-cell table:style-name="Commands.D2" office:value-type="string">
            <text:p text:style-name="P130">Print one or more values separated by spaces. <text:s/>If no arguments are given, then print the values all currently defined permanent variables with their names for the current record. <text:s/>Floating point values shall be printed with the precision specified by the most recently issued <text:span text:style-name="Source_5f_Text">DIGITS</text:span> statement.</text:p>
          </table:table-cell>
        </table:table-row>
        <table:table-row table:style-name="Commands.2">
          <table:table-cell table:style-name="Commands.A2" office:value-type="string">
            <text:p text:style-name="P133"><text:span text:style-name="Source_5f_Text">QUIT</text:span><text:span text:style-name="T19">|</text:span><text:span text:style-name="Source_5f_Text"><text:span text:style-name="T19">END</text:span></text:span></text:p>
          </table:table-cell>
          <table:table-cell table:style-name="Commands.A2" office:value-type="string">
            <text:p text:style-name="P130"/>
          </table:table-cell>
          <table:table-cell table:style-name="Commands.A2" office:value-type="string">
            <text:p text:style-name="P135">Immediate Execution</text:p>
          </table:table-cell>
          <table:table-cell table:style-name="Commands.D2" office:value-type="string">
            <text:p text:style-name="P130">As specified in the BW BASIC documentation. <text:s/><text:span text:style-name="T19">Initially, </text:span><text:span text:style-name="Source_5f_Text"><text:span text:style-name="T19">END</text:span></text:span><text:span text:style-name="T19"> shall be an alias for </text:span><text:span text:style-name="Source_5f_Text"><text:span text:style-name="T19">QUIT</text:span></text:span><text:span text:style-name="T19">.</text:span></text:p>
          </table:table-cell>
        </table:table-row>
        <table:table-row table:style-name="Commands.2">
          <table:table-cell table:style-name="Commands.A2" office:value-type="string">
            <text:p text:style-name="P130"><text:span text:style-name="Source_5f_Text">REM</text:span></text:p>
          </table:table-cell>
          <table:table-cell table:style-name="Commands.A2" office:value-type="string">
            <text:p text:style-name="P130"/>
          </table:table-cell>
          <table:table-cell table:style-name="Commands.A2" office:value-type="string">
            <text:p text:style-name="P136">Immediate Execution</text:p>
          </table:table-cell>
          <table:table-cell table:style-name="Commands.D2" office:value-type="string">
            <text:p text:style-name="P130">As specified in the BW BASIC documentation.</text:p>
          </table:table-cell>
        </table:table-row>
        <text:soft-page-break/>
        <table:table-row table:style-name="Commands.2">
          <table:table-cell table:style-name="Commands.A2" office:value-type="string">
            <text:p text:style-name="P130"><text:span text:style-name="Source_5f_Text">RENAME</text:span></text:p>
          </table:table-cell>
          <table:table-cell table:style-name="Commands.A2" office:value-type="string">
            <text:p text:style-name="P130"><text:span text:style-name="Source_5f_Text">RENAME </text:span>&lt;<text:span text:style-name="Variable">oldname</text:span><text:span text:style-name="Source_5f_Text"> = </text:span><text:span text:style-name="Variable">newname, …&gt;</text:span></text:p>
          </table:table-cell>
          <table:table-cell table:style-name="Commands.A2" office:value-type="string">
            <text:p text:style-name="P137">Declarative</text:p>
          </table:table-cell>
          <table:table-cell table:style-name="Commands.D2" office:value-type="string">
            <text:p text:style-name="P130">Rename one or more variables. A renamed variable may not assigned the name of an existing variable unless it has been <text:span text:style-name="Source_5f_Text">DROP</text:span>ped. <text:s/>If the variable is permanent then it will take the new name in the output dataset if there is one.</text:p>
            <text:p text:style-name="P130">Any statements following a <text:span text:style-name="Source_5f_Text">RENAME</text:span> statement must reference the affected variables under their new names. <text:s/>A numeric variable may not be assigned a character variable name and vice versa.</text:p>
          </table:table-cell>
        </table:table-row>
        <table:table-row table:style-name="Commands.2">
          <table:table-cell table:style-name="Commands.A2" office:value-type="string">
            <text:p text:style-name="P130"><text:span text:style-name="Source_5f_Text">REPEAT</text:span></text:p>
          </table:table-cell>
          <table:table-cell table:style-name="Commands.A2" office:value-type="string">
            <text:p text:style-name="P130"><text:span text:style-name="Source_5f_Text">REPEAT</text:span> &lt;<text:span text:style-name="Variable">n</text:span>&gt;</text:p>
          </table:table-cell>
          <table:table-cell table:style-name="Commands.A2" office:value-type="string">
            <text:p text:style-name="P137">Declarative</text:p>
          </table:table-cell>
          <table:table-cell table:style-name="Commands.D2" office:value-type="string">
            <text:p text:style-name="P130">Specify the number of records to be written to the internal table or output dataset. <text:s/>This command will cancel any <text:span text:style-name="Source_5f_Text">USE</text:span> statement currently in effect.</text:p>
          </table:table-cell>
        </table:table-row>
        <table:table-row table:style-name="Commands.2">
          <table:table-cell table:style-name="Commands.A2" office:value-type="string">
            <text:p text:style-name="P130"><text:span text:style-name="Source_5f_Text">REPEAT</text:span>/<text:span text:style-name="Source_5f_Text">UNTIL</text:span></text:p>
          </table:table-cell>
          <table:table-cell table:style-name="Commands.A2" office:value-type="string">
            <text:p text:style-name="P130"/>
          </table:table-cell>
          <table:table-cell table:style-name="Commands.A2" office:value-type="string">
            <text:p text:style-name="P137">Deferred Execution</text:p>
          </table:table-cell>
          <table:table-cell table:style-name="Commands.D2" office:value-type="string">
            <text:p text:style-name="P130">As specified in the BW BASIC documentation.</text:p>
          </table:table-cell>
        </table:table-row>
        <table:table-row table:style-name="Commands.2">
          <table:table-cell table:style-name="Commands.A2" office:value-type="string">
            <text:p text:style-name="P130"><text:span text:style-name="Source_5f_Text">RSEED</text:span></text:p>
          </table:table-cell>
          <table:table-cell table:style-name="Commands.A2" office:value-type="string">
            <text:p text:style-name="P130"><text:span text:style-name="Source_5f_Text">RSEED</text:span> &lt;<text:span text:style-name="Variable">n</text:span>&gt;</text:p>
          </table:table-cell>
          <table:table-cell table:style-name="Commands.A2" office:value-type="string">
            <text:p text:style-name="P138">Deferred Execution</text:p>
          </table:table-cell>
          <table:table-cell table:style-name="Commands.D2" office:value-type="string">
            <text:p text:style-name="P130">Set the random number seed to the specified value (must be a literal integer). <text:s/>Persists until changed. <text:s/>At the beginning of each session, the random number seed is set from the system time.</text:p>
          </table:table-cell>
        </table:table-row>
        <text:soft-page-break/>
        <table:table-row table:style-name="Commands.2">
          <table:table-cell table:style-name="Commands.A2" office:value-type="string">
            <text:p text:style-name="P130"><text:span text:style-name="Source_5f_Text">RUN</text:span></text:p>
          </table:table-cell>
          <table:table-cell table:style-name="Commands.A2" office:value-type="string">
            <text:p text:style-name="P130"/>
          </table:table-cell>
          <table:table-cell table:style-name="Commands.A2" office:value-type="string">
            <text:p text:style-name="P137">Immediate Execution</text:p>
          </table:table-cell>
          <table:table-cell table:style-name="Commands.D2" office:value-type="string">
            <text:p text:style-name="P130">As specified in the BW BASIC documentation. <text:s text:c="2"/>Following the execution of any statements then in effect, the internal table is written to the output dataset specified by the <text:span text:style-name="Source_5f_Text">SAVE</text:span> command (if there is one). <text:s text:c="2"/>If a variable appears in both the current <text:span text:style-name="Source_5f_Text">KEEP</text:span> statement and a subsequent <text:span text:style-name="Source_5f_Text">DROP</text:span><text:span text:style-name="Source_20_Text"> </text:span>statement, then the latter shall take precedence. <text:s/><text:span text:style-name="T20">Once the program is run, the numbers of records and variables are displayed.</text:span></text:p>
          </table:table-cell>
        </table:table-row>
        <text:soft-page-break/>
        <table:table-row table:style-name="Commands.2">
          <table:table-cell table:style-name="Commands.A2" office:value-type="string">
            <text:p text:style-name="P130"><text:span text:style-name="Source_5f_Text">SAVE</text:span></text:p>
          </table:table-cell>
          <table:table-cell table:style-name="Commands.A2" office:value-type="string">
            <text:p text:style-name="P130"><text:span text:style-name="Source_5f_Text">SAVE</text:span> [ &lt;<text:span text:style-name="Variable">filename</text:span>&gt;] [<text:span text:style-name="Source_5f_Text">/</text:span> [<text:span text:style-name="Source_5f_Text">FMT =</text:span> &lt;<text:span text:style-name="Source_5f_Text">CSV</text:span> | <text:span text:style-name="Source_5f_Text">ODF</text:span>|<text:span text:style-name="Source_20_Text"> </text:span><text:span text:style-name="Source_5f_Text">OOXML</text:span> | <text:span text:style-name="Source_5f_Text">MSEXCEL</text:span>&gt;] | [<text:span text:style-name="Source_20_Text"> </text:span><text:span text:style-name="Source_5f_Text">CHARSET =</text:span> &lt;<text:span text:style-name="Source_5f_Text">ASCII</text:span><text:span text:style-name="Source_20_Text"> </text:span>| <text:span text:style-name="Source_5f_Text">UTF-8</text:span> | <text:span text:style-name="Source_5f_Text">UTF-16</text:span> | &lt; <text:span text:style-name="Variable">csname</text:span> &gt;&gt; ] | [ <text:span text:style-name="Source_5f_Text">HEADER = </text:span>&lt;<text:span text:style-name="Source_5f_Text">YES</text:span> | <text:span text:style-name="Source_5f_Text">NO</text:span>&gt;] [<text:span text:style-name="Source_5f_Text">DLM =</text:span><text:span text:style-name="Source_20_Text"> </text:span>&lt;<text:span text:style-name="Variable">dlmstr</text:span>&gt;]...]</text:p>
          </table:table-cell>
          <table:table-cell table:style-name="Commands.A2" office:value-type="string">
            <text:p text:style-name="P137">Declarative</text:p>
          </table:table-cell>
          <table:table-cell table:style-name="Commands.D2" office:value-type="string">
            <text:p text:style-name="P139">Specify the file to which the table produced by the <text:span text:style-name="Source_5f_Text">RUN</text:span> command will be written. <text:s/>The file name shall be interpreted in the same way as by the <text:span text:style-name="Source_5f_Text">USE</text:span> command. <text:s/>The column names shall be as stored in the internal table. <text:s/>If no file name is specified, then any <text:span text:style-name="Source_5f_Text">SAVE</text:span> statement in effect shall be canceled. <text:s/>The <text:span text:style-name="Source_5f_Text">FMT</text:span> option governs the output file format (<text:span text:style-name="Source_5f_Text">OOXML</text:span> and <text:span text:style-name="Source_5f_Text">MSEXCEL</text:span> are equivalent). <text:s/>The <text:span text:style-name="Source_5f_Text">HEADER</text:span> option determines whether a header is written to the output file or spreadsheet. <text:s/>The <text:span text:style-name="Source_5f_Text">DLM</text:span> option sets the field delimiter on CSV files <text:span text:style-name="T21">(string must be quoted)</text:span>. <text:s/>Variables shall be written in the order in which they appear in the internal table.</text:p>
          </table:table-cell>
        </table:table-row>
        <table:table-row table:style-name="Commands.30">
          <table:table-cell table:style-name="Commands.A2" office:value-type="string">
            <text:p text:style-name="P130"><text:span text:style-name="Source_5f_Text">SELECT</text:span></text:p>
          </table:table-cell>
          <table:table-cell table:style-name="Commands.A2" office:value-type="string">
            <text:p text:style-name="P130"><text:span text:style-name="Source_5f_Text">SELECT</text:span> &lt;<text:span text:style-name="Variable">expr</text:span>&gt;...</text:p>
          </table:table-cell>
          <table:table-cell table:style-name="Commands.A2" office:value-type="string">
            <text:p text:style-name="P137">Declarative</text:p>
            <text:p text:style-name="P138"/>
          </table:table-cell>
          <table:table-cell table:style-name="Commands.D2" office:value-type="string">
            <text:p text:style-name="P130">Process only the subset of the data described by the comma-delimited set of boolean expressions.</text:p>
          </table:table-cell>
        </table:table-row>
        <text:soft-page-break/>
        <table:table-row table:style-name="Commands.30">
          <table:table-cell table:style-name="Commands.A2" office:value-type="string">
            <text:p text:style-name="P130"><text:span text:style-name="Source_5f_Text">SELECT CASE</text:span>/<text:span text:style-name="Source_5f_Text">CASE</text:span>/<text:span text:style-name="Source_5f_Text">CASE END</text:span></text:p>
          </table:table-cell>
          <table:table-cell table:style-name="Commands.A2" office:value-type="string">
            <text:p text:style-name="P130"/>
          </table:table-cell>
          <table:table-cell table:style-name="Commands.A2" office:value-type="string">
            <text:p text:style-name="P137">Deferred Execution</text:p>
          </table:table-cell>
          <table:table-cell table:style-name="Commands.D2" office:value-type="string">
            <text:p text:style-name="P130">As specified in the BW BASIC documentation.</text:p>
          </table:table-cell>
        </table:table-row>
        <table:table-row table:style-name="Commands.32">
          <table:table-cell table:style-name="Commands.A2" office:value-type="string">
            <text:p text:style-name="P130"><text:span text:style-name="Source_5f_Text">SET</text:span></text:p>
          </table:table-cell>
          <table:table-cell table:style-name="Commands.A2" office:value-type="string">
            <text:p text:style-name="P130"><text:span text:style-name="Source_5f_Text">SET</text:span> &lt;<text:span text:style-name="Variable">varname</text:span>&gt; <text:span text:style-name="Source_5f_Text">=</text:span> &lt; <text:span text:style-name="Variable">expr</text:span>&gt;</text:p>
          </table:table-cell>
          <table:table-cell table:style-name="Commands.A2" office:value-type="string">
            <text:p text:style-name="P138">Deferred Execution</text:p>
          </table:table-cell>
          <table:table-cell table:style-name="Commands.D2" office:value-type="string">
            <text:p text:style-name="P130">Write the output of the expression to a temporary variable, which will disappear after the next <text:span text:style-name="Source_5f_Text">RUN</text:span> statement is executed. <text:s/>A <text:span text:style-name="Source_5f_Text">SET</text:span> statement that attempts to write to a permanent variable will fail with an error message.</text:p>
          </table:table-cell>
        </table:table-row>
        <table:table-row table:style-name="Commands.30">
          <table:table-cell table:style-name="Commands.A2" office:value-type="string">
            <text:p text:style-name="P130"><text:span text:style-name="Source_5f_Text">SORT</text:span></text:p>
          </table:table-cell>
          <table:table-cell table:style-name="Commands.A2" office:value-type="string">
            <text:p text:style-name="P130"><text:span text:style-name="Source_5f_Text">SORT</text:span> &lt; <text:span text:style-name="Variable">varname</text:span>&gt;...</text:p>
          </table:table-cell>
          <table:table-cell table:style-name="Commands.A2" office:value-type="string">
            <text:p text:style-name="P140">Immediate Execution</text:p>
          </table:table-cell>
          <table:table-cell table:style-name="Commands.D2" office:value-type="string">
            <text:p text:style-name="P130">Sort the output dataset by the variables named.</text:p>
          </table:table-cell>
        </table:table-row>
        <table:table-row table:style-name="Commands.30">
          <table:table-cell table:style-name="Commands.A2" office:value-type="string">
            <text:p text:style-name="P130"><text:span text:style-name="Source_5f_Text">SUBMIT</text:span></text:p>
          </table:table-cell>
          <table:table-cell table:style-name="Commands.A2" office:value-type="string">
            <text:p text:style-name="P130"><text:span text:style-name="Source_5f_Text">SUBMIT</text:span> &lt;<text:span text:style-name="Variable">filename</text:span> &gt;</text:p>
          </table:table-cell>
          <table:table-cell table:style-name="Commands.A2" office:value-type="string">
            <text:p text:style-name="P137">Deferred Execution</text:p>
          </table:table-cell>
          <table:table-cell table:style-name="Commands.D2" office:value-type="string">
            <text:p text:style-name="P130">Read and execute the commands contained in the specified file. <text:s text:c="2"/>If the statement appears inside an <text:span text:style-name="Source_5f_Text">IF</text:span>, <text:span text:style-name="Source_5f_Text">FOR</text:span>, <text:span text:style-name="Source_5f_Text">WHILE</text:span>, or <text:span text:style-name="Source_5f_Text">REPEAT</text:span>/<text:span text:style-name="Source_5f_Text">UNTIL</text:span> block then the file may not contain any declarative statements. <text:s/>The file to be executed may contain one or more <text:span text:style-name="Source_5f_Text">SUBMIT</text:span> statements, but a <text:span text:style-name="Source_5f_Text">SUBMIT</text:span> statement that attempts to submit a file that is already in the current execution chain will fail with an error message.</text:p>
          </table:table-cell>
        </table:table-row>
        <text:soft-page-break/>
        <table:table-row table:style-name="Commands.30">
          <table:table-cell table:style-name="Commands.A2" office:value-type="string">
            <text:p text:style-name="P141"><text:span text:style-name="Source_5f_Text">SYSTEM</text:span></text:p>
          </table:table-cell>
          <table:table-cell table:style-name="Commands.A2" office:value-type="string">
            <text:p text:style-name="P141"><text:span text:style-name="Source_5f_Text">SYSTEM</text:span> [<text:span text:style-name="Variable">&lt;cmd&gt;</text:span>]</text:p>
          </table:table-cell>
          <table:table-cell table:style-name="Commands.A2" office:value-type="string">
            <text:p text:style-name="P142">Immediate execution</text:p>
          </table:table-cell>
          <table:table-cell table:style-name="Commands.D2" office:value-type="string">
            <text:p text:style-name="P141">Execute the specified system command. <text:s/>If no command is given, then spawn a shell and resume the program when the shell exits. <text:s/><text:span text:style-name="T22">If the command is quoted, then it will be taken literally. <text:s/>Otherwise, it will be taken as the name of a variable or expression. <text:s/></text:span><text:span text:style-name="T23">If execution of a system command inside of a program is desired, then use the </text:span><text:span text:style-name="Source_5f_Text"><text:span text:style-name="T23">SHELL</text:span></text:span><text:span text:style-name="T23"> function.</text:span></text:p>
          </table:table-cell>
        </table:table-row>
        <table:table-row table:style-name="Commands.32">
          <table:table-cell table:style-name="Commands.A2" office:value-type="string">
            <text:p text:style-name="P130"><text:span text:style-name="Source_5f_Text">UNHOLD</text:span></text:p>
          </table:table-cell>
          <table:table-cell table:style-name="Commands.A2" office:value-type="string">
            <text:p text:style-name="P130"><text:span text:style-name="Source_5f_Text">UNHOLD</text:span></text:p>
          </table:table-cell>
          <table:table-cell table:style-name="Commands.A2" office:value-type="string">
            <text:p text:style-name="P143">Declarative</text:p>
          </table:table-cell>
          <table:table-cell table:style-name="Commands.D2" office:value-type="string">
            <text:p text:style-name="P130">Cancel any <text:span text:style-name="Source_5f_Text">HOLD</text:span> statement currently in effect.</text:p>
          </table:table-cell>
        </table:table-row>
        <table:table-row table:style-name="Commands.37">
          <table:table-cell table:style-name="Commands.A2" office:value-type="string">
            <text:p text:style-name="P130"><text:span text:style-name="Source_5f_Text">USE</text:span></text:p>
          </table:table-cell>
          <table:table-cell table:style-name="Commands.A2" office:value-type="string">
            <text:p text:style-name="P130"><text:span text:style-name="Source_5f_Text">USE</text:span> [<text:span text:style-name="Source_5f_Text"><text:span text:style-name="T24">MOCK</text:span></text:span><text:span text:style-name="T24"> | </text:span>&lt;<text:span text:style-name="Variable">filename</text:span>&gt;]<text:span text:style-name="Source_5f_Text"> <text:s/>/ NSCAN =</text:span> &lt;<text:span text:style-name="Variable">n</text:span>&gt;</text:p>
          </table:table-cell>
          <table:table-cell table:style-name="Commands.A2" office:value-type="string">
            <text:p text:style-name="P143">Declarative</text:p>
          </table:table-cell>
          <table:table-cell table:style-name="Commands.D2" office:value-type="string">
            <text:p text:style-name="P130">Open a dataset for reading and display the names of the columns and the number of records. <text:s/>The internal table shall be overwritten with the contents of the file. <text:s/>Any column with a name that ends in “$” is assumed to be character. <text:s/>Otherwise, any column with non-numeric values in any of the first <text:span text:style-name="Variable">n</text:span> rows (if there are that many) will be taken as character and “$” will be added to the name. <text:s/>If subsequently, a <text:soft-page-break/>non-numeric value appears in such a column, it will be taken as missing and a warning will be issued (maximum of 10 shall be written). <text:s/>If a column name appears more than once in the file, only the last column with the name will be used and a warning shall be issued. <text:s/>If the file name is unquoted, it is converted to uppercase. <text:s/>If the name is unquoted and has no extension,<text:span text:style-name="Source_5f_Text"> <text:s text:c="2"/></text:span>“.CSV” is appended to the name. <text:s/>The default directory is the current working directory unless changed by the <text:span text:style-name="Source_5f_Text">FPATH</text:span> command. <text:s/>The format of the file will be assumed based on the file name extension. Any <text:span text:style-name="Source_5f_Text">DROP</text:span>, <text:span text:style-name="Source_5f_Text">KEEP</text:span>, <text:s/><text:span text:style-name="Source_5f_Text">LET</text:span>, <text:span text:style-name="Source_20_Text">or</text:span> <text:span text:style-name="Source_5f_Text">REPEAT</text:span> statements are canceled when a new dataset is read in. <text:s/><text:span text:style-name="Source_5f_Text"><text:span text:style-name="T24">USE MOCK</text:span></text:span> <text:span text:style-name="T24">generates mock data for testing purposes.</text:span></text:p>
          </table:table-cell>
        </table:table-row>
        <table:table-row table:style-name="Commands.32">
          <table:table-cell table:style-name="Commands.A2" office:value-type="string">
            <text:p text:style-name="P130"><text:span text:style-name="Source_5f_Text">WHILE</text:span>/<text:span text:style-name="Source_5f_Text">WEND</text:span></text:p>
          </table:table-cell>
          <table:table-cell table:style-name="Commands.A2" office:value-type="string">
            <text:p text:style-name="P130"/>
          </table:table-cell>
          <table:table-cell table:style-name="Commands.A2" office:value-type="string">
            <text:p text:style-name="P143">Deferred Execution</text:p>
          </table:table-cell>
          <table:table-cell table:style-name="Commands.D2" office:value-type="string">
            <text:p text:style-name="P130">As specified in the BW BASIC documentation.</text:p>
          </table:table-cell>
        </table:table-row>
        <text:soft-page-break/>
        <table:table-row table:style-name="Commands.30">
          <table:table-cell table:style-name="Commands.A2" office:value-type="string">
            <text:p text:style-name="P144"><text:span text:style-name="Source_5f_Text">WRITE</text:span></text:p>
          </table:table-cell>
          <table:table-cell table:style-name="Commands.A2" office:value-type="string">
            <text:p text:style-name="P144"><text:span text:style-name="Source_5f_Text">WRITE</text:span></text:p>
          </table:table-cell>
          <table:table-cell table:style-name="Commands.A2" office:value-type="string">
            <text:p text:style-name="P143">Deferred Execution</text:p>
          </table:table-cell>
          <table:table-cell table:style-name="Commands.D2" office:value-type="string">
            <text:p text:style-name="P130"><text:span text:style-name="T25">Explicitly write the current record (PDV) to the data table.</text:span> <text:s/>Suppresses the default record output at the end of the Data Step.</text:p>
          </table:table-cell>
        </table:table-row>
      </table:table>
      <text:p text:style-name="P145">Deferred Execution Commands<text:span text:style-name="T4"> are part of the program that is executed with the next </text:span><text:span text:style-name="Source_5f_Text"><text:span text:style-name="T4">RUN</text:span></text:span><text:span text:style-name="T4"> statement. <text:s/></text:span><text:span text:style-name="T26">Statements and blocks are executed in the order in which they were entered. <text:s/></text:span><text:span text:style-name="T4">The currently defined program may be listed with the </text:span><text:span text:style-name="Source_5f_Text"><text:span text:style-name="T4">LIST</text:span></text:span><text:span text:style-name="T4"> command. <text:s/>Statements may be deleted with the </text:span><text:span text:style-name="Source_5f_Text"><text:span text:style-name="T4">DELETE</text:span></text:span><text:span text:style-name="T4"> command.</text:span></text:p>
      <text:p text:style-name="Text_20_body"><text:span text:style-name="T1">Declarative Commands</text:span> <text:span text:style-name="T27">are executed immediately. <text:s/></text:span>Th<text:span text:style-name="T27">ey</text:span> typically configure the interpreter state or define data structures.</text:p>
      <text:p text:style-name="Text_20_body"><text:span text:style-name="T1">Line Continuation:</text:span> A statement ending with a comma shall be continued to the next line.</text:p>
      <text:p text:style-name="Horizontal_20_Line"/>
      <text:h text:style-name="Heading_20_3" text:outline-level="3"><text:bookmark-start text:name="functions"/>7.2 Functions<text:bookmark-end text:name="functions"/></text:h>
      <text:p text:style-name="P146">Functions perform computations and return values. Unless otherwise stated:</text:p>
      <table:table table:name="Functions" table:style-name="Functions" table:template-name="Default Style">
        <table:table-column table:style-name="Functions.A"/>
        <table:table-column table:style-name="Functions.B"/>
        <table:table-column table:style-name="Functions.C"/>
        <table:table-column table:style-name="Functions.D"/>
        <table:table-row table:style-name="Functions.1">
          <table:table-cell table:style-name="Functions.A1" office:value-type="string">
            <text:p text:style-name="P128">Name</text:p>
          </table:table-cell>
          <table:table-cell table:style-name="Functions.A1" office:value-type="string">
            <text:p text:style-name="P147">Usage</text:p>
          </table:table-cell>
          <table:table-cell table:style-name="Functions.A1" office:value-type="string">
            <text:p text:style-name="P128">Constraints</text:p>
          </table:table-cell>
          <table:table-cell table:style-name="Functions.D1" office:value-type="string">
            <text:p text:style-name="P128">Description</text:p>
          </table:table-cell>
        </table:table-row>
        <table:table-row table:style-name="Functions.1">
          <table:table-cell table:style-name="Functions.A2" office:value-type="string">
            <text:p text:style-name="P130"><text:span text:style-name="Source_5f_Text">ABS</text:span></text:p>
          </table:table-cell>
          <table:table-cell table:style-name="Functions.A2" office:value-type="string">
            <text:p text:style-name="P130"><text:span text:style-name="Source_5f_Text">ABS(</text:span><text:span text:style-name="Variable"><text:span text:style-name="T28">x</text:span></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1">
          <table:table-cell table:style-name="Functions.A2" office:value-type="string">
            <text:p text:style-name="P130"><text:span text:style-name="Source_5f_Text">ARCCOS</text:span></text:p>
          </table:table-cell>
          <table:table-cell table:style-name="Functions.A2" office:value-type="string">
            <text:p text:style-name="P133"><text:span text:style-name="Source_5f_Text">ARCCOS(</text:span><text:span text:style-name="Variable"><text:span text:style-name="T28">x</text:span></text:span><text:span text:style-name="Source_5f_Text">)</text:span></text:p>
          </table:table-cell>
          <table:table-cell table:style-name="Functions.A2" office:value-type="string">
            <text:p text:style-name="P130">-<text:span text:style-name="T28">1 </text:span><text:span text:style-name="T29">≤</text:span><text:span text:style-name="T28"> </text:span><text:span text:style-name="Variable"><text:span text:style-name="T28">x</text:span></text:span><text:span text:style-name="T28"> </text:span><text:span text:style-name="T29">≤</text:span><text:span text:style-name="T28"> 1</text:span></text:p>
          </table:table-cell>
          <table:table-cell table:style-name="Functions.D2" office:value-type="string">
            <text:p text:style-name="P130">As specified in the BW BASIC documentation.</text:p>
          </table:table-cell>
        </table:table-row>
        <table:table-row table:style-name="Functions.1">
          <table:table-cell table:style-name="Functions.A2" office:value-type="string">
            <text:p text:style-name="P130"><text:span text:style-name="Source_5f_Text">ARCSIN</text:span></text:p>
          </table:table-cell>
          <table:table-cell table:style-name="Functions.A2" office:value-type="string">
            <text:p text:style-name="P148"><text:span text:style-name="Source_5f_Text">ARCSIN(</text:span><text:span text:style-name="Variable">x</text:span><text:span text:style-name="Source_5f_Text">)</text:span></text:p>
          </table:table-cell>
          <table:table-cell table:style-name="Functions.A2" office:value-type="string">
            <text:p text:style-name="P149">-<text:span text:style-name="T28">1 </text:span><text:span text:style-name="T29">≤</text:span><text:span text:style-name="T28"> </text:span><text:span text:style-name="Variable"><text:span text:style-name="T28">x</text:span></text:span><text:span text:style-name="T28"> </text:span><text:span text:style-name="T29">≤</text:span><text:span text:style-name="T28"> 1</text:span></text:p>
          </table:table-cell>
          <table:table-cell table:style-name="Functions.D2" office:value-type="string">
            <text:p text:style-name="P130">As specified in the BW BASIC documentation.</text:p>
          </table:table-cell>
        </table:table-row>
        <table:table-row table:style-name="Functions.1">
          <table:table-cell table:style-name="Functions.A2" office:value-type="string">
            <text:p text:style-name="P130"><text:span text:style-name="Source_5f_Text">ARCTAN</text:span></text:p>
          </table:table-cell>
          <table:table-cell table:style-name="Functions.A2" office:value-type="string">
            <text:p text:style-name="P150"><text:span text:style-name="Source_5f_Text">ARCTA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ASCII</text:span></text:p>
          </table:table-cell>
          <table:table-cell table:style-name="Functions.A2" office:value-type="string">
            <text:p text:style-name="P133"><text:span text:style-name="Source_5f_Text">ASCII(</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BCF</text:span></text:p>
          </table:table-cell>
          <table:table-cell table:style-name="Functions.A2" office:value-type="string">
            <text:p text:style-name="P130"><text:span text:style-name="Source_5f_Text">BCF(</text:span><text:span text:style-name="Variable">β</text:span><text:span text:style-name="Source_5f_Text">, </text:span><text:span text:style-name="Variable">p</text:span><text:span text:style-name="Source_5f_Text">, </text:span><text:span text:style-name="Variable">q</text:span><text:span text:style-name="Source_5f_Text">)</text:span></text:p>
          </table:table-cell>
          <table:table-cell table:style-name="Functions.A2" office:value-type="string">
            <text:p text:style-name="P130">0 ≤ <text:span text:style-name="Variable">β ≤ 1</text:span></text:p>
            <text:p text:style-name="P130"><text:span text:style-name="Variable">p &gt; 0</text:span></text:p>
            <text:p text:style-name="P130"><text:span text:style-name="Variable">q <text:s/>&gt; 0</text:span></text:p>
          </table:table-cell>
          <table:table-cell table:style-name="Functions.D2" office:value-type="string">
            <text:p text:style-name="P130">Return the value of the cumulative distribution function <text:soft-page-break/>for the beta distribution, where <text:span text:style-name="Variable">β </text:span>is the evaluation point and <text:span text:style-name="Variable">p </text:span>and <text:span text:style-name="Variable">q </text:span>are the alpha and beta shape parameters.</text:p>
          </table:table-cell>
        </table:table-row>
        <table:table-row table:style-name="Functions.6">
          <table:table-cell table:style-name="Functions.A2" office:value-type="string">
            <text:p text:style-name="P130"><text:span text:style-name="Source_5f_Text">BDF</text:span></text:p>
          </table:table-cell>
          <table:table-cell table:style-name="Functions.A2" office:value-type="string">
            <text:p text:style-name="P130"><text:span text:style-name="Source_5f_Text">BDF(</text:span><text:span text:style-name="Variable">β</text:span><text:span text:style-name="Source_5f_Text">, </text:span><text:span text:style-name="Variable">p</text:span><text:span text:style-name="Source_5f_Text">, </text:span><text:span text:style-name="Variable">q</text:span><text:span text:style-name="Source_5f_Text">)</text:span></text:p>
          </table:table-cell>
          <table:table-cell table:style-name="Functions.A2" office:value-type="string">
            <text:p text:style-name="P130">0 ≤ <text:span text:style-name="Variable">β ≤ 1</text:span></text:p>
            <text:p text:style-name="P130"><text:span text:style-name="Variable">p &gt; 0</text:span></text:p>
            <text:p text:style-name="P130"><text:span text:style-name="Variable">q <text:s/>&gt; 0</text:span></text:p>
          </table:table-cell>
          <table:table-cell table:style-name="Functions.D2" office:value-type="string">
            <text:p text:style-name="P130">Return the value of the <text:span text:style-name="T30">beta density function</text:span> where <text:span text:style-name="Variable">β </text:span>is the evaluation point and <text:span text:style-name="Variable">p </text:span>and <text:span text:style-name="Variable">q </text:span>are the alpha and beta shape parameters.</text:p>
          </table:table-cell>
        </table:table-row>
        <table:table-row table:style-name="Functions.6">
          <table:table-cell table:style-name="Functions.A2" office:value-type="string">
            <text:p text:style-name="P130"><text:span text:style-name="Source_5f_Text">BIF</text:span></text:p>
          </table:table-cell>
          <table:table-cell table:style-name="Functions.A2" office:value-type="string">
            <text:p text:style-name="P130"><text:span text:style-name="Source_5f_Text">BIF(</text:span><text:span text:style-name="Variable">ᶲ</text:span><text:span text:style-name="Source_5f_Text">, </text:span><text:span text:style-name="Variable">p</text:span><text:span text:style-name="Source_5f_Text">, </text:span><text:span text:style-name="Variable">q</text:span><text:span text:style-name="Source_5f_Text">)</text:span></text:p>
          </table:table-cell>
          <table:table-cell table:style-name="Functions.A2" office:value-type="string">
            <text:p text:style-name="P130">0 ≤ <text:span text:style-name="Variable">ᶲ ≤ 1</text:span></text:p>
            <text:p text:style-name="P130"><text:span text:style-name="Variable">p &gt; 0</text:span></text:p>
            <text:p text:style-name="P130"><text:span text:style-name="Variable">q</text:span> <text:span text:style-name="Variable"><text:s/>&gt; 0</text:span></text:p>
          </table:table-cell>
          <table:table-cell table:style-name="Functions.D2" office:value-type="string">
            <text:p text:style-name="P130">Return the value of the inverse probability density function for the beta distribution, where <text:span text:style-name="Variable">ᶲ </text:span><text:s/>is the probability.<text:span text:style-name="Variable"> </text:span>and <text:span text:style-name="Variable">p </text:span>and <text:span text:style-name="Variable">q </text:span>are the alpha and beta shape parameters.</text:p>
          </table:table-cell>
        </table:table-row>
        <table:table-row table:style-name="Functions.6">
          <table:table-cell table:style-name="Functions.A2" office:value-type="string">
            <text:p text:style-name="P130"><text:span text:style-name="Source_5f_Text">BIN$</text:span></text:p>
          </table:table-cell>
          <table:table-cell table:style-name="Functions.A2" office:value-type="string">
            <text:p text:style-name="P133"><text:span text:style-name="Source_5f_Text">BIN$(</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51">0 <text:span text:style-name="T31">≤</text:span> <text:span text:style-name="Variable">Y%</text:span> <text:span text:style-name="T31">≤</text:span> 255</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BOF</text:span></text:p>
          </table:table-cell>
          <table:table-cell table:style-name="Functions.A2" office:value-type="string">
            <text:p text:style-name="P130">No arguments</text:p>
          </table:table-cell>
          <table:table-cell table:style-name="Functions.A2" office:value-type="string">
            <text:p text:style-name="P130"/>
          </table:table-cell>
          <table:table-cell table:style-name="Functions.D2" office:value-type="string">
            <text:p text:style-name="P130">True <text:span text:style-name="T32">(1) </text:span>for the first record of a dataset and false <text:span text:style-name="T32">(0) </text:span>otherwise.</text:p>
          </table:table-cell>
        </table:table-row>
        <table:table-row table:style-name="Functions.6">
          <table:table-cell table:style-name="Functions.A2" office:value-type="string">
            <text:p text:style-name="P130"><text:span text:style-name="Source_5f_Text">BOG</text:span></text:p>
          </table:table-cell>
          <table:table-cell table:style-name="Functions.A2" office:value-type="string">
            <text:p text:style-name="P130">No arguments</text:p>
          </table:table-cell>
          <table:table-cell table:style-name="Functions.A2" office:value-type="string">
            <text:p text:style-name="P130"/>
          </table:table-cell>
          <table:table-cell table:style-name="Functions.D2" office:value-type="string">
            <text:p text:style-name="P130">True <text:span text:style-name="T33">(1) </text:span>at the beginning of a <text:span text:style-name="Source_5f_Text">BY</text:span> group and false <text:span text:style-name="T33">(0)</text:span> otherwise. <text:s/>Same output as <text:span text:style-name="Source_5f_Text">BOF</text:span> if a <text:span text:style-name="Source_5f_Text">BY</text:span> statement is not in effect.</text:p>
          </table:table-cell>
        </table:table-row>
        <table:table-row table:style-name="Functions.6">
          <table:table-cell table:style-name="Functions.A2" office:value-type="string">
            <text:p text:style-name="P130"><text:span text:style-name="Source_5f_Text">BRN</text:span></text:p>
          </table:table-cell>
          <table:table-cell table:style-name="Functions.A2" office:value-type="string">
            <text:p text:style-name="P130"><text:span text:style-name="Source_5f_Text">BRN(</text:span><text:span text:style-name="Variable">p,</text:span><text:span text:style-name="Source_5f_Text"> </text:span><text:span text:style-name="Variable">q</text:span><text:span text:style-name="Source_20_Text">)</text:span></text:p>
          </table:table-cell>
          <table:table-cell table:style-name="Functions.A2" office:value-type="string">
            <text:p text:style-name="P130"><text:span text:style-name="Variable">p &gt; 0</text:span></text:p>
            <text:p text:style-name="P130"><text:span text:style-name="Variable">q <text:s/>&gt; 0</text:span></text:p>
          </table:table-cell>
          <table:table-cell table:style-name="Functions.D2" office:value-type="string">
            <text:p text:style-name="P130">Return a random number from the beta distribution. <text:s/><text:span text:style-name="Variable">p</text:span> and <text:span text:style-name="Variable">q</text:span> are the alpha and beta shape parameters. <text:s/><text:soft-page-break/>Both must be greater than 0.</text:p>
          </table:table-cell>
        </table:table-row>
        <table:table-row table:style-name="Functions.6">
          <table:table-cell table:style-name="Functions.A2" office:value-type="string">
            <text:p text:style-name="P130"><text:span text:style-name="Source_5f_Text">CLG</text:span></text:p>
          </table:table-cell>
          <table:table-cell table:style-name="Functions.A2" office:value-type="string">
            <text:p text:style-name="P133"><text:span text:style-name="Source_5f_Text">CLG(</text:span><text:span text:style-name="Variable">X</text:span><text:span text:style-name="Source_5f_Text">)</text:span></text:p>
          </table:table-cell>
          <table:table-cell table:style-name="Functions.A2" office:value-type="string">
            <text:p text:style-name="P152"><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COS</text:span></text:p>
          </table:table-cell>
          <table:table-cell table:style-name="Functions.A2" office:value-type="string">
            <text:p text:style-name="P133"><text:span text:style-name="Source_5f_Text">COS(</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COSD</text:span></text:p>
          </table:table-cell>
          <table:table-cell table:style-name="Functions.A2" office:value-type="string">
            <text:p text:style-name="P133"><text:span text:style-name="Source_5f_Text">COSD(</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COT</text:span></text:p>
          </table:table-cell>
          <table:table-cell table:style-name="Functions.A2" office:value-type="string">
            <text:p text:style-name="P133"><text:span text:style-name="Source_5f_Text">COT(</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CSC</text:span></text:p>
          </table:table-cell>
          <table:table-cell table:style-name="Functions.A2" office:value-type="string">
            <text:p text:style-name="P130"><text:span text:style-name="Source_5f_Text">CSC(</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DEG</text:span>/<text:span text:style-name="Source_5f_Text">DEGREE</text:span></text:p>
          </table:table-cell>
          <table:table-cell table:style-name="Functions.A2" office:value-type="string">
            <text:p text:style-name="P130"><text:span text:style-name="Source_5f_Text">DEG(</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Convert <text:span text:style-name="Variable">x</text:span> from radians to degrees.</text:p>
          </table:table-cell>
        </table:table-row>
        <table:table-row table:style-name="Functions.6">
          <table:table-cell table:style-name="Functions.A2" office:value-type="string">
            <text:p text:style-name="P130"><text:span text:style-name="Source_5f_Text">ECF</text:span></text:p>
          </table:table-cell>
          <table:table-cell table:style-name="Functions.A2" office:value-type="string">
            <text:p text:style-name="P130"><text:span text:style-name="Source_5f_Text">ECF(</text:span><text:span text:style-name="Variable">x</text:span><text:span text:style-name="Source_5f_Text">)</text:span></text:p>
          </table:table-cell>
          <table:table-cell table:style-name="Functions.A2" office:value-type="string">
            <text:p text:style-name="P130">0 ≤ <text:span text:style-name="Variable">x ≤ 1</text:span></text:p>
          </table:table-cell>
          <table:table-cell table:style-name="Functions.D2" office:value-type="string">
            <text:p text:style-name="P130">Return the value of the cumulative distribution function of the exponential distribution where <text:span text:style-name="Variable">x</text:span> is the evaluation point.</text:p>
          </table:table-cell>
        </table:table-row>
        <table:table-row table:style-name="Functions.6">
          <table:table-cell table:style-name="Functions.A2" office:value-type="string">
            <text:p text:style-name="P130"><text:span text:style-name="Source_5f_Text">EDF</text:span></text:p>
          </table:table-cell>
          <table:table-cell table:style-name="Functions.A2" office:value-type="string">
            <text:p text:style-name="P130"><text:span text:style-name="Source_5f_Text">EDF(</text:span><text:span text:style-name="Variable">x</text:span><text:span text:style-name="Source_5f_Text">)</text:span></text:p>
          </table:table-cell>
          <table:table-cell table:style-name="Functions.A2" office:value-type="string">
            <text:p text:style-name="P130">0 ≤ <text:span text:style-name="Variable">x ≤ 1</text:span></text:p>
          </table:table-cell>
          <table:table-cell table:style-name="Functions.D2" office:value-type="string">
            <text:p text:style-name="P130">Return the value of the probability density function of the exponential distribution where <text:span text:style-name="Variable">x</text:span> is the evaluation point.</text:p>
          </table:table-cell>
        </table:table-row>
        <table:table-row table:style-name="Functions.6">
          <table:table-cell table:style-name="Functions.A2" office:value-type="string">
            <text:p text:style-name="P130"><text:span text:style-name="Source_5f_Text">EIF</text:span></text:p>
          </table:table-cell>
          <table:table-cell table:style-name="Functions.A2" office:value-type="string">
            <text:p text:style-name="P130"><text:span text:style-name="Source_5f_Text">EIF(</text:span><text:span text:style-name="Source_20_Text">ᶲ</text:span><text:span text:style-name="Source_5f_Text">)</text:span></text:p>
          </table:table-cell>
          <table:table-cell table:style-name="Functions.A2" office:value-type="string">
            <text:p text:style-name="P130">0 ≤ <text:span text:style-name="Variable">ᶲ </text:span>≤ 1</text:p>
          </table:table-cell>
          <table:table-cell table:style-name="Functions.D2" office:value-type="string">
            <text:p text:style-name="P130">Return the value of the inverse probability density function of the exponential distribution where <text:span text:style-name="Source_20_Text">ᶲ</text:span> is the probability.</text:p>
          </table:table-cell>
        </table:table-row>
        <table:table-row table:style-name="Functions.6">
          <table:table-cell table:style-name="Functions.A2" office:value-type="string">
            <text:p text:style-name="P130"><text:span text:style-name="Source_5f_Text">EOF</text:span></text:p>
          </table:table-cell>
          <table:table-cell table:style-name="Functions.A2" office:value-type="string">
            <text:p text:style-name="P130">No arguments</text:p>
          </table:table-cell>
          <table:table-cell table:style-name="Functions.A2" office:value-type="string">
            <text:p text:style-name="P130"/>
          </table:table-cell>
          <table:table-cell table:style-name="Functions.D2" office:value-type="string">
            <text:p text:style-name="P130">True <text:span text:style-name="T34">(1) </text:span>for the last <text:soft-page-break/>record of the input dataset and false <text:span text:style-name="T34">(0)</text:span> otherwise.</text:p>
          </table:table-cell>
        </table:table-row>
        <table:table-row table:style-name="Functions.6">
          <table:table-cell table:style-name="Functions.A2" office:value-type="string">
            <text:p text:style-name="P130"><text:span text:style-name="Source_5f_Text">EOG</text:span></text:p>
          </table:table-cell>
          <table:table-cell table:style-name="Functions.A2" office:value-type="string">
            <text:p text:style-name="P130">No arguments</text:p>
          </table:table-cell>
          <table:table-cell table:style-name="Functions.A2" office:value-type="string">
            <text:p text:style-name="P130"/>
          </table:table-cell>
          <table:table-cell table:style-name="Functions.D2" office:value-type="string">
            <text:p text:style-name="P130">True <text:span text:style-name="T35">(1) </text:span>for the last record of a <text:span text:style-name="Source_20_Text">BY</text:span> group and false <text:span text:style-name="T35">(0) </text:span>otherwise. Same value as <text:span text:style-name="Source_20_Text">EOF</text:span> if a <text:span text:style-name="Source_20_Text">BY</text:span> statement is not in effect.</text:p>
          </table:table-cell>
        </table:table-row>
        <table:table-row table:style-name="Functions.6">
          <table:table-cell table:style-name="Functions.A2" office:value-type="string">
            <text:p text:style-name="P130"><text:span text:style-name="Source_5f_Text">ERN</text:span></text:p>
          </table:table-cell>
          <table:table-cell table:style-name="Functions.A2" office:value-type="string">
            <text:p text:style-name="P130"><text:span text:style-name="Source_5f_Text">ERN</text:span></text:p>
          </table:table-cell>
          <table:table-cell table:style-name="Functions.A2" office:value-type="string">
            <text:p text:style-name="P130"/>
          </table:table-cell>
          <table:table-cell table:style-name="Functions.D2" office:value-type="string">
            <text:p text:style-name="P130">Return a random number in the exponential distribution.</text:p>
          </table:table-cell>
        </table:table-row>
        <table:table-row table:style-name="Functions.6">
          <table:table-cell table:style-name="Functions.A2" office:value-type="string">
            <text:p text:style-name="P130"><text:span text:style-name="Source_5f_Text">EXP</text:span></text:p>
          </table:table-cell>
          <table:table-cell table:style-name="Functions.A2" office:value-type="string">
            <text:p text:style-name="P133"><text:span text:style-name="Source_5f_Text">EXP(</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FALSE</text:span></text:p>
          </table:table-cell>
          <table:table-cell table:style-name="Functions.A2" office:value-type="string">
            <text:p text:style-name="P153">No arguments</text:p>
          </table:table-cell>
          <table:table-cell table:style-name="Functions.A2" office:value-type="string">
            <text:p text:style-name="P130"/>
          </table:table-cell>
          <table:table-cell table:style-name="Functions.D2" office:value-type="string">
            <text:p text:style-name="P154">Return 0, which is taken as false.</text:p>
          </table:table-cell>
        </table:table-row>
        <table:table-row table:style-name="Functions.6">
          <table:table-cell table:style-name="Functions.A2" office:value-type="string">
            <text:p text:style-name="P130"><text:span text:style-name="Source_5f_Text">FCF</text:span></text:p>
          </table:table-cell>
          <table:table-cell table:style-name="Functions.A2" office:value-type="string">
            <text:p text:style-name="P130"><text:span text:style-name="Source_5f_Text">FCF(</text:span><text:span text:style-name="Variable">F</text:span><text:span text:style-name="Source_5f_Text">, </text:span><text:span text:style-name="Variable">df1</text:span><text:span text:style-name="Source_5f_Text">, </text:span><text:span text:style-name="Variable">df2</text:span><text:span text:style-name="Source_5f_Text">)</text:span></text:p>
          </table:table-cell>
          <table:table-cell table:style-name="Functions.A2" office:value-type="string">
            <text:p text:style-name="P130">0 ≤ <text:s/><text:span text:style-name="Variable">F</text:span> ≤ 1</text:p>
            <text:p text:style-name="P130"><text:span text:style-name="Variable">df1 </text:span>&gt; 0</text:p>
            <text:p text:style-name="P130"><text:span text:style-name="Variable">df2 </text:span>&gt; 0</text:p>
          </table:table-cell>
          <table:table-cell table:style-name="Functions.D2" office:value-type="string">
            <text:p text:style-name="P130">Return the value of the cumulative distribution function of the F distribution where <text:span text:style-name="Variable">F</text:span> is the evaluation point and <text:span text:style-name="Variable">df1</text:span> and <text:span text:style-name="Variable">df2</text:span> are the set of degrees of freedom.</text:p>
          </table:table-cell>
        </table:table-row>
        <table:table-row table:style-name="Functions.6">
          <table:table-cell table:style-name="Functions.A2" office:value-type="string">
            <text:p text:style-name="P130"><text:span text:style-name="Source_5f_Text">FDF</text:span></text:p>
          </table:table-cell>
          <table:table-cell table:style-name="Functions.A2" office:value-type="string">
            <text:p text:style-name="P130"><text:span text:style-name="Source_5f_Text">FDF(</text:span><text:span text:style-name="Variable">F</text:span><text:span text:style-name="Source_5f_Text">, </text:span><text:span text:style-name="Variable">df1</text:span><text:span text:style-name="Source_5f_Text">, </text:span><text:span text:style-name="Variable">df2</text:span><text:span text:style-name="Source_5f_Text">)</text:span></text:p>
          </table:table-cell>
          <table:table-cell table:style-name="Functions.A2" office:value-type="string">
            <text:p text:style-name="P130">0 ≤ <text:s/><text:span text:style-name="Variable">F</text:span> ≤ 1</text:p>
            <text:p text:style-name="P130"><text:span text:style-name="Variable">df1 </text:span>&gt; 0</text:p>
            <text:p text:style-name="P130"><text:span text:style-name="Variable">df2 </text:span>&gt; 0</text:p>
          </table:table-cell>
          <table:table-cell table:style-name="Functions.D2" office:value-type="string">
            <text:p text:style-name="P130">Return the value of the probability density function of the F distribution where <text:span text:style-name="Variable">F</text:span> is the evaluation point and <text:span text:style-name="Variable">df1</text:span> and <text:span text:style-name="Variable">df2</text:span> are the set of degrees of freedom.</text:p>
          </table:table-cell>
        </table:table-row>
        <table:table-row table:style-name="Functions.6">
          <table:table-cell table:style-name="Functions.A2" office:value-type="string">
            <text:p text:style-name="P130"><text:span text:style-name="Source_5f_Text">FIF</text:span></text:p>
          </table:table-cell>
          <table:table-cell table:style-name="Functions.A2" office:value-type="string">
            <text:p text:style-name="P130"><text:span text:style-name="Source_5f_Text">FIF(</text:span><text:span text:style-name="Variable">ᶲ</text:span><text:span text:style-name="Source_5f_Text">, </text:span><text:span text:style-name="Variable">df1</text:span><text:span text:style-name="Source_5f_Text">, </text:span><text:span text:style-name="Variable">df2</text:span>)</text:p>
          </table:table-cell>
          <table:table-cell table:style-name="Functions.A2" office:value-type="string">
            <text:p text:style-name="P130">0 ≤ <text:s/><text:span text:style-name="Variable">ᶲ</text:span> ≤ 1</text:p>
            <text:p text:style-name="P130"><text:span text:style-name="Variable">df1 </text:span>&gt; 0</text:p>
            <text:p text:style-name="P130"><text:span text:style-name="Variable">df2 </text:span>&gt; 0</text:p>
          </table:table-cell>
          <table:table-cell table:style-name="Functions.D2" office:value-type="string">
            <text:p text:style-name="P130">Return the value of the inverse probability density function of the F <text:soft-page-break/>distribution where <text:span text:style-name="Variable">ᶲ</text:span> is the probability and <text:span text:style-name="Variable">df1</text:span> and <text:span text:style-name="Variable">df2</text:span> are the set of degrees of freedom.</text:p>
          </table:table-cell>
        </table:table-row>
        <table:table-row table:style-name="Functions.6">
          <table:table-cell table:style-name="Functions.A2" office:value-type="string">
            <text:p text:style-name="P130"><text:span text:style-name="Source_5f_Text">FIX</text:span></text:p>
          </table:table-cell>
          <table:table-cell table:style-name="Functions.A2" office:value-type="string">
            <text:p text:style-name="P130"><text:span text:style-name="Source_5f_Text">FIX(</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FP</text:span>/<text:span text:style-name="Source_5f_Text">FRAC</text:span></text:p>
          </table:table-cell>
          <table:table-cell table:style-name="Functions.A2" office:value-type="string">
            <text:p text:style-name="P130"><text:span text:style-name="Source_5f_Text">FP(</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FRN</text:span></text:p>
          </table:table-cell>
          <table:table-cell table:style-name="Functions.A2" office:value-type="string">
            <text:p text:style-name="P130"><text:span text:style-name="Source_5f_Text">FRN(</text:span><text:span text:style-name="Variable">df1</text:span><text:span text:style-name="Source_5f_Text">, </text:span><text:span text:style-name="Variable">df2</text:span><text:span text:style-name="Source_5f_Text">)</text:span></text:p>
          </table:table-cell>
          <table:table-cell table:style-name="Functions.A2" office:value-type="string">
            <text:p text:style-name="P130"><text:span text:style-name="Variable">df1 </text:span>&gt; 0</text:p>
            <text:p text:style-name="P130"><text:span text:style-name="Variable">df2 </text:span>&gt; 0</text:p>
          </table:table-cell>
          <table:table-cell table:style-name="Functions.D2" office:value-type="string">
            <text:p text:style-name="P130">Return a random number in the F distribution, where <text:span text:style-name="Variable">df1</text:span> and <text:span text:style-name="Variable">df2</text:span> are the set of degrees of freedom.</text:p>
          </table:table-cell>
        </table:table-row>
        <table:table-row table:style-name="Functions.6">
          <table:table-cell table:style-name="Functions.A2" office:value-type="string">
            <text:p text:style-name="P130"><text:span text:style-name="Source_5f_Text">GCF</text:span></text:p>
          </table:table-cell>
          <table:table-cell table:style-name="Functions.A2" office:value-type="string">
            <text:p text:style-name="P130"><text:span text:style-name="Source_5f_Text">GCF(</text:span><text:span text:style-name="Variable">γ</text:span><text:span text:style-name="Source_5f_Text">, </text:span><text:span text:style-name="Variable">p</text:span><text:span text:style-name="Source_5f_Text">)</text:span></text:p>
          </table:table-cell>
          <table:table-cell table:style-name="Functions.A2" office:value-type="string">
            <text:p text:style-name="P130">0 ≤ <text:s/><text:span text:style-name="Variable">γ</text:span> ≤ 1</text:p>
            <text:p text:style-name="P130"><text:span text:style-name="Variable">p</text:span> &gt; 0</text:p>
          </table:table-cell>
          <table:table-cell table:style-name="Functions.D2" office:value-type="string">
            <text:p text:style-name="P130">Return the value of the cumulative distribution function of the gamma distribution where <text:s text:c="2"/><text:span text:style-name="Variable">γ </text:span>is the evaluation point and <text:span text:style-name="Variable">p </text:span>is the shape parameter.</text:p>
          </table:table-cell>
        </table:table-row>
        <table:table-row table:style-name="Functions.6">
          <table:table-cell table:style-name="Functions.A2" office:value-type="string">
            <text:p text:style-name="P130"><text:span text:style-name="Source_5f_Text">GDF</text:span></text:p>
          </table:table-cell>
          <table:table-cell table:style-name="Functions.A2" office:value-type="string">
            <text:p text:style-name="P130"><text:span text:style-name="Source_5f_Text">GDF(</text:span><text:span text:style-name="Variable">γ</text:span><text:span text:style-name="Source_5f_Text">, </text:span><text:span text:style-name="Variable">p</text:span><text:span text:style-name="Source_5f_Text">)</text:span></text:p>
          </table:table-cell>
          <table:table-cell table:style-name="Functions.A2" office:value-type="string">
            <text:p text:style-name="P130">0 ≤ <text:s/><text:span text:style-name="Variable">γ</text:span> ≤ 1</text:p>
            <text:p text:style-name="P130"><text:span text:style-name="Variable">p</text:span> &gt; 0</text:p>
          </table:table-cell>
          <table:table-cell table:style-name="Functions.D2" office:value-type="string">
            <text:p text:style-name="P130">Return the value of the <text:span text:style-name="T36">gamma density function</text:span> where <text:span text:style-name="Variable">γ </text:span>is the evaluation point and <text:span text:style-name="Variable">p </text:span>is the shape parameter.</text:p>
          </table:table-cell>
        </table:table-row>
        <table:table-row table:style-name="Functions.6">
          <table:table-cell table:style-name="Functions.A2" office:value-type="string">
            <text:p text:style-name="P130"><text:span text:style-name="Source_5f_Text">GIF</text:span></text:p>
          </table:table-cell>
          <table:table-cell table:style-name="Functions.A2" office:value-type="string">
            <text:p text:style-name="P130"><text:span text:style-name="Source_5f_Text">GIF(</text:span><text:span text:style-name="Variable">ᶲ</text:span><text:span text:style-name="Source_5f_Text">, </text:span><text:span text:style-name="Variable">p</text:span><text:span text:style-name="Source_5f_Text">)</text:span></text:p>
          </table:table-cell>
          <table:table-cell table:style-name="Functions.A2" office:value-type="string">
            <text:p text:style-name="P130">0 ≤ <text:s/><text:span text:style-name="Variable">ᶲ</text:span> ≤ 1</text:p>
            <text:p text:style-name="P130"><text:span text:style-name="Variable">p</text:span> &gt; 0</text:p>
          </table:table-cell>
          <table:table-cell table:style-name="Functions.D2" office:value-type="string">
            <text:p text:style-name="P130">Return the value of the inverse probability density function of the gamma distribution <text:s/>where <text:span text:style-name="Variable">ᶲ </text:span><text:s text:c="2"/>is the probability and <text:span text:style-name="Variable">p </text:span>is the shape parameter.</text:p>
          </table:table-cell>
        </table:table-row>
        <table:table-row table:style-name="Functions.6">
          <table:table-cell table:style-name="Functions.A2" office:value-type="string">
            <text:p text:style-name="P130"><text:span text:style-name="Source_5f_Text">GMEAN</text:span></text:p>
          </table:table-cell>
          <table:table-cell table:style-name="Functions.A2" office:value-type="string">
            <text:p text:style-name="P130"><text:span text:style-name="Source_5f_Text">GMEAN(</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Return the geometric mean of the <text:soft-page-break/>arguments. <text:s/>All elements in any arrays specified shall be used. <text:s/>Missing values shall be ignored.</text:p>
          </table:table-cell>
        </table:table-row>
        <table:table-row table:style-name="Functions.6">
          <table:table-cell table:style-name="Functions.A2" office:value-type="string">
            <text:p text:style-name="P130"><text:span text:style-name="Source_5f_Text">GRN</text:span></text:p>
          </table:table-cell>
          <table:table-cell table:style-name="Functions.A2" office:value-type="string">
            <text:p text:style-name="P130"><text:span text:style-name="Source_5f_Text">GRN(</text:span><text:span text:style-name="Variable">p</text:span><text:span text:style-name="Source_5f_Text">)</text:span></text:p>
          </table:table-cell>
          <table:table-cell table:style-name="Functions.A2" office:value-type="string">
            <text:p text:style-name="P130"><text:span text:style-name="Variable">p</text:span> &gt; 0</text:p>
          </table:table-cell>
          <table:table-cell table:style-name="Functions.D2" office:value-type="string">
            <text:p text:style-name="P130">Return a random number in the gamma distribution where <text:span text:style-name="Variable">p</text:span> is the shape parameter.</text:p>
          </table:table-cell>
        </table:table-row>
        <table:table-row table:style-name="Functions.6">
          <table:table-cell table:style-name="Functions.A2" office:value-type="string">
            <text:p text:style-name="P130"><text:span text:style-name="Source_5f_Text">HCS</text:span></text:p>
          </table:table-cell>
          <table:table-cell table:style-name="Functions.A2" office:value-type="string">
            <text:p text:style-name="P130"><text:span text:style-name="Source_5f_Text">HCS(</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HEX</text:span></text:p>
          </table:table-cell>
          <table:table-cell table:style-name="Functions.A2" office:value-type="string">
            <text:p text:style-name="P130"><text:span text:style-name="Source_5f_Text">HEX(</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HEX$</text:span></text:p>
          </table:table-cell>
          <table:table-cell table:style-name="Functions.A2" office:value-type="string">
            <text:p text:style-name="P133"><text:span text:style-name="Source_5f_Text">HEX$(</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55">0 &lt; <text:span text:style-name="Variable">Y </text:span><text:span text:style-name="Variable"><text:span text:style-name="T37">≤</text:span></text:span> 255</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HMEAN</text:span></text:p>
          </table:table-cell>
          <table:table-cell table:style-name="Functions.A2" office:value-type="string">
            <text:p text:style-name="P130"><text:span text:style-name="Source_5f_Text">HMEAN(</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Return the harmonic mean of the arguments. <text:s/>If an array is specified, then all elements shall be used. <text:s/>Missing values shall be ignored.</text:p>
          </table:table-cell>
        </table:table-row>
        <table:table-row table:style-name="Functions.6">
          <table:table-cell table:style-name="Functions.A2" office:value-type="string">
            <text:p text:style-name="P130"><text:span text:style-name="Source_5f_Text">HSN</text:span></text:p>
          </table:table-cell>
          <table:table-cell table:style-name="Functions.A2" office:value-type="string">
            <text:p text:style-name="P133"><text:span text:style-name="Source_5f_Text">HS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HTN</text:span></text:p>
          </table:table-cell>
          <table:table-cell table:style-name="Functions.A2" office:value-type="string">
            <text:p text:style-name="P133"><text:span text:style-name="Source_5f_Text">HT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INDEX</text:span></text:p>
          </table:table-cell>
          <table:table-cell table:style-name="Functions.A2" office:value-type="string">
            <text:p text:style-name="P133"><text:span text:style-name="Source_5f_Text">INDEX(</text:span><text:span text:style-name="Variable">A$</text:span><text:span text:style-name="Source_5f_Text">, </text:span><text:span text:style-name="Variable">B$</text:span><text:span text:style-name="Source_5f_Text">)</text:span></text:p>
          </table:table-cell>
          <table:table-cell table:style-name="Functions.A2" office:value-type="string">
            <text:p text:style-name="P156"/>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INSTR</text:span></text:p>
          </table:table-cell>
          <table:table-cell table:style-name="Functions.A2" office:value-type="string">
            <text:p text:style-name="P133">INSTR(<text:span text:style-name="Variable">X%</text:span>, <text:span text:style-name="Variable">A$</text:span>, <text:span text:style-name="Variable">B$</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INT</text:span></text:p>
          </table:table-cell>
          <table:table-cell table:style-name="Functions.A2" office:value-type="string">
            <text:p text:style-name="P133"><text:span text:style-name="Source_5f_Text">INT(</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text:soft-page-break/>documentation</text:p>
          </table:table-cell>
        </table:table-row>
        <table:table-row table:style-name="Functions.6">
          <table:table-cell table:style-name="Functions.A2" office:value-type="string">
            <text:p text:style-name="P130"><text:span text:style-name="Source_5f_Text">IP</text:span></text:p>
          </table:table-cell>
          <table:table-cell table:style-name="Functions.A2" office:value-type="string">
            <text:p text:style-name="P130"><text:span text:style-name="Source_5f_Text">IP(</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AG</text:span></text:p>
          </table:table-cell>
          <table:table-cell table:style-name="Functions.A2" office:value-type="string">
            <text:p text:style-name="P130"><text:span text:style-name="Source_5f_Text">LAG(</text:span>&lt;<text:span text:style-name="Variable">varname</text:span>&gt; [<text:span text:style-name="Source_5f_Text">,</text:span><text:span text:style-name="Source_20_Text"> </text:span>&lt;<text:span text:style-name="Variable">n</text:span>&gt;]<text:span text:style-name="Source_5f_Text">)</text:span></text:p>
          </table:table-cell>
          <table:table-cell table:style-name="Functions.A2" office:value-type="string">
            <text:p text:style-name="P130"><text:span text:style-name="Variable">n</text:span> &gt; 0</text:p>
          </table:table-cell>
          <table:table-cell table:style-name="Functions.D2" office:value-type="string">
            <text:p text:style-name="P130">Return the <text:span text:style-name="Variable">n</text:span>th prior value of the specified scalar variable, array, or array subset of any type. <text:s/>If <text:span text:style-name="Variable">n</text:span> is unspecified then it will default to 1. <text:s/>If an array or array subset is specified, an array of the same size is returned. <text:s/>If there are fewer than <text:span text:style-name="Variable">n</text:span> prior records, then return a missing value or an array of missing values as the case may require. <text:s/>The value returned will always be of the same type as the specified variable. If a <text:span text:style-name="Source_5f_Text">BY</text:span> statement is in effect then the search shall be restricted to records within the current <text:span text:style-name="Source_5f_Text">BY</text:span> group.</text:p>
          </table:table-cell>
        </table:table-row>
        <table:table-row table:style-name="Functions.6">
          <table:table-cell table:style-name="Functions.A2" office:value-type="string">
            <text:p text:style-name="P130"><text:span text:style-name="Source_5f_Text">LBOUND</text:span></text:p>
          </table:table-cell>
          <table:table-cell table:style-name="Functions.A2" office:value-type="string">
            <text:p text:style-name="P157"><text:span text:style-name="Source_5f_Text">LBOUND(</text:span><text:span text:style-name="Variable">arrayname</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CASE$</text:span></text:p>
          </table:table-cell>
          <table:table-cell table:style-name="Functions.A2" office:value-type="string">
            <text:p text:style-name="P130"><text:span text:style-name="Source_5f_Text">LCASE$(</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CF</text:span></text:p>
          </table:table-cell>
          <table:table-cell table:style-name="Functions.A2" office:value-type="string">
            <text:p text:style-name="P130"><text:span text:style-name="Source_5f_Text">LCF(</text:span><text:span text:style-name="Variable">x</text:span><text:span text:style-name="Source_5f_Text">)</text:span></text:p>
          </table:table-cell>
          <table:table-cell table:style-name="Functions.A2" office:value-type="string">
            <text:p text:style-name="P130">0 ≤ <text:span text:style-name="Variable">x</text:span> ≤ 1</text:p>
          </table:table-cell>
          <table:table-cell table:style-name="Functions.D2" office:value-type="string">
            <text:p text:style-name="P130">Return the value of the cumulative distribution function of the logistic distribution where <text:span text:style-name="Variable">x</text:span> is the evaluation point.</text:p>
          </table:table-cell>
        </table:table-row>
        <text:soft-page-break/>
        <table:table-row table:style-name="Functions.6">
          <table:table-cell table:style-name="Functions.A2" office:value-type="string">
            <text:p text:style-name="P130"><text:span text:style-name="Source_5f_Text">LDF</text:span></text:p>
          </table:table-cell>
          <table:table-cell table:style-name="Functions.A2" office:value-type="string">
            <text:p text:style-name="P130"><text:span text:style-name="Source_5f_Text">LDF(</text:span><text:span text:style-name="Variable">x</text:span><text:span text:style-name="Source_5f_Text">)</text:span></text:p>
          </table:table-cell>
          <table:table-cell table:style-name="Functions.A2" office:value-type="string">
            <text:p text:style-name="P130">0 ≤ <text:span text:style-name="Variable">x</text:span> ≤ 1</text:p>
          </table:table-cell>
          <table:table-cell table:style-name="Functions.D2" office:value-type="string">
            <text:p text:style-name="P130">Return the value of the inverse probability density function function of the logistic distribution where <text:span text:style-name="Variable">x</text:span> is the evaluation point.</text:p>
          </table:table-cell>
        </table:table-row>
        <table:table-row table:style-name="Functions.6">
          <table:table-cell table:style-name="Functions.A2" office:value-type="string">
            <text:p text:style-name="P130"><text:span text:style-name="Source_5f_Text">LIF</text:span></text:p>
          </table:table-cell>
          <table:table-cell table:style-name="Functions.A2" office:value-type="string">
            <text:p text:style-name="P130"><text:span text:style-name="Source_5f_Text">LIF(</text:span><text:span text:style-name="Variable">p</text:span>)</text:p>
          </table:table-cell>
          <table:table-cell table:style-name="Functions.A2" office:value-type="string">
            <text:p text:style-name="P130">0 ≤ <text:span text:style-name="Variable">p</text:span> ≤ 1</text:p>
          </table:table-cell>
          <table:table-cell table:style-name="Functions.D2" office:value-type="string">
            <text:p text:style-name="P130">Return the value of the probability density function function of the logistic distribution where <text:span text:style-name="Variable">p</text:span> is the probability.</text:p>
          </table:table-cell>
        </table:table-row>
        <table:table-row table:style-name="Functions.6">
          <table:table-cell table:style-name="Functions.A2" office:value-type="string">
            <text:p text:style-name="P130"><text:span text:style-name="Source_5f_Text">LEFT$</text:span></text:p>
          </table:table-cell>
          <table:table-cell table:style-name="Functions.A2" office:value-type="string">
            <text:p text:style-name="P130"><text:span text:style-name="Source_5f_Text">LEFT$(</text:span><text:span text:style-name="Variable">A$</text:span><text:span text:style-name="Source_5f_Text">, </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EN</text:span></text:p>
          </table:table-cell>
          <table:table-cell table:style-name="Functions.A2" office:value-type="string">
            <text:p text:style-name="P130"><text:span text:style-name="Source_5f_Text">LEN(</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GT</text:span></text:p>
          </table:table-cell>
          <table:table-cell table:style-name="Functions.A2" office:value-type="string">
            <text:p text:style-name="P130"><text:span text:style-name="Source_5f_Text">LGT(</text:span><text:span text:style-name="Variable">X</text:span><text:span text:style-name="Source_5f_Text">)</text:span></text:p>
          </table:table-cell>
          <table:table-cell table:style-name="Functions.A2" office:value-type="string">
            <text:p text:style-name="P158"><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N</text:span></text:p>
          </table:table-cell>
          <table:table-cell table:style-name="Functions.A2" office:value-type="string">
            <text:p text:style-name="P130"><text:span text:style-name="Source_5f_Text">LN(</text:span><text:span text:style-name="Variable">X</text:span><text:span text:style-name="Source_5f_Text">)</text:span></text:p>
          </table:table-cell>
          <table:table-cell table:style-name="Functions.A2" office:value-type="string">
            <text:p text:style-name="P159"><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OG</text:span></text:p>
          </table:table-cell>
          <table:table-cell table:style-name="Functions.A2" office:value-type="string">
            <text:p text:style-name="P159"><text:span text:style-name="Source_5f_Text">LOG(</text:span><text:span text:style-name="Variable">X</text:span><text:span text:style-name="Source_5f_Text">)</text:span></text:p>
          </table:table-cell>
          <table:table-cell table:style-name="Functions.A2" office:value-type="string">
            <text:p text:style-name="P159"><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OG10</text:span></text:p>
          </table:table-cell>
          <table:table-cell table:style-name="Functions.A2" office:value-type="string">
            <text:p text:style-name="P133"><text:span text:style-name="Source_5f_Text">LOG10(</text:span><text:span text:style-name="Variable">X</text:span><text:span text:style-name="Source_5f_Text">)</text:span></text:p>
          </table:table-cell>
          <table:table-cell table:style-name="Functions.A2" office:value-type="string">
            <text:p text:style-name="P159"><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OG2</text:span></text:p>
          </table:table-cell>
          <table:table-cell table:style-name="Functions.A2" office:value-type="string">
            <text:p text:style-name="P133"><text:span text:style-name="Source_5f_Text">LOG2(</text:span><text:span text:style-name="Variable">X</text:span><text:span text:style-name="Source_5f_Text">)</text:span></text:p>
          </table:table-cell>
          <table:table-cell table:style-name="Functions.A2" office:value-type="string">
            <text:p text:style-name="P159"><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OGE</text:span></text:p>
          </table:table-cell>
          <table:table-cell table:style-name="Functions.A2" office:value-type="string">
            <text:p text:style-name="P133"><text:span text:style-name="Source_5f_Text">LOGE(</text:span><text:span text:style-name="Variable">X</text:span><text:span text:style-name="Source_5f_Text">)</text:span></text:p>
          </table:table-cell>
          <table:table-cell table:style-name="Functions.A2" office:value-type="string">
            <text:p text:style-name="P159"><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OWER$</text:span></text:p>
          </table:table-cell>
          <table:table-cell table:style-name="Functions.A2" office:value-type="string">
            <text:p text:style-name="P133"><text:span text:style-name="Source_5f_Text">LOWER$(</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text:soft-page-break/>documentation.</text:p>
          </table:table-cell>
        </table:table-row>
        <table:table-row table:style-name="Functions.6">
          <table:table-cell table:style-name="Functions.A2" office:value-type="string">
            <text:p text:style-name="P130"><text:span text:style-name="Source_5f_Text">LRN</text:span></text:p>
          </table:table-cell>
          <table:table-cell table:style-name="Functions.A2" office:value-type="string">
            <text:p text:style-name="P130"><text:span text:style-name="Source_5f_Text">LRN</text:span></text:p>
          </table:table-cell>
          <table:table-cell table:style-name="Functions.A2" office:value-type="string">
            <text:p text:style-name="P130"/>
          </table:table-cell>
          <table:table-cell table:style-name="Functions.D2" office:value-type="string">
            <text:p text:style-name="P130">Return a random number in the logistic distribution.</text:p>
          </table:table-cell>
        </table:table-row>
        <table:table-row table:style-name="Functions.6">
          <table:table-cell table:style-name="Functions.A2" office:value-type="string">
            <text:p text:style-name="P130"><text:span text:style-name="Source_5f_Text">LTRIM$</text:span></text:p>
          </table:table-cell>
          <table:table-cell table:style-name="Functions.A2" office:value-type="string">
            <text:p text:style-name="P133"><text:span text:style-name="Source_5f_Text">LTRIM$(A$)</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LTW</text:span></text:p>
          </table:table-cell>
          <table:table-cell table:style-name="Functions.A2" office:value-type="string">
            <text:p text:style-name="P130"><text:span text:style-name="Source_5f_Text">LTW(</text:span><text:span text:style-name="Variable">X</text:span><text:span text:style-name="Source_5f_Text">)</text:span></text:p>
          </table:table-cell>
          <table:table-cell table:style-name="Functions.A2" office:value-type="string">
            <text:p text:style-name="P160"><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ATCH</text:span></text:p>
          </table:table-cell>
          <table:table-cell table:style-name="Functions.A2" office:value-type="string">
            <text:p text:style-name="P133"><text:span text:style-name="Source_5f_Text">MATCH(</text:span><text:span text:style-name="Variable">A$</text:span><text:span text:style-name="Source_5f_Text">, </text:span><text:span text:style-name="Variable">B$</text:span><text:span text:style-name="Source_5f_Text">, </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AX</text:span></text:p>
          </table:table-cell>
          <table:table-cell table:style-name="Functions.A2" office:value-type="string">
            <text:p text:style-name="P130"><text:span text:style-name="Source_5f_Text">MAX(</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 except that any number of arguments shall be permitted and that all elements in any array arguments shall be compared.</text:p>
          </table:table-cell>
        </table:table-row>
        <table:table-row table:style-name="Functions.6">
          <table:table-cell table:style-name="Functions.A2" office:value-type="string">
            <text:p text:style-name="P130"><text:span text:style-name="Source_5f_Text">MAXINT</text:span></text:p>
          </table:table-cell>
          <table:table-cell table:style-name="Functions.A2" office:value-type="string">
            <text:p text:style-name="P130"/>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AXLEN</text:span></text:p>
          </table:table-cell>
          <table:table-cell table:style-name="Functions.A2" office:value-type="string">
            <text:p text:style-name="P133"><text:span text:style-name="Source_5f_Text">MAXLEN(</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AXLVL</text:span></text:p>
          </table:table-cell>
          <table:table-cell table:style-name="Functions.A2" office:value-type="string">
            <text:p text:style-name="P130"/>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AXNUM</text:span></text:p>
          </table:table-cell>
          <table:table-cell table:style-name="Functions.A2" office:value-type="string">
            <text:p text:style-name="P130"/>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EAN</text:span></text:p>
          </table:table-cell>
          <table:table-cell table:style-name="Functions.A2" office:value-type="string">
            <text:p text:style-name="P130"><text:span text:style-name="Source_5f_Text">MEAN(</text:span><text:span text:style-name="Variable">v1</text:span><text:span text:style-name="Source_5f_Text">, [</text:span><text:span text:style-name="Variable">v2</text:span><text:span text:style-name="Source_5f_Text">, ...])</text:span></text:p>
          </table:table-cell>
          <table:table-cell table:style-name="Functions.A2" office:value-type="string">
            <text:p text:style-name="P130"/>
          </table:table-cell>
          <table:table-cell table:style-name="Functions.D2" office:value-type="string">
            <text:p text:style-name="P130">Return the arithmetic mean of the arguments. <text:s/>If an array is referenced, then all elements are included. <text:s/>Missing <text:soft-page-break/>values shall be ignored.</text:p>
          </table:table-cell>
        </table:table-row>
        <table:table-row table:style-name="Functions.6">
          <table:table-cell table:style-name="Functions.A2" office:value-type="string">
            <text:p text:style-name="P130"><text:span text:style-name="Source_5f_Text">MEDIAN</text:span></text:p>
          </table:table-cell>
          <table:table-cell table:style-name="Functions.A2" office:value-type="string">
            <text:p text:style-name="P130"><text:span text:style-name="Source_5f_Text">MEDIAN(</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Return the median value of the arguments. <text:s/>If an array is referenced, then all elements shall be included. <text:s/>Missing values shall be ignored.</text:p>
          </table:table-cell>
        </table:table-row>
        <table:table-row table:style-name="Functions.6">
          <table:table-cell table:style-name="Functions.A2" office:value-type="string">
            <text:p text:style-name="P130"><text:span text:style-name="Source_5f_Text">MID$</text:span></text:p>
          </table:table-cell>
          <table:table-cell table:style-name="Functions.A2" office:value-type="string">
            <text:p text:style-name="P130"><text:span text:style-name="Source_5f_Text">MID$(</text:span><text:span text:style-name="Variable">A$</text:span><text:span text:style-name="Source_5f_Text">, </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IN</text:span></text:p>
          </table:table-cell>
          <table:table-cell table:style-name="Functions.A2" office:value-type="string">
            <text:p text:style-name="P130"><text:span text:style-name="Source_5f_Text">MI</text:span><text:span text:style-name="Source_5f_Text"><text:span text:style-name="T38">N</text:span></text:span><text:span text:style-name="Source_5f_Text">(</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 except that any number of arguments shall be permitted and that all elements in any array arguments shall be compared.</text:p>
          </table:table-cell>
        </table:table-row>
        <table:table-row table:style-name="Functions.6">
          <table:table-cell table:style-name="Functions.A2" office:value-type="string">
            <text:p text:style-name="P130"><text:span text:style-name="Source_5f_Text">MININT</text:span></text:p>
          </table:table-cell>
          <table:table-cell table:style-name="Functions.A2" office:value-type="string">
            <text:p text:style-name="P133"/>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INNUM</text:span></text:p>
          </table:table-cell>
          <table:table-cell table:style-name="Functions.A2" office:value-type="string">
            <text:p text:style-name="P130"/>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MISSING</text:span></text:p>
          </table:table-cell>
          <table:table-cell table:style-name="Functions.A2" office:value-type="string">
            <text:p text:style-name="P130"><text:span text:style-name="Source_5f_Text">MISSING(</text:span>&lt;<text:span text:style-name="Variable">varname</text:span>&gt;<text:span text:style-name="Source_5f_Text">)</text:span></text:p>
          </table:table-cell>
          <table:table-cell table:style-name="Functions.A2" office:value-type="string">
            <text:p text:style-name="P130"/>
          </table:table-cell>
          <table:table-cell table:style-name="Functions.D2" office:value-type="string">
            <text:p text:style-name="P130">Return true if the referenced variable (character or numeric) is missing. <text:s/>If an array is referenced, then return true if any of the elements is missing. <text:s/>Otherwise return false.</text:p>
          </table:table-cell>
        </table:table-row>
        <table:table-row table:style-name="Functions.6">
          <table:table-cell table:style-name="Functions.A2" office:value-type="string">
            <text:p text:style-name="P130"><text:span text:style-name="Source_5f_Text">MOD</text:span></text:p>
          </table:table-cell>
          <table:table-cell table:style-name="Functions.A2" office:value-type="string">
            <text:p text:style-name="P161"><text:span text:style-name="Source_5f_Text">MOD(</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62"><text:span text:style-name="Variable">Y%</text:span> <text:span text:style-name="T39">≠</text:span><text:span text:style-name="T40"> 0</text:span></text:p>
          </table:table-cell>
          <table:table-cell table:style-name="Functions.D2" office:value-type="string">
            <text:p text:style-name="P130">As specified in the BW BASIC documentation.</text:p>
          </table:table-cell>
        </table:table-row>
        <text:soft-page-break/>
        <table:table-row table:style-name="Functions.6">
          <table:table-cell table:style-name="Functions.A2" office:value-type="string">
            <text:p text:style-name="P130"><text:span text:style-name="Source_5f_Text">NCF</text:span></text:p>
          </table:table-cell>
          <table:table-cell table:style-name="Functions.A2" office:value-type="string">
            <text:p text:style-name="P130"><text:span text:style-name="Source_5f_Text">NCF(</text:span><text:span text:style-name="Variable">x</text:span><text:span text:style-name="Source_5f_Text">,</text:span><text:span text:style-name="Variable">n</text:span><text:span text:style-name="Source_5f_Text">,</text:span><text:span text:style-name="Variable">p</text:span>)</text:p>
          </table:table-cell>
          <table:table-cell table:style-name="Functions.A2" office:value-type="string">
            <text:p text:style-name="P130">0 ≤ <text:span text:style-name="Variable">x ≤ 1</text:span></text:p>
            <text:p text:style-name="P130"><text:span text:style-name="Variable">n &gt; 0</text:span></text:p>
            <text:p text:style-name="P130"><text:span text:style-name="Variable">0 &lt; <text:s text:c="2"/>p &lt; 1</text:span></text:p>
          </table:table-cell>
          <table:table-cell table:style-name="Functions.D2" office:value-type="string">
            <text:p text:style-name="P130">Return the value of the cumulative distribution function for the binomial distribution where <text:span text:style-name="Variable">x</text:span> is the evaluation point, <text:span text:style-name="Variable">n</text:span> is the number of trials, and <text:span text:style-name="Variable">p</text:span> is the probability of success in each trial.</text:p>
          </table:table-cell>
        </table:table-row>
        <table:table-row table:style-name="Functions.6">
          <table:table-cell table:style-name="Functions.A2" office:value-type="string">
            <text:p text:style-name="P130"><text:span text:style-name="Source_5f_Text">NDF</text:span></text:p>
          </table:table-cell>
          <table:table-cell table:style-name="Functions.A2" office:value-type="string">
            <text:p text:style-name="P130"><text:span text:style-name="Source_5f_Text">NDF(</text:span><text:span text:style-name="Variable">x</text:span><text:span text:style-name="Source_5f_Text">,</text:span><text:span text:style-name="Variable">n</text:span><text:span text:style-name="Source_5f_Text">,</text:span><text:span text:style-name="Variable">p</text:span><text:span text:style-name="Source_5f_Text">)</text:span></text:p>
          </table:table-cell>
          <table:table-cell table:style-name="Functions.A2" office:value-type="string">
            <text:p text:style-name="P130">0 ≤ <text:span text:style-name="Variable">x ≤ 1</text:span></text:p>
            <text:p text:style-name="P130"><text:span text:style-name="Variable">n &gt; 0</text:span></text:p>
            <text:p text:style-name="P130"><text:span text:style-name="Variable">0 &lt; <text:s text:c="2"/>p &lt; 1</text:span></text:p>
          </table:table-cell>
          <table:table-cell table:style-name="Functions.D2" office:value-type="string">
            <text:p text:style-name="P130">Return the value of the probability density function for the binomial distribution where <text:span text:style-name="Variable">x</text:span> is the evaluation point, <text:span text:style-name="Variable">n</text:span> is the number of trials, and <text:span text:style-name="Variable">p</text:span> is the probability of success in each trial.</text:p>
          </table:table-cell>
        </table:table-row>
        <table:table-row table:style-name="Functions.6">
          <table:table-cell table:style-name="Functions.A2" office:value-type="string">
            <text:p text:style-name="P130"><text:span text:style-name="Source_5f_Text">NEXT</text:span></text:p>
          </table:table-cell>
          <table:table-cell table:style-name="Functions.A2" office:value-type="string">
            <text:p text:style-name="P130"><text:span text:style-name="Source_5f_Text">NEXT(</text:span>&lt;<text:span text:style-name="Variable">varname</text:span>&gt; [<text:span text:style-name="Source_5f_Text">,</text:span><text:span text:style-name="Source_20_Text"> </text:span>&lt;<text:span text:style-name="Variable">n&gt;</text:span>]<text:span text:style-name="Source_5f_Text">)</text:span></text:p>
          </table:table-cell>
          <table:table-cell table:style-name="Functions.A2" office:value-type="string">
            <text:p text:style-name="P130"><text:span text:style-name="Variable">n &gt; 0</text:span></text:p>
          </table:table-cell>
          <table:table-cell table:style-name="Functions.D2" office:value-type="string">
            <text:p text:style-name="P130">Return the <text:span text:style-name="Variable">n</text:span>th succeeding value of the specified scalar variable, array, or array subset of any type. <text:s/>If <text:span text:style-name="Variable">n</text:span> is unspecified then it shall default to 1. <text:s/>If an array or array subset is specified, an array of the same size is returned. <text:s/>If there are fewer than <text:span text:style-name="Variable">n</text:span> succeeding records, then return a missing value or an array of missing values as the case may require. <text:s/>The value returned shall always be of the same type as the specified variable. If a <text:span text:style-name="Source_20_Text">BY</text:span> statement is in <text:soft-page-break/>effect then the search shall be restricted to records within the current <text:span text:style-name="Source_20_Text">BY</text:span> group.</text:p>
          </table:table-cell>
        </table:table-row>
        <table:table-row table:style-name="Functions.6">
          <table:table-cell table:style-name="Functions.A2" office:value-type="string">
            <text:p text:style-name="P130"><text:span text:style-name="Source_5f_Text">NMISS</text:span></text:p>
          </table:table-cell>
          <table:table-cell table:style-name="Functions.A2" office:value-type="string">
            <text:p text:style-name="P130"><text:span text:style-name="Source_5f_Text">NMISS(</text:span>&lt;<text:span text:style-name="Variable">varname</text:span>&gt;...<text:span text:style-name="Source_5f_Text">)</text:span></text:p>
          </table:table-cell>
          <table:table-cell table:style-name="Functions.A2" office:value-type="string">
            <text:p text:style-name="P130"/>
          </table:table-cell>
          <table:table-cell table:style-name="Functions.D2" office:value-type="string">
            <text:p text:style-name="P130">Return the number of missing values in the arguments. <text:s/>For array arguments, all missing elements shall be counted.</text:p>
          </table:table-cell>
        </table:table-row>
        <table:table-row table:style-name="Functions.6">
          <table:table-cell table:style-name="Functions.A2" office:value-type="string">
            <text:p text:style-name="P130"><text:span text:style-name="Source_5f_Text">NRN</text:span></text:p>
          </table:table-cell>
          <table:table-cell table:style-name="Functions.A2" office:value-type="string">
            <text:p text:style-name="P130"><text:span text:style-name="Source_5f_Text">NRN(</text:span><text:span text:style-name="Variable">n</text:span><text:span text:style-name="Source_5f_Text">, </text:span><text:span text:style-name="Variable">p</text:span><text:span text:style-name="Source_5f_Text">)</text:span></text:p>
          </table:table-cell>
          <table:table-cell table:style-name="Functions.A2" office:value-type="string">
            <text:p text:style-name="P130"><text:span text:style-name="Variable">n &gt; 0</text:span></text:p>
            <text:p text:style-name="P130"><text:span text:style-name="Variable">0 &lt; <text:s text:c="2"/>p &lt; 1</text:span></text:p>
          </table:table-cell>
          <table:table-cell table:style-name="Functions.D2" office:value-type="string">
            <text:p text:style-name="P130">Return a random number in the binomial distribution where <text:span text:style-name="Variable">n</text:span> is the number of trials and <text:span text:style-name="Variable">p</text:span> is the probability of success in each trial.</text:p>
          </table:table-cell>
        </table:table-row>
        <table:table-row table:style-name="Functions.6">
          <table:table-cell table:style-name="Functions.A2" office:value-type="string">
            <text:p text:style-name="P130"><text:span text:style-name="Source_5f_Text">NUM</text:span></text:p>
          </table:table-cell>
          <table:table-cell table:style-name="Functions.A2" office:value-type="string">
            <text:p text:style-name="P130"><text:span text:style-name="Source_5f_Text">NUM(</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 except that any number of arguments shall be accepted. <text:s/>If there is a single scalar argument, then a single value will be returned, otherwise an array containing one element per scalar argument or array argument element. <text:s/>Any individual array elements shall be treated as scalars. <text:s/>Only character arguments allowed.</text:p>
          </table:table-cell>
        </table:table-row>
        <table:table-row table:style-name="Functions.6">
          <table:table-cell table:style-name="Functions.A2" office:value-type="string">
            <text:p text:style-name="P130"><text:span text:style-name="Source_5f_Text">NUM$</text:span></text:p>
          </table:table-cell>
          <table:table-cell table:style-name="Functions.A2" office:value-type="string">
            <text:p text:style-name="P163"><text:span text:style-name="Source_5f_Text">NUM</text:span><text:span text:style-name="Source_5f_Text"><text:span text:style-name="T41">$</text:span></text:span><text:span text:style-name="Source_5f_Text">(</text:span>&lt;<text:span text:style-name="Variable">value</text:span>&gt;...<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 except that any number of arguments shall be accepted and <text:soft-page-break/>shall be processed as by <text:span text:style-name="Source_20_Text">NUM</text:span>. <text:s/>Only numeric arguments shall be permitted.</text:p>
          </table:table-cell>
        </table:table-row>
        <table:table-row table:style-name="Functions.6">
          <table:table-cell table:style-name="Functions.A2" office:value-type="string">
            <text:p text:style-name="P130"><text:span text:style-name="Source_5f_Text">OCT$</text:span></text:p>
          </table:table-cell>
          <table:table-cell table:style-name="Functions.A2" office:value-type="string">
            <text:p text:style-name="P133"><text:span text:style-name="Source_5f_Text">OCT$(X, </text:span><text:span text:style-name="Variable">Y%</text:span><text:span text:style-name="Source_5f_Text"> )</text:span></text:p>
          </table:table-cell>
          <table:table-cell table:style-name="Functions.A2" office:value-type="string">
            <text:p text:style-name="P164">0 &lt; <text:span text:style-name="Variable">Y%</text:span> <text:span text:style-name="T42">≤</text:span> 255</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ORD</text:span></text:p>
          </table:table-cell>
          <table:table-cell table:style-name="Functions.A2" office:value-type="string">
            <text:p text:style-name="P130"><text:span text:style-name="Source_5f_Text">ORD(</text:span><text:span text:style-name="Variable">A$</text:span><text:span text:style-name="Source_5f_Text">)</text:span></text:p>
          </table:table-cell>
          <table:table-cell table:style-name="Functions.A2" office:value-type="string">
            <text:p text:style-name="P164"><text:span text:style-name="Source_5f_Text">LEN(</text:span><text:span text:style-name="Variable">A$</text:span><text:span text:style-name="Source_5f_Text">)</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PCF</text:span></text:p>
          </table:table-cell>
          <table:table-cell table:style-name="Functions.A2" office:value-type="string">
            <text:p text:style-name="P130"><text:span text:style-name="Source_5f_Text">PCF(</text:span><text:span text:style-name="Variable">x</text:span><text:span text:style-name="Source_5f_Text">, </text:span><text:span text:style-name="Variable">p</text:span><text:span text:style-name="Source_5f_Text">)</text:span></text:p>
          </table:table-cell>
          <table:table-cell table:style-name="Functions.A2" office:value-type="string">
            <text:p text:style-name="P130">0 ≤ <text:span text:style-name="Variable">x</text:span> ≤ 1</text:p>
            <text:p text:style-name="P130">0 ≤ <text:span text:style-name="Variable">p</text:span> ≤ 1</text:p>
          </table:table-cell>
          <table:table-cell table:style-name="Functions.D2" office:value-type="string">
            <text:p text:style-name="P130">Return the value of the cumulative distribution function of the Poisson distribution where <text:span text:style-name="Variable">x</text:span> is the evaluation point and <text:span text:style-name="Variable">p</text:span> is the Poisson parameter.</text:p>
          </table:table-cell>
        </table:table-row>
        <table:table-row table:style-name="Functions.6">
          <table:table-cell table:style-name="Functions.A2" office:value-type="string">
            <text:p text:style-name="P130"><text:span text:style-name="Source_5f_Text">PDF</text:span></text:p>
          </table:table-cell>
          <table:table-cell table:style-name="Functions.A2" office:value-type="string">
            <text:p text:style-name="P130"><text:span text:style-name="Source_5f_Text">PDF(</text:span>x<text:span text:style-name="Source_5f_Text">, </text:span><text:span text:style-name="Variable">p</text:span><text:span text:style-name="Source_5f_Text">)</text:span></text:p>
          </table:table-cell>
          <table:table-cell table:style-name="Functions.A2" office:value-type="string">
            <text:p text:style-name="P130">0 ≤ <text:span text:style-name="Variable">x</text:span> ≤ 1</text:p>
            <text:p text:style-name="P130">0 ≤ <text:span text:style-name="Variable">p</text:span> ≤ 1</text:p>
          </table:table-cell>
          <table:table-cell table:style-name="Functions.D2" office:value-type="string">
            <text:p text:style-name="P130">Return the value of the probability <text:span text:style-name="T43">mass</text:span> function of the Poisson distribution where <text:span text:style-name="Variable">x</text:span> is the evaluation point and <text:span text:style-name="Variable">p</text:span> is the Poisson parameter.</text:p>
          </table:table-cell>
        </table:table-row>
        <table:table-row table:style-name="Functions.6">
          <table:table-cell table:style-name="Functions.A2" office:value-type="string">
            <text:p text:style-name="P130"><text:span text:style-name="Source_5f_Text">PI</text:span></text:p>
          </table:table-cell>
          <table:table-cell table:style-name="Functions.A2" office:value-type="string">
            <text:p text:style-name="P130"/>
          </table:table-cell>
          <table:table-cell table:style-name="Functions.A2" office:value-type="string">
            <text:p text:style-name="P130"/>
          </table:table-cell>
          <table:table-cell table:style-name="Functions.D2" office:value-type="string">
            <text:p text:style-name="P130">As specified in the BW BASIC documentation, except that pi shall be returned as precisely as the word size will permit.</text:p>
          </table:table-cell>
        </table:table-row>
        <table:table-row table:style-name="Functions.6">
          <table:table-cell table:style-name="Functions.A2" office:value-type="string">
            <text:p text:style-name="P130"><text:span text:style-name="Source_5f_Text">PIF</text:span></text:p>
          </table:table-cell>
          <table:table-cell table:style-name="Functions.A2" office:value-type="string">
            <text:p text:style-name="P130"><text:span text:style-name="Source_5f_Text">PIF(</text:span><text:span text:style-name="Variable">ᶲ</text:span><text:span text:style-name="Source_5f_Text">, </text:span><text:span text:style-name="Variable">p</text:span><text:span text:style-name="Source_5f_Text">)</text:span></text:p>
          </table:table-cell>
          <table:table-cell table:style-name="Functions.A2" office:value-type="string">
            <text:p text:style-name="P130">0 ≤ <text:span text:style-name="Variable">ᶲ</text:span> ≤ 1</text:p>
            <text:p text:style-name="P130">0 ≤ <text:span text:style-name="Variable">p</text:span> ≤ 1</text:p>
          </table:table-cell>
          <table:table-cell table:style-name="Functions.D2" office:value-type="string">
            <text:p text:style-name="P130">Return the value of the inverse probability <text:span text:style-name="T44">mass</text:span> function of the Poisson distribution where <text:span text:style-name="Variable">ᶲ</text:span> is the probability and <text:span text:style-name="Variable">p</text:span> is the Poisson <text:soft-page-break/>parameter.</text:p>
          </table:table-cell>
        </table:table-row>
        <table:table-row table:style-name="Functions.6">
          <table:table-cell table:style-name="Functions.A2" office:value-type="string">
            <text:p text:style-name="P130"><text:span text:style-name="Source_5f_Text">POS</text:span></text:p>
          </table:table-cell>
          <table:table-cell table:style-name="Functions.A2" office:value-type="string">
            <text:p text:style-name="P130"><text:span text:style-name="Source_5f_Text">POS(</text:span><text:span text:style-name="Variable">A$</text:span><text:span text:style-name="Source_5f_Text">, </text:span><text:span text:style-name="Variable">B$</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POS</text:span></text:p>
          </table:table-cell>
          <table:table-cell table:style-name="Functions.A2" office:value-type="string">
            <text:p text:style-name="P130"><text:span text:style-name="Source_5f_Text">POS(</text:span><text:span text:style-name="Variable">A$</text:span><text:span text:style-name="Source_5f_Text">, </text:span><text:span text:style-name="Variable">B$</text:span><text:span text:style-name="Source_5f_Text">, </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PRN</text:span></text:p>
          </table:table-cell>
          <table:table-cell table:style-name="Functions.A2" office:value-type="string">
            <text:p text:style-name="P130"><text:span text:style-name="Source_5f_Text">PRN(</text:span><text:span text:style-name="Variable">p</text:span><text:span text:style-name="Source_5f_Text">)</text:span></text:p>
          </table:table-cell>
          <table:table-cell table:style-name="Functions.A2" office:value-type="string">
            <text:p text:style-name="P130"/>
          </table:table-cell>
          <table:table-cell table:style-name="Functions.D2" office:value-type="string">
            <text:p text:style-name="P130">Return a random number in the Poisson distribution where <text:span text:style-name="Variable">p</text:span> is the Poisson parameter.</text:p>
          </table:table-cell>
        </table:table-row>
        <table:table-row table:style-name="Functions.6">
          <table:table-cell table:style-name="Functions.A2" office:value-type="string">
            <text:p text:style-name="P130"><text:span text:style-name="Source_5f_Text">RAD</text:span>/<text:span text:style-name="Source_5f_Text">RADIAN</text:span></text:p>
          </table:table-cell>
          <table:table-cell table:style-name="Functions.A2" office:value-type="string">
            <text:p text:style-name="P133"><text:span text:style-name="Source_5f_Text">RAD(</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RIGHT$</text:span></text:p>
          </table:table-cell>
          <table:table-cell table:style-name="Functions.A2" office:value-type="string">
            <text:p text:style-name="P133"><text:span text:style-name="Source_5f_Text">RIGHT$(</text:span><text:span text:style-name="Variable">A$</text:span><text:span text:style-name="Source_5f_Text">, </text:span><text:span text:style-name="Variable">X%</text:span><text:span text:style-name="Source_5f_Text">)</text:span></text:p>
          </table:table-cell>
          <table:table-cell table:style-name="Functions.A2" office:value-type="string">
            <text:p text:style-name="P165"><text:span text:style-name="Variable">X%</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ROUND</text:span></text:p>
          </table:table-cell>
          <table:table-cell table:style-name="Functions.A2" office:value-type="string">
            <text:p text:style-name="P133"><text:span text:style-name="Source_5f_Text">ROUND(</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65">Y% <text:span text:style-name="T39">≥</text:span><text:span text:style-name="T40"> 0</text:span></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RTRIM$</text:span></text:p>
          </table:table-cell>
          <table:table-cell table:style-name="Functions.A2" office:value-type="string">
            <text:p text:style-name="P133"><text:span text:style-name="Source_5f_Text">RTRIM$(</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EC</text:span></text:p>
          </table:table-cell>
          <table:table-cell table:style-name="Functions.A2" office:value-type="string">
            <text:p text:style-name="P133"><text:span text:style-name="Source_5f_Text">RTRIM$(</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EG$</text:span></text:p>
          </table:table-cell>
          <table:table-cell table:style-name="Functions.A2" office:value-type="string">
            <text:p text:style-name="P133"><text:span text:style-name="Source_5f_Text">SEG$(</text:span><text:span text:style-name="Variable">A$</text:span><text:span text:style-name="Source_5f_Text">, </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66"><text:span text:style-name="Variable">X%</text:span> <text:span text:style-name="T39">≥</text:span><text:span text:style-name="T40"> 0</text:span></text:p>
            <text:p text:style-name="P167"><text:span text:style-name="Variable">Y%</text:span> &gt; 0</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GN</text:span></text:p>
          </table:table-cell>
          <table:table-cell table:style-name="Functions.A2" office:value-type="string">
            <text:p text:style-name="P130"><text:span text:style-name="Source_5f_Text">SG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HELL</text:span></text:p>
          </table:table-cell>
          <table:table-cell table:style-name="Functions.A2" office:value-type="string">
            <text:p text:style-name="P133"><text:span text:style-name="Source_5f_Text">SHELL(</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IN</text:span></text:p>
          </table:table-cell>
          <table:table-cell table:style-name="Functions.A2" office:value-type="string">
            <text:p text:style-name="P133"><text:span text:style-name="Source_5f_Text">SI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ext:soft-page-break/>
        <table:table-row table:style-name="Functions.6">
          <table:table-cell table:style-name="Functions.A2" office:value-type="string">
            <text:p text:style-name="P130"><text:span text:style-name="Source_5f_Text">SIND</text:span></text:p>
          </table:table-cell>
          <table:table-cell table:style-name="Functions.A2" office:value-type="string">
            <text:p text:style-name="P133"><text:span text:style-name="Source_5f_Text">SIND(</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INH</text:span></text:p>
          </table:table-cell>
          <table:table-cell table:style-name="Functions.A2" office:value-type="string">
            <text:p text:style-name="P133"><text:span text:style-name="Source_5f_Text">SINH(</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108">
          <table:table-cell table:style-name="Functions.A2" office:value-type="string">
            <text:p text:style-name="P130"><text:span text:style-name="Source_5f_Text">SQR</text:span></text:p>
          </table:table-cell>
          <table:table-cell table:style-name="Functions.A2" office:value-type="string">
            <text:p text:style-name="P133"><text:span text:style-name="Source_5f_Text">SQR(</text:span><text:span text:style-name="Variable">X</text:span><text:span text:style-name="Source_5f_Text">)</text:span></text:p>
          </table:table-cell>
          <table:table-cell table:style-name="Functions.A2" office:value-type="string">
            <text:p text:style-name="P168">X <text:span text:style-name="T39">≥</text:span><text:span text:style-name="T40"> 0</text:span></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STD</text:span></text:p>
          </table:table-cell>
          <table:table-cell table:style-name="Functions.A2" office:value-type="string">
            <text:p text:style-name="P130"><text:span text:style-name="Source_5f_Text">STD(</text:span><text:span text:style-name="Variable">v1</text:span><text:span text:style-name="Source_5f_Text">, [</text:span><text:span text:style-name="Variable">v2</text:span><text:span text:style-name="Source_5f_Text">, ...])</text:span></text:p>
          </table:table-cell>
          <table:table-cell table:style-name="Functions.A2" office:value-type="string">
            <text:p text:style-name="P130"/>
          </table:table-cell>
          <table:table-cell table:style-name="Functions.D2" office:value-type="string">
            <text:p text:style-name="P130">Return the standard deviation of the arguments, each element of any array arguments being treated as a single argument. <text:s/>Missing values shall be ignored.</text:p>
          </table:table-cell>
        </table:table-row>
        <table:table-row table:style-name="Functions.6">
          <table:table-cell table:style-name="Functions.A2" office:value-type="string">
            <text:p text:style-name="P130"><text:span text:style-name="Source_5f_Text">SUM</text:span></text:p>
          </table:table-cell>
          <table:table-cell table:style-name="Functions.A2" office:value-type="string">
            <text:p text:style-name="P130"><text:span text:style-name="Source_5f_Text">SUM(</text:span><text:span text:style-name="Variable">v1</text:span><text:span text:style-name="Source_5f_Text">, [</text:span><text:span text:style-name="Variable">v2</text:span><text:span text:style-name="Source_5f_Text">, ...])</text:span></text:p>
          </table:table-cell>
          <table:table-cell table:style-name="Functions.A2" office:value-type="string">
            <text:p text:style-name="P130"/>
          </table:table-cell>
          <table:table-cell table:style-name="Functions.D2" office:value-type="string">
            <text:p text:style-name="P130">Row-wise sum. Arrays passed as arguments are expanded.</text:p>
          </table:table-cell>
        </table:table-row>
        <table:table-row table:style-name="Functions.6">
          <table:table-cell table:style-name="Functions.A2" office:value-type="string">
            <text:p text:style-name="P130"><text:span text:style-name="Source_5f_Text">TAN</text:span></text:p>
          </table:table-cell>
          <table:table-cell table:style-name="Functions.A2" office:value-type="string">
            <text:p text:style-name="P133"><text:span text:style-name="Source_5f_Text">TAN(</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TAND</text:span></text:p>
          </table:table-cell>
          <table:table-cell table:style-name="Functions.A2" office:value-type="string">
            <text:p text:style-name="P133"><text:span text:style-name="Source_5f_Text">TAND(</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TANH</text:span></text:p>
          </table:table-cell>
          <table:table-cell table:style-name="Functions.A2" office:value-type="string">
            <text:p text:style-name="P169"><text:span text:style-name="Source_5f_Text">TANH(</text:span><text:span text:style-name="Variable">X</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TCF</text:span></text:p>
          </table:table-cell>
          <table:table-cell table:style-name="Functions.A2" office:value-type="string">
            <text:p text:style-name="P130"><text:span text:style-name="Source_5f_Text">TCF(</text:span><text:span text:style-name="Variable">t</text:span><text:span text:style-name="Source_5f_Text">, </text:span><text:span text:style-name="Variable">df</text:span><text:span text:style-name="Source_5f_Text">)</text:span></text:p>
          </table:table-cell>
          <table:table-cell table:style-name="Functions.A2" office:value-type="string">
            <text:p text:style-name="P130">0 ≤ <text:s/><text:span text:style-name="Variable">t </text:span>≤ 1</text:p>
            <text:p text:style-name="P130"><text:span text:style-name="Variable">df </text:span>&gt; 0</text:p>
          </table:table-cell>
          <table:table-cell table:style-name="Functions.D2" office:value-type="string">
            <text:p text:style-name="P130">Return the value of the cumulative distribution function of the T distribution where <text:span text:style-name="Variable">t </text:span>is the evaluation point and <text:span text:style-name="Variable">df </text:span>is the number of degrees of freedom.</text:p>
          </table:table-cell>
        </table:table-row>
        <table:table-row table:style-name="Functions.6">
          <table:table-cell table:style-name="Functions.A2" office:value-type="string">
            <text:p text:style-name="P130"><text:span text:style-name="Source_5f_Text">TDF</text:span></text:p>
          </table:table-cell>
          <table:table-cell table:style-name="Functions.A2" office:value-type="string">
            <text:p text:style-name="P130"><text:span text:style-name="Source_5f_Text">TDF(</text:span><text:span text:style-name="Variable">t</text:span><text:span text:style-name="Source_5f_Text">, </text:span><text:span text:style-name="Variable">df</text:span><text:span text:style-name="Source_5f_Text">)</text:span></text:p>
          </table:table-cell>
          <table:table-cell table:style-name="Functions.A2" office:value-type="string">
            <text:p text:style-name="P130">0 ≤ <text:s/><text:span text:style-name="Variable">t </text:span>≤ 1</text:p>
            <text:p text:style-name="P130"><text:soft-page-break/><text:span text:style-name="Variable">df </text:span>&gt; 0</text:p>
          </table:table-cell>
          <table:table-cell table:style-name="Functions.D2" office:value-type="string">
            <text:p text:style-name="P130">Return the value of <text:soft-page-break/>the probability density function of the T distribution where <text:span text:style-name="Variable">t </text:span>is the evaluation point and <text:span text:style-name="Variable">df </text:span>is the number of degrees of freedom.</text:p>
          </table:table-cell>
        </table:table-row>
        <table:table-row table:style-name="Functions.6">
          <table:table-cell table:style-name="Functions.A2" office:value-type="string">
            <text:p text:style-name="P130"><text:span text:style-name="Source_5f_Text">TIF</text:span></text:p>
          </table:table-cell>
          <table:table-cell table:style-name="Functions.A2" office:value-type="string">
            <text:p text:style-name="P130"><text:span text:style-name="Source_5f_Text">TIF(</text:span><text:span text:style-name="Variable">ᶲ</text:span><text:span text:style-name="Source_5f_Text">, </text:span><text:span text:style-name="Variable">df</text:span><text:span text:style-name="Source_5f_Text">)</text:span></text:p>
          </table:table-cell>
          <table:table-cell table:style-name="Functions.A2" office:value-type="string">
            <text:p text:style-name="P130">0 ≤ <text:s/><text:span text:style-name="Variable">ᶲ </text:span>≤ 1</text:p>
            <text:p text:style-name="P130"><text:span text:style-name="Variable">df </text:span>&gt; 0</text:p>
          </table:table-cell>
          <table:table-cell table:style-name="Functions.D2" office:value-type="string">
            <text:p text:style-name="P130">Return the value of the inverse probability density function of the T distribution where <text:span text:style-name="Variable">ᶲ </text:span><text:s text:c="2"/>is the probability and <text:span text:style-name="Variable">df </text:span>is the number of degrees of freedom.</text:p>
          </table:table-cell>
        </table:table-row>
        <table:table-row table:style-name="Functions.6">
          <table:table-cell table:style-name="Functions.A2" office:value-type="string">
            <text:p text:style-name="P130"><text:span text:style-name="Source_5f_Text">TIMER</text:span></text:p>
          </table:table-cell>
          <table:table-cell table:style-name="Functions.A2" office:value-type="string">
            <text:p text:style-name="P170">No arguments</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TRIM$</text:span></text:p>
          </table:table-cell>
          <table:table-cell table:style-name="Functions.A2" office:value-type="string">
            <text:p text:style-name="P133"><text:span text:style-name="Source_5f_Text">TRIM$(</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TRN</text:span></text:p>
          </table:table-cell>
          <table:table-cell table:style-name="Functions.A2" office:value-type="string">
            <text:p text:style-name="P130"><text:span text:style-name="Source_5f_Text">TRN(</text:span><text:span text:style-name="Variable">df</text:span><text:span text:style-name="Source_5f_Text">)</text:span></text:p>
          </table:table-cell>
          <table:table-cell table:style-name="Functions.A2" office:value-type="string">
            <text:p text:style-name="P130"/>
          </table:table-cell>
          <table:table-cell table:style-name="Functions.D2" office:value-type="string">
            <text:p text:style-name="P130">Return a random number in the T distribution where <text:span text:style-name="Variable">df</text:span> is the number of degrees of freedom.</text:p>
          </table:table-cell>
        </table:table-row>
        <table:table-row table:style-name="Functions.6">
          <table:table-cell table:style-name="Functions.A2" office:value-type="string">
            <text:p text:style-name="P130"><text:span text:style-name="Source_5f_Text">TRUE</text:span></text:p>
          </table:table-cell>
          <table:table-cell table:style-name="Functions.A2" office:value-type="string">
            <text:p text:style-name="P170">No arguments</text:p>
          </table:table-cell>
          <table:table-cell table:style-name="Functions.A2" office:value-type="string">
            <text:p text:style-name="P130"/>
          </table:table-cell>
          <table:table-cell table:style-name="Functions.D2" office:value-type="string">
            <text:p text:style-name="P171">Return 1, which is taken as true.</text:p>
          </table:table-cell>
        </table:table-row>
        <table:table-row table:style-name="Functions.6">
          <table:table-cell table:style-name="Functions.A2" office:value-type="string">
            <text:p text:style-name="P130"><text:span text:style-name="Source_5f_Text">TRUNCATE</text:span></text:p>
          </table:table-cell>
          <table:table-cell table:style-name="Functions.A2" office:value-type="string">
            <text:p text:style-name="P133"><text:span text:style-name="Source_5f_Text">TRUNCATE(</text:span><text:span text:style-name="Variable">X</text:span><text:span text:style-name="Source_5f_Text">, </text:span><text:span text:style-name="Variable">Y%</text:span><text:span text:style-name="Source_5f_Text">)</text:span></text:p>
          </table:table-cell>
          <table:table-cell table:style-name="Functions.A2" office:value-type="string">
            <text:p text:style-name="P172"><text:span text:style-name="Variable">Y%</text:span> <text:span text:style-name="T39">≥</text:span><text:span text:style-name="T40"> 0</text:span></text:p>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UBOUND</text:span></text:p>
          </table:table-cell>
          <table:table-cell table:style-name="Functions.A2" office:value-type="string">
            <text:p text:style-name="P173"><text:span text:style-name="Source_5f_Text"><text:span text:style-name="T45">U</text:span></text:span><text:span text:style-name="Source_5f_Text">BOUND(</text:span><text:span text:style-name="Variable">arrayname</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UCASE$</text:span></text:p>
          </table:table-cell>
          <table:table-cell table:style-name="Functions.A2" office:value-type="string">
            <text:p text:style-name="P133"><text:span text:style-name="Source_5f_Text">UCASE$(</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UCF</text:span></text:p>
          </table:table-cell>
          <table:table-cell table:style-name="Functions.A2" office:value-type="string">
            <text:p text:style-name="P130"><text:span text:style-name="Source_5f_Text">UCF(</text:span><text:span text:style-name="Variable">x</text:span><text:span text:style-name="Source_5f_Text">)</text:span></text:p>
          </table:table-cell>
          <table:table-cell table:style-name="Functions.A2" office:value-type="string">
            <text:p text:style-name="P130"><text:span text:style-name="Variable">0 ≤ x ≤ 1</text:span></text:p>
          </table:table-cell>
          <table:table-cell table:style-name="Functions.D2" office:value-type="string">
            <text:p text:style-name="P130">Return the value of the cumulative distribution function <text:soft-page-break/>of the uniform distribution where <text:span text:style-name="Variable">x</text:span> is the evaluation point.</text:p>
          </table:table-cell>
        </table:table-row>
        <table:table-row table:style-name="Functions.6">
          <table:table-cell table:style-name="Functions.A2" office:value-type="string">
            <text:p text:style-name="P130"><text:span text:style-name="Source_5f_Text">UDF</text:span></text:p>
          </table:table-cell>
          <table:table-cell table:style-name="Functions.A2" office:value-type="string">
            <text:p text:style-name="P130"><text:span text:style-name="Source_5f_Text">UDF(</text:span><text:span text:style-name="Variable">x</text:span><text:span text:style-name="Source_5f_Text">)</text:span></text:p>
          </table:table-cell>
          <table:table-cell table:style-name="Functions.A2" office:value-type="string">
            <text:p text:style-name="P130"><text:span text:style-name="Variable">0 ≤ x ≤ 1</text:span></text:p>
          </table:table-cell>
          <table:table-cell table:style-name="Functions.D2" office:value-type="string">
            <text:p text:style-name="P130">Return the value of the probability density function of the uniform distribution where <text:span text:style-name="Variable">x</text:span> is the evaluation point.</text:p>
          </table:table-cell>
        </table:table-row>
        <table:table-row table:style-name="Functions.6">
          <table:table-cell table:style-name="Functions.A2" office:value-type="string">
            <text:p text:style-name="P130"><text:span text:style-name="Source_5f_Text">UIF</text:span></text:p>
          </table:table-cell>
          <table:table-cell table:style-name="Functions.A2" office:value-type="string">
            <text:p text:style-name="P130"><text:span text:style-name="Source_5f_Text">UIF(</text:span><text:span text:style-name="Variable">ᶲ</text:span><text:span text:style-name="Source_5f_Text">)</text:span></text:p>
          </table:table-cell>
          <table:table-cell table:style-name="Functions.A2" office:value-type="string">
            <text:p text:style-name="P130"><text:span text:style-name="Variable">0 ≤ ᶲ ≤ 1</text:span></text:p>
          </table:table-cell>
          <table:table-cell table:style-name="Functions.D2" office:value-type="string">
            <text:p text:style-name="P130">Return the value of the inverse probability density function of the uniform distribution where <text:span text:style-name="Variable">ᶲ </text:span><text:s/>is the probability.</text:p>
          </table:table-cell>
        </table:table-row>
        <table:table-row table:style-name="Functions.6">
          <table:table-cell table:style-name="Functions.A2" office:value-type="string">
            <text:p text:style-name="P130"><text:span text:style-name="Source_5f_Text">UPPER$</text:span></text:p>
          </table:table-cell>
          <table:table-cell table:style-name="Functions.A2" office:value-type="string">
            <text:p text:style-name="P133"><text:span text:style-name="Source_5f_Text">UPPER$(</text:span><text:span text:style-name="Variable">A$</text:span><text:span text:style-name="Source_5f_Text">)</text:span></text:p>
          </table:table-cell>
          <table:table-cell table:style-name="Functions.A2" office:value-type="string">
            <text:p text:style-name="P130"/>
          </table:table-cell>
          <table:table-cell table:style-name="Functions.D2" office:value-type="string">
            <text:p text:style-name="P130">As specified in the BW BASIC documentation.</text:p>
          </table:table-cell>
        </table:table-row>
        <table:table-row table:style-name="Functions.6">
          <table:table-cell table:style-name="Functions.A2" office:value-type="string">
            <text:p text:style-name="P130"><text:span text:style-name="Source_5f_Text">URN</text:span></text:p>
          </table:table-cell>
          <table:table-cell table:style-name="Functions.A2" office:value-type="string">
            <text:p text:style-name="P174">No arguments</text:p>
          </table:table-cell>
          <table:table-cell table:style-name="Functions.A2" office:value-type="string">
            <text:p text:style-name="P130"/>
          </table:table-cell>
          <table:table-cell table:style-name="Functions.D2" office:value-type="string">
            <text:p text:style-name="P130">Return a uniformly distributed random number between 0 and 1.</text:p>
          </table:table-cell>
        </table:table-row>
        <table:table-row table:style-name="Functions.6">
          <table:table-cell table:style-name="Functions.A2" office:value-type="string">
            <text:p text:style-name="P130"><text:span text:style-name="Source_5f_Text">VAR</text:span></text:p>
          </table:table-cell>
          <table:table-cell table:style-name="Functions.A2" office:value-type="string">
            <text:p text:style-name="P130"><text:span text:style-name="Source_5f_Text">VAR(</text:span><text:span text:style-name="Variable">v1</text:span><text:span text:style-name="Source_5f_Text">, [</text:span><text:span text:style-name="Variable">v2</text:span><text:span text:style-name="Source_5f_Text">, ...])</text:span></text:p>
          </table:table-cell>
          <table:table-cell table:style-name="Functions.A2" office:value-type="string">
            <text:p text:style-name="P130"/>
          </table:table-cell>
          <table:table-cell table:style-name="Functions.D2" office:value-type="string">
            <text:p text:style-name="P130">Row-wise sample variance.</text:p>
          </table:table-cell>
        </table:table-row>
        <table:table-row table:style-name="Functions.6">
          <table:table-cell table:style-name="Functions.A2" office:value-type="string">
            <text:p text:style-name="P130"><text:span text:style-name="Source_5f_Text">XCF</text:span></text:p>
          </table:table-cell>
          <table:table-cell table:style-name="Functions.A2" office:value-type="string">
            <text:p text:style-name="P130"><text:span text:style-name="Source_5f_Text">XCF(</text:span><text:span text:style-name="Variable">x</text:span><text:span text:style-name="Source_5f_Text">, </text:span><text:span text:style-name="Variable">df</text:span><text:span text:style-name="Source_5f_Text">)</text:span></text:p>
          </table:table-cell>
          <table:table-cell table:style-name="Functions.A2" office:value-type="string">
            <text:p text:style-name="P130"><text:span text:style-name="Variable">0 ≤ x ≤ 1</text:span></text:p>
            <text:p text:style-name="P130"><text:span text:style-name="Variable">df &gt; 0</text:span></text:p>
          </table:table-cell>
          <table:table-cell table:style-name="Functions.D2" office:value-type="string">
            <text:p text:style-name="P130">Return the value of the cumulative distribution function of the chi square distribution where <text:span text:style-name="Variable">x</text:span> is the evaluation point and <text:span text:style-name="Variable">df</text:span> is the number of degrees of freedom.</text:p>
          </table:table-cell>
        </table:table-row>
        <table:table-row table:style-name="Functions.6">
          <table:table-cell table:style-name="Functions.A2" office:value-type="string">
            <text:p text:style-name="P130"><text:span text:style-name="Source_5f_Text">XDF</text:span></text:p>
          </table:table-cell>
          <table:table-cell table:style-name="Functions.A2" office:value-type="string">
            <text:p text:style-name="P130"><text:span text:style-name="Source_5f_Text">XDF(</text:span><text:span text:style-name="Variable">x</text:span><text:span text:style-name="Source_5f_Text">, </text:span><text:span text:style-name="Variable">df</text:span><text:span text:style-name="Source_5f_Text">)</text:span></text:p>
          </table:table-cell>
          <table:table-cell table:style-name="Functions.A2" office:value-type="string">
            <text:p text:style-name="P130"><text:span text:style-name="Variable">0 ≤ x ≤ 1</text:span></text:p>
            <text:p text:style-name="P130"><text:span text:style-name="Variable">df &gt; 0</text:span></text:p>
          </table:table-cell>
          <table:table-cell table:style-name="Functions.D2" office:value-type="string">
            <text:p text:style-name="P130">Return the value of the probability density function of the chi square distribution where <text:span text:style-name="Variable">x</text:span> is the evaluation point and <text:span text:style-name="Variable">df</text:span> is the number <text:soft-page-break/>of degrees of freedom.</text:p>
          </table:table-cell>
        </table:table-row>
        <table:table-row table:style-name="Functions.6">
          <table:table-cell table:style-name="Functions.A2" office:value-type="string">
            <text:p text:style-name="P130"><text:span text:style-name="Source_5f_Text">XIF</text:span></text:p>
          </table:table-cell>
          <table:table-cell table:style-name="Functions.A2" office:value-type="string">
            <text:p text:style-name="P130"><text:span text:style-name="Source_5f_Text">XIF(</text:span><text:span text:style-name="Variable">ᶲ</text:span><text:span text:style-name="Source_5f_Text">, </text:span><text:span text:style-name="Variable">df</text:span><text:span text:style-name="Source_5f_Text">)</text:span></text:p>
          </table:table-cell>
          <table:table-cell table:style-name="Functions.A2" office:value-type="string">
            <text:p text:style-name="P130"><text:span text:style-name="Variable">0 ≤ ᶲ ≤ 1</text:span></text:p>
            <text:p text:style-name="P130"><text:span text:style-name="Variable">df &gt; 0</text:span></text:p>
          </table:table-cell>
          <table:table-cell table:style-name="Functions.D2" office:value-type="string">
            <text:p text:style-name="P130">Return the value of the inverse probability density function of the chi square distribution where <text:span text:style-name="Variable">ᶲ </text:span>is the probability and <text:span text:style-name="Variable">df </text:span>is the number of degrees of freedom.</text:p>
          </table:table-cell>
        </table:table-row>
        <table:table-row table:style-name="Functions.6">
          <table:table-cell table:style-name="Functions.A2" office:value-type="string">
            <text:p text:style-name="P130"><text:span text:style-name="Source_5f_Text">XRN</text:span></text:p>
          </table:table-cell>
          <table:table-cell table:style-name="Functions.A2" office:value-type="string">
            <text:p text:style-name="P130"><text:span text:style-name="Source_5f_Text">XRN(</text:span><text:span text:style-name="Variable">df</text:span><text:span text:style-name="Source_5f_Text">)</text:span></text:p>
          </table:table-cell>
          <table:table-cell table:style-name="Functions.A2" office:value-type="string">
            <text:p text:style-name="P130"><text:span text:style-name="Variable">df &gt; 0</text:span></text:p>
          </table:table-cell>
          <table:table-cell table:style-name="Functions.D2" office:value-type="string">
            <text:p text:style-name="P130">Return a random number in the chi square distribution where <text:span text:style-name="Variable">df</text:span> is the number of degrees of freedom.</text:p>
          </table:table-cell>
        </table:table-row>
        <table:table-row table:style-name="Functions.6">
          <table:table-cell table:style-name="Functions.A2" office:value-type="string">
            <text:p text:style-name="P130"><text:span text:style-name="Source_5f_Text">WCF</text:span></text:p>
          </table:table-cell>
          <table:table-cell table:style-name="Functions.A2" office:value-type="string">
            <text:p text:style-name="P130"><text:span text:style-name="Source_5f_Text">WCF(</text:span><text:span text:style-name="Variable">x</text:span><text:span text:style-name="Source_5f_Text">, </text:span><text:span text:style-name="Variable">p</text:span><text:span text:style-name="Source_5f_Text">, </text:span><text:span text:style-name="Variable">q</text:span>)</text:p>
          </table:table-cell>
          <table:table-cell table:style-name="Functions.A2" office:value-type="string">
            <text:p text:style-name="P130">0 ≤ x ≤ 1</text:p>
            <text:p text:style-name="P130"><text:span text:style-name="Variable">p</text:span> &gt; 0</text:p>
            <text:p text:style-name="P130"><text:span text:style-name="Variable">q</text:span> &gt; 0</text:p>
          </table:table-cell>
          <table:table-cell table:style-name="Functions.D2" office:value-type="string">
            <text:p text:style-name="P130">Return the value of the cumulative distribution function of the Weibull distribution where <text:span text:style-name="Variable">x</text:span> is the evaluation point, <text:span text:style-name="Variable">p</text:span> is the scale parameter, and <text:span text:style-name="Variable">q</text:span> is the shape parameter.</text:p>
          </table:table-cell>
        </table:table-row>
        <table:table-row table:style-name="Functions.6">
          <table:table-cell table:style-name="Functions.A2" office:value-type="string">
            <text:p text:style-name="P130"><text:span text:style-name="Source_5f_Text">WDF</text:span></text:p>
          </table:table-cell>
          <table:table-cell table:style-name="Functions.A2" office:value-type="string">
            <text:p text:style-name="P130"><text:span text:style-name="Source_5f_Text">WDF(</text:span><text:span text:style-name="Variable">x</text:span><text:span text:style-name="Source_5f_Text">, </text:span><text:span text:style-name="Variable">p</text:span><text:span text:style-name="Source_5f_Text">, </text:span><text:span text:style-name="Variable">q</text:span>)</text:p>
          </table:table-cell>
          <table:table-cell table:style-name="Functions.A2" office:value-type="string">
            <text:p text:style-name="P130">0 ≤ x ≤ 1</text:p>
            <text:p text:style-name="P130"><text:span text:style-name="Variable">p</text:span> &gt; 0</text:p>
            <text:p text:style-name="P130"><text:span text:style-name="Variable">q</text:span> &gt; 0</text:p>
          </table:table-cell>
          <table:table-cell table:style-name="Functions.D2" office:value-type="string">
            <text:p text:style-name="P130">Return the value of the probability density function of the Weibull distribution where <text:span text:style-name="Variable">x</text:span> is the evaluation point, <text:span text:style-name="Variable">p</text:span> is the scale parameter, and <text:span text:style-name="Variable">q</text:span> is the shape parameter.</text:p>
          </table:table-cell>
        </table:table-row>
        <table:table-row table:style-name="Functions.6">
          <table:table-cell table:style-name="Functions.A2" office:value-type="string">
            <text:p text:style-name="P130"><text:span text:style-name="Source_5f_Text">WIF</text:span></text:p>
          </table:table-cell>
          <table:table-cell table:style-name="Functions.A2" office:value-type="string">
            <text:p text:style-name="P130"><text:span text:style-name="Source_5f_Text">WIF(</text:span><text:span text:style-name="Variable">ᶲ</text:span><text:span text:style-name="Source_5f_Text">, </text:span><text:span text:style-name="Variable">p</text:span><text:span text:style-name="Source_5f_Text">, </text:span><text:span text:style-name="Variable">q</text:span>)</text:p>
          </table:table-cell>
          <table:table-cell table:style-name="Functions.A2" office:value-type="string">
            <text:p text:style-name="P130">0 ≤ ᶲ ≤ 1</text:p>
            <text:p text:style-name="P130"><text:span text:style-name="Variable">p</text:span> &gt; 0</text:p>
            <text:p text:style-name="P130"><text:span text:style-name="Variable">q</text:span> &gt; 0</text:p>
          </table:table-cell>
          <table:table-cell table:style-name="Functions.D2" office:value-type="string">
            <text:p text:style-name="P130">Return the value of the probability density function of the Weibull distribution where ᶲ is the probability, <text:span text:style-name="Variable">p</text:span> is the scale parameter, <text:soft-page-break/>and <text:span text:style-name="Variable">q</text:span> is the shape parameter.</text:p>
          </table:table-cell>
        </table:table-row>
        <table:table-row table:style-name="Functions.6">
          <table:table-cell table:style-name="Functions.A2" office:value-type="string">
            <text:p text:style-name="P130"><text:span text:style-name="Source_5f_Text">WRN</text:span></text:p>
          </table:table-cell>
          <table:table-cell table:style-name="Functions.A2" office:value-type="string">
            <text:p text:style-name="P130"><text:span text:style-name="Source_5f_Text">WRN(</text:span><text:span text:style-name="Variable">p</text:span><text:span text:style-name="Source_5f_Text">, </text:span><text:span text:style-name="Variable">q</text:span>)</text:p>
          </table:table-cell>
          <table:table-cell table:style-name="Functions.A2" office:value-type="string">
            <text:p text:style-name="P130"><text:span text:style-name="Variable">p</text:span> &gt; 0</text:p>
            <text:p text:style-name="P130"><text:span text:style-name="Variable">q</text:span> &gt; 0</text:p>
          </table:table-cell>
          <table:table-cell table:style-name="Functions.D2" office:value-type="string">
            <text:p text:style-name="P130">Return a random number on the Weibull distribution where <text:span text:style-name="Variable">p</text:span> is the scale parameter, and <text:span text:style-name="Variable">q</text:span> is the shape parameter.</text:p>
          </table:table-cell>
        </table:table-row>
        <table:table-row table:style-name="Functions.6">
          <table:table-cell table:style-name="Functions.A2" office:value-type="string">
            <text:p text:style-name="P130"><text:span text:style-name="Source_5f_Text">ZCF</text:span></text:p>
          </table:table-cell>
          <table:table-cell table:style-name="Functions.A2" office:value-type="string">
            <text:p text:style-name="P130"><text:span text:style-name="Source_5f_Text">ZCF(</text:span><text:span text:style-name="Variable">x</text:span><text:span text:style-name="Source_5f_Text"> [, </text:span><text:span text:style-name="Variable">mu</text:span><text:span text:style-name="Source_5f_Text">, </text:span><text:span text:style-name="Variable">sigma</text:span><text:span text:style-name="Source_5f_Text">])</text:span></text:p>
          </table:table-cell>
          <table:table-cell table:style-name="Functions.A2" office:value-type="string">
            <text:p text:style-name="P130">0 ≤<text:span text:style-name="Variable"> z</text:span> ≤ 1</text:p>
            <text:p text:style-name="P130"><text:span text:style-name="Variable">sigma</text:span> &gt; 0</text:p>
          </table:table-cell>
          <table:table-cell table:style-name="Functions.D2" office:value-type="string">
            <text:p text:style-name="P130">Returns the value of the cumulative <text:s text:c="5"/></text:p>
            <text:p text:style-name="P130"><text:s/>distribution function of the normal distribution evaluated at <text:span text:style-name="Variable">x</text:span>, where <text:span text:style-name="Variable">mu</text:span> is the mean and <text:span text:style-name="Variable">sigma</text:span> is the standard deviation. If <text:span text:style-name="Variable">mu</text:span> and <text:span text:style-name="Variable">sigma</text:span> are omitted, the Standard Normal <text:s/>distribution (mean 0, standard deviation 1) is used.</text:p>
          </table:table-cell>
        </table:table-row>
        <table:table-row table:style-name="Functions.6">
          <table:table-cell table:style-name="Functions.A2" office:value-type="string">
            <text:p text:style-name="P130"><text:span text:style-name="Source_5f_Text">ZDF</text:span></text:p>
          </table:table-cell>
          <table:table-cell table:style-name="Functions.A2" office:value-type="string">
            <text:p text:style-name="P130"><text:span text:style-name="Source_5f_Text">ZDF(</text:span><text:span text:style-name="Variable">x</text:span><text:span text:style-name="Source_5f_Text"> [, </text:span><text:span text:style-name="Variable">mu</text:span><text:span text:style-name="Source_5f_Text">, </text:span><text:span text:style-name="Variable">sigma</text:span><text:span text:style-name="Source_5f_Text">])</text:span></text:p>
          </table:table-cell>
          <table:table-cell table:style-name="Functions.A2" office:value-type="string">
            <text:p text:style-name="P175">0 ≤ <text:span text:style-name="Variable">z</text:span> ≤ 1</text:p>
            <text:p text:style-name="P175"><text:span text:style-name="Variable">sigma</text:span> &gt; 0</text:p>
          </table:table-cell>
          <table:table-cell table:style-name="Functions.D2" office:value-type="string">
            <text:p text:style-name="P130">Returns the value of the probability <text:s text:c="4"/></text:p>
            <text:p text:style-name="P130"><text:s/>density function of the normal distribution evaluated at <text:span text:style-name="Variable">x</text:span>, where <text:span text:style-name="Variable">mu</text:span> is the mean and <text:span text:style-name="Variable">sigma</text:span> is the standard deviation. If <text:span text:style-name="Variable">mu</text:span> and <text:span text:style-name="Variable">sigma</text:span> are omitted, the Standard Normal <text:s text:c="4"/></text:p>
            <text:p text:style-name="P130"><text:s/>distribution (mean 0, standard deviation 1) is used.</text:p>
          </table:table-cell>
        </table:table-row>
        <table:table-row table:style-name="Functions.6">
          <table:table-cell table:style-name="Functions.A2" office:value-type="string">
            <text:p text:style-name="P130"><text:span text:style-name="Source_5f_Text">ZIF</text:span></text:p>
          </table:table-cell>
          <table:table-cell table:style-name="Functions.A2" office:value-type="string">
            <text:p text:style-name="P130"><text:span text:style-name="Source_5f_Text">ZIF(</text:span><text:span text:style-name="Variable">p</text:span><text:span text:style-name="Source_5f_Text"> [, </text:span><text:span text:style-name="Variable">mu</text:span><text:span text:style-name="Source_5f_Text">, </text:span><text:span text:style-name="Variable">sigma</text:span><text:span text:style-name="Source_5f_Text">])</text:span></text:p>
          </table:table-cell>
          <table:table-cell table:style-name="Functions.A2" office:value-type="string">
            <text:p text:style-name="P130">0 ≤ <text:span text:style-name="Variable">p</text:span> ≤ 1</text:p>
            <text:p text:style-name="P176"><text:span text:style-name="Variable">sigma</text:span> &gt; 0</text:p>
          </table:table-cell>
          <table:table-cell table:style-name="Functions.D2" office:value-type="string">
            <text:p text:style-name="P130">Returns the inverse <text:s text:c="4"/></text:p>
            <text:p text:style-name="P130"><text:s/>cumulative distribution function (quantile) of the normal distribution for probability *p*, </text:p>
            <text:p text:style-name="P130"><text:s/>where *mu* is the <text:soft-page-break/>mean and *sigma* is the standard deviation. If *mu* and *sigma* are <text:s text:c="6"/></text:p>
            <text:p text:style-name="P130"><text:s/>omitted, the Standard Normal distribution (mean 0, standard deviation 1) is used.</text:p>
          </table:table-cell>
        </table:table-row>
        <table:table-row table:style-name="Functions.6">
          <table:table-cell table:style-name="Functions.A2" office:value-type="string">
            <text:p text:style-name="P130"><text:span text:style-name="Source_5f_Text">ZRN</text:span></text:p>
          </table:table-cell>
          <table:table-cell table:style-name="Functions.A2" office:value-type="string">
            <text:p text:style-name="P130"><text:span text:style-name="Source_5f_Text">ZRN([</text:span><text:span text:style-name="Variable">mu</text:span><text:span text:style-name="Source_5f_Text">, </text:span><text:span text:style-name="Variable">sigma</text:span><text:span text:style-name="Source_5f_Text">])</text:span></text:p>
          </table:table-cell>
          <table:table-cell table:style-name="Functions.A2" office:value-type="string">
            <text:p text:style-name="P177"><text:span text:style-name="Variable">sigma</text:span> &gt; 0</text:p>
          </table:table-cell>
          <table:table-cell table:style-name="Functions.D2" office:value-type="string">
            <text:p text:style-name="P130">Returns a random variate from the normal distribution where <text:span text:style-name="Variable">mu</text:span> is the mean and <text:span text:style-name="Variable">sigma</text:span> is the standard deviation. If arguments are omitted, the Standard Normal distribution (mean 0, standard deviation 1) is used.</text:p>
          </table:table-cell>
        </table:table-row>
      </table:table>
      <text:list text:continue-numbering="true" text:style-name="List_20_1">
        <text:list-item>
          <text:p text:style-name="P178">Functions returning character values end with <text:span text:style-name="Source_5f_Text">$.</text:span></text:p>
        </text:list-item>
        <text:list-item>
          <text:p text:style-name="P178">Functions returning numeric values do not end with <text:span text:style-name="Source_5f_Text">$.</text:span></text:p>
        </text:list-item>
      </text:list>
      <text:p text:style-name="P179">Function Arguments:</text:p>
      <text:list text:continue-numbering="true" text:style-name="List_20_1">
        <text:list-item>
          <text:p text:style-name="P180">Variable ranges may not be function arguments.</text:p>
        </text:list-item>
        <text:list-item>
          <text:p text:style-name="P180">If numeric argument set to character value (or vice versa): function call fails with error.</text:p>
        </text:list-item>
        <text:list-item>
          <text:p text:style-name="P180">Argument values outside permitted range: function call fails with error.</text:p>
        </text:list-item>
        <text:list-item>
          <text:p text:style-name="P180">Invalid arguments to mathematical functions (e.g., non-positive argument to <text:span text:style-name="Source_5f_Text">LOG</text:span>): fails with error</text:p>
        </text:list-item>
      </text:list>
      <text:p text:style-name="Text_20_body"><text:span text:style-name="T1">Aliases:</text:span> Multiple function names separated by “/” are aliases of the same function. All aliases shown in the function table shall be supported; additional aliases are not required.</text:p>
      <text:p text:style-name="P179">Aggregate Functions:</text:p>
      <text:list xml:id="list101931015444834" text:continue-numbering="true" text:style-name="List_20_1">
        <text:list-item>
          <text:p text:style-name="P180">Ignore missing values when making computations.</text:p>
        </text:list-item>
        <text:list-item>
          <text:p text:style-name="P180">If no non-missing arguments passed: return missing value.</text:p>
        </text:list-item>
      </text:list>
      <text:p text:style-name="Horizontal_20_Line"/>
      <text:h text:style-name="Heading_20_3" text:outline-level="3"><text:bookmark-start text:name="operators-and-expression-evaluation"/><text:soft-page-break/>7.3 Operators and Expression Evaluation<text:bookmark-end text:name="operators-and-expression-evaluation"/></text:h>
      <text:p text:style-name="First_20_paragraph"><text:span text:style-name="T1">Operator Precedence:</text:span> As specified in BW BASIC documentation.</text:p>
      <text:p text:style-name="P181">Expression Types:</text:p>
      <text:list xml:id="list101931377659000" text:continue-numbering="true" text:style-name="List_20_1">
        <text:list-item>
          <text:p text:style-name="P182">Arithmetic expressions: Numeric values, variables, and functions combined with arithmetic operators.</text:p>
        </text:list-item>
        <text:list-item>
          <text:p text:style-name="P182">String expressions: Character values, variables, and functions combined with string operators.</text:p>
        </text:list-item>
        <text:list-item>
          <text:p text:style-name="P182">Logical expressions: Boolean values resulting from comparisons and logical operations.</text:p>
        </text:list-item>
      </text:list>
      <text:p text:style-name="Text_20_body"><text:span text:style-name="T1">Type Checking:</text:span> Type mismatches in expressions result in error messages (e.g., adding numeric to character value).</text:p>
      <text:p text:style-name="Horizontal_20_Line"/>
      <text:h text:style-name="Heading_20_2" text:outline-level="2"><text:bookmark-start text:name="implementation-notes"/>8. IMPLEMENTATION NOTES<text:bookmark-end text:name="implementation-notes"/></text:h>
      <text:h text:style-name="Heading_20_3" text:outline-level="3">8.1 Usage</text:h>
      <text:p text:style-name="P183"><text:span text:style-name="Source_5f_Text">sdata </text:span><text:span text:style-name="T46">[</text:span><text:span text:style-name="Source_5f_Text">-q -u</text:span><text:span text:style-name="Variable">&lt;filename&gt;</text:span> <text:span text:style-name="T46">[</text:span><text:span text:style-name="Source_5f_Text">--</text:span><text:span text:style-name="Source_5f_Text"><text:span text:style-name="T47">infmt=</text:span></text:span><text:span text:style-name="T47">&lt;csv|odf|ooxml&gt;</text:span><text:span text:style-name="T46">]]</text:span> <text:span text:style-name="T46">[</text:span><text:span text:style-name="Source_5f_Text">-s</text:span><text:span text:style-name="Variable">&lt;filename&gt;</text:span> <text:span text:style-name="T48">\</text:span></text:p>
      <text:p text:style-name="P183"><text:span text:style-name="T46"><text:s text:c="6"/>[</text:span><text:span text:style-name="Source_5f_Text">--</text:span><text:span text:style-name="Source_5f_Text"><text:span text:style-name="T47">outfmt=</text:span></text:span><text:span text:style-name="T47">&lt;csv|odf|ooxml&gt;</text:span><text:span text:style-name="T46">]]</text:span> <text:s/><text:span text:style-name="T46">[</text:span><text:span text:style-name="Source_5f_Text">-o </text:span><text:span text:style-name="Variable">&lt;filename&gt;</text:span>] <text:span text:style-name="T46">[</text:span><text:span text:style-name="Source_5f_Text">-</text:span><text:span text:style-name="Source_5f_Text"><text:span text:style-name="T49">m</text:span></text:span><text:span text:style-name="Variable"><text:span text:style-name="T49">&lt;n&gt;</text:span></text:span><text:span text:style-name="Variable"><text:span text:style-name="T46">]</text:span></text:span><text:span text:style-name="T49"> </text:span><text:span text:style-name="T46">[</text:span><text:span text:style-name="Source_5f_Text"><text:span text:style-name="T49">--</text:span></text:span><text:span text:style-name="Source_5f_Text"><text:span text:style-name="T46">clen=</text:span></text:span><text:span text:style-name="T46">&lt;</text:span><text:span text:style-name="Variable"><text:span text:style-name="T46">n</text:span></text:span><text:span text:style-name="T46">&gt;] </text:span><text:span text:style-name="T48">\</text:span></text:p>
      <text:p text:style-name="P183"><text:span text:style-name="T50"><text:s text:c="6"/>[</text:span><text:span text:style-name="Source_5f_Text"><text:span text:style-name="T50">--noshell</text:span></text:span><text:span text:style-name="T50">] </text:span><text:span text:style-name="Variable">[filename]</text:span></text:p>
      <text:h text:style-name="Heading_20_4" text:outline-level="4"><text:bookmark-start text:name="command-line-options"/>8.1<text:span text:style-name="T51">1</text:span> Command-Line Options<text:bookmark-end text:name="command-line-options"/></text:h>
      <text:h text:style-name="Heading_20_4" text:outline-level="4">The interpreter accepts the following command-line options:</text:h>
      <text:p text:style-name="P184">Memory Management:</text:p>
      <text:list text:continue-numbering="true" text:style-name="List_20_1">
        <text:list-item>
          <text:p text:style-name="P185"><text:span text:style-name="Source_5f_Text">-m </text:span>&lt;<text:span text:style-name="Variable">size</text:span>&gt;: Maximum in-memory table size.</text:p>
        </text:list-item>
        <text:list-item>
          <text:p text:style-name="P185"><text:span text:style-name="Source_5f_Text">-t </text:span>&lt;<text:span text:style-name="Variable">size</text:span>&gt;: Maximum temporary variable/array memory.</text:p>
        </text:list-item>
      </text:list>
      <text:p text:style-name="P186">Character Variables:</text:p>
      <text:list text:continue-numbering="true" text:style-name="List_20_1">
        <text:list-item>
          <text:p text:style-name="P187"><text:span text:style-name="Source_5f_Text">--clen </text:span>&lt;<text:span text:style-name="Variable">length</text:span>&gt;: Maximum character variable length (default: 256).</text:p>
        </text:list-item>
      </text:list>
      <text:p text:style-name="P188">Execution Control:</text:p>
      <text:list text:continue-numbering="true" text:style-name="List_20_1">
        <text:list-item>
          <text:p text:style-name="P189"><text:span text:style-name="Source_5f_Text"><text:span text:style-name="T52">--noshell</text:span></text:span><text:span text:style-name="T52">: </text:span><text:span text:style-name="T53">Disable the </text:span><text:span text:style-name="Source_5f_Text"><text:span text:style-name="T54">SYSTEM</text:span></text:span><text:span text:style-name="T54"> command and the </text:span><text:span text:style-name="Source_5f_Text"><text:span text:style-name="T53">SHELL</text:span></text:span><text:span text:style-name="T53"> function.</text:span></text:p>
        </text:list-item>
      </text:list>
      <text:p text:style-name="P190">Input Control:</text:p>
      <text:list text:continue-numbering="true" text:style-name="List_20_1">
        <text:list-item>
          <text:p text:style-name="P191"><text:span text:style-name="Source_5f_Text"><text:span text:style-name="T4">-</text:span></text:span><text:span text:style-name="Source_5f_Text"><text:span text:style-name="T55">u </text:span></text:span><text:span text:style-name="Variable"><text:span text:style-name="T56">&lt;filename</text:span></text:span><text:span text:style-name="T56">&gt;</text:span><text:span text:style-name="T4">: </text:span><text:span text:style-name="T55">Open the specified file as the input dataset (</text:span><text:span text:style-name="T57">Equivalent to a </text:span><text:span text:style-name="Source_5f_Text"><text:span text:style-name="T57">USE</text:span></text:span><text:span text:style-name="T57"> statement</text:span><text:span text:style-name="T55">).</text:span></text:p>
        </text:list-item>
        <text:list-item>
          <text:p text:style-name="P192"><text:span text:style-name="Source_5f_Text"><text:span text:style-name="T58">--</text:span></text:span><text:span text:style-name="Source_5f_Text">infmt</text:span>: Specify the format of the input dataset (ignored unless the <text:span text:style-name="Source_5f_Text">-u</text:span> option is specified). </text:p>
        </text:list-item>
      </text:list>
      <text:p text:style-name="P186">Output Control:</text:p>
      <text:list xml:id="list101930579508497" text:continue-numbering="true" text:style-name="List_20_1">
        <text:list-item>
          <text:p text:style-name="P193"><text:soft-page-break/><text:span text:style-name="Source_5f_Text"><text:span text:style-name="T4">-</text:span></text:span><text:span text:style-name="Source_5f_Text"><text:span text:style-name="T57">o</text:span></text:span><text:span text:style-name="T4">: </text:span><text:span text:style-name="T57">Open the specified file for console output (Equivalent to an </text:span><text:span text:style-name="Source_5f_Text"><text:span text:style-name="T57">OUTPUT</text:span></text:span><text:span text:style-name="T57"> statement).</text:span></text:p>
        </text:list-item>
        <text:list-item>
          <text:p text:style-name="P81"><text:span text:style-name="Source_5f_Text">-</text:span><text:span text:style-name="Source_5f_Text"><text:span text:style-name="T59">p </text:span></text:span><text:span text:style-name="T59">&lt;</text:span><text:span text:style-name="Variable"><text:span text:style-name="T59">specstr</text:span></text:span><text:span text:style-name="T59">&gt;: </text:span>Pager specification for interactive mode.</text:p>
        </text:list-item>
        <text:list-item>
          <text:p text:style-name="P81"><text:span text:style-name="Source_5f_Text"><text:span text:style-name="T58">-q</text:span></text:span>: <text:span text:style-name="T47">Suppress writing of console output to standard output (can be undone with </text:span><text:span text:style-name="Source_5f_Text"><text:span text:style-name="T47">ECHO ON</text:span></text:span><text:span text:style-name="T47">).</text:span> </text:p>
        </text:list-item>
        <text:list-item>
          <text:p text:style-name="P194"><text:span text:style-name="Source_5f_Text">-</text:span><text:span text:style-name="Source_5f_Text"><text:span text:style-name="T47">s</text:span></text:span><text:span text:style-name="T47">: Open the specified file as the output dataset (</text:span><text:span text:style-name="T60">Equivalent to a </text:span><text:span text:style-name="Source_5f_Text"><text:span text:style-name="T60">SAVE</text:span></text:span><text:span text:style-name="T60"> statement</text:span><text:span text:style-name="T47">).</text:span></text:p>
        </text:list-item>
        <text:list-item>
          <text:p text:style-name="P81"><text:span text:style-name="Source_5f_Text">--</text:span><text:span text:style-name="Source_5f_Text"><text:span text:style-name="T47">outfmt</text:span></text:span><text:span text:style-name="T47">: </text:span>Specify the format of the output dataset (ignored unless the <text:span text:style-name="Source_5f_Text">-s</text:span> option is specified).</text:p>
        </text:list-item>
      </text:list>
      <text:h text:style-name="Heading_20_4" text:outline-level="4">8.12 Argument</text:h>
      <text:p text:style-name="P195">The name of a script (“command file”) to run. <text:s/>If not specified <text:span text:style-name="T61">then</text:span> an interactive session is opened.</text:p>
      <text:h text:style-name="Heading_20_3" text:outline-level="3"><text:bookmark-start text:name="case-insensitivity"/>8.2 Case Insensitivity<text:bookmark-end text:name="case-insensitivity"/></text:h>
      <text:p text:style-name="P196">The language is entirely case insensitive:</text:p>
      <text:list xml:id="list101929951028423" text:continue-numbering="true" text:style-name="List_20_1">
        <text:list-item>
          <text:p text:style-name="P197">Variable names: <text:span text:style-name="Source_5f_Text">TEMP</text:span>, <text:span text:style-name="Source_5f_Text">temp</text:span>, and <text:span text:style-name="Source_5f_Text">Temp</text:span> refer to same variable.</text:p>
        </text:list-item>
        <text:list-item>
          <text:p text:style-name="P197">Commands: <text:span text:style-name="Source_5f_Text">PRINT</text:span>, <text:span text:style-name="Source_5f_Text">print</text:span>, and <text:span text:style-name="Source_5f_Text">Print</text:span> are equivalent.</text:p>
        </text:list-item>
        <text:list-item>
          <text:p text:style-name="P197">Function names: <text:span text:style-name="Source_5f_Text">SIN</text:span>, <text:span text:style-name="Source_5f_Text">sin</text:span>, and <text:span text:style-name="Source_5f_Text">Sin</text:span> are equivalent.</text:p>
        </text:list-item>
        <text:list-item>
          <text:p text:style-name="P197">Keywords: <text:span text:style-name="Source_5f_Text">IF</text:span>, <text:span text:style-name="Source_5f_Text">if</text:span>, and <text:span text:style-name="Source_5f_Text">If</text:span> are equivalent.</text:p>
        </text:list-item>
      </text:list>
      <text:p text:style-name="Text_20_body"><text:span text:style-name="T1">Exception:</text:span> Character string literals preserve case: - <text:span text:style-name="Source_5f_Text">"Hello"</text:span> and <text:span text:style-name="Source_5f_Text">"HELLO"</text:span> are different values.</text:p>
      <text:h text:style-name="Heading_20_3" text:outline-level="3"><text:bookmark-start text:name="reserved-names-and-keywords"/>8.3 Reserved Names and Keywords<text:bookmark-end text:name="reserved-names-and-keywords"/></text:h>
      <text:p text:style-name="First_20_paragraph">No explicit list of reserved words is provided, but best practice is to avoid using command names and function names as variable names to prevent confusion.</text:p>
      <text:h text:style-name="Heading_20_3" text:outline-level="3"><text:bookmark-start text:name="error-messages"/>8.4 Error Messages<text:bookmark-end text:name="error-messages"/></text:h>
      <text:p text:style-name="P198">All error conditions specified in this document shall produce clear, descriptive error messages that:</text:p>
      <text:list xml:id="list101931447820474" text:continue-numbering="true" text:style-name="List_20_1">
        <text:list-item>
          <text:p text:style-name="P199">Identify the nature of the error.</text:p>
        </text:list-item>
        <text:list-item>
          <text:p text:style-name="P199">Indicate the location (line number if applicable).</text:p>
        </text:list-item>
        <text:list-item>
          <text:p text:style-name="P199">Suggest corrective action where appropriate.</text:p>
        </text:list-item>
      </text:list>
      <text:h text:style-name="Heading_20_3" text:outline-level="3"><text:bookmark-start text:name="future-extensions"/>8.5 Future Extensions<text:bookmark-end text:name="future-extensions"/></text:h>
      <text:p text:style-name="P200">This specification notes several areas where future versions may provide additional capabilities: </text:p>
      <text:list text:continue-numbering="true" text:style-name="List_20_1">
        <text:list-item>
          <text:p text:style-name="P201"><text:soft-page-break/>Special missing value codes for IEEE 754 infinity and NaN (<text:span text:style-name="Source_5f_Text">.i</text:span>, <text:span text:style-name="Source_5f_Text">-.i</text:span>, <text:span text:style-name="Source_5f_Text">.n</text:span>).</text:p>
        </text:list-item>
        <text:list-item>
          <text:p text:style-name="P201">Additional file format support.</text:p>
        </text:list-item>
        <text:list-item>
          <text:p text:style-name="P201">Numeric literals in bases other than ten.</text:p>
        </text:list-item>
        <text:list-item>
          <text:p text:style-name="P201">Enhanced formula evaluation in spreadsheets.</text:p>
        </text:list-item>
      </text:list>
      <text:p text:style-name="Text_20_body">These extensions are noted for planning purposes but are not requirements for the initial implementa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Source_20_Text" style:display-name="Source Text"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description/>
    <dc:subject/>
    <meta:keyword/>
    <meta:initial-creator/>
    <meta:creation-date>2026-02-13T17:56:05Z</meta:creation-date>
    <dc:date>2026-04-02T10:19:28.973843255</dc:date>
    <meta:editing-duration>P1DT7H9M22S</meta:editing-duration>
    <meta:editing-cycles>275</meta:editing-cycles>
    <meta:document-statistic meta:table-count="2" meta:image-count="0" meta:object-count="0" meta:page-count="57" meta:paragraph-count="1167" meta:word-count="9215" meta:character-count="54814" meta:non-whitespace-character-count="46907"/>
  </office:meta>
</office:document-meta>
</file>